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media/media1.mp4" manifest:media-type="video/mp4"/>
  <manifest:file-entry manifest:full-path="media/media2.mp4" manifest:media-type="video/mp4"/>
  <manifest:file-entry manifest:full-path="Object 20/content.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783" style:parent-style-name="Graphics">
      <style:graphic-properties draw:fill="none" draw:stroke="none"/>
    </style:style>
    <style:style style:family="drawing-page" style:name="a7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style:vertical-pos="middl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20">
      <style:graphic-properties fo:wrap-option="wrap" fo:padding-top="0.05in" fo:padding-bottom="0.05in" fo:padding-left="0.1in" fo:padding-right="0.1in" draw:textarea-vertical-align="middle" draw:textarea-horizontal-align="center" draw:fill="none" draw:stroke="solid" svg:stroke-width="0.02083in" svg:stroke-color="#6666ff" draw:marker-end="a1719" svg:stroke-opacity="100%" draw:stroke-linejoin="miter" svg:stroke-linecap="butt" draw:auto-grow-width="false" draw:auto-grow-height="false"/>
      <style:paragraph-properties style:font-independent-line-spacing="true" style:writing-mode="lr-tb"/>
    </style:style>
    <style:style style:family="graphic" style:name="a1721">
      <style:graphic-properties draw:fill="none" draw:stroke="solid" svg:stroke-width="0.02083in" svg:stroke-color="#e97132" svg:stroke-opacity="100%" draw:stroke-linejoin="miter" svg:stroke-linecap="butt"/>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4">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13">
      <style:graphic-properties style:vertical-pos="middl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735">
      <style:graphic-properties draw:fill="none" draw:stroke="solid" svg:stroke-width="0.02083in" svg:stroke-color="#e97132" svg:stroke-opacity="100%" draw:stroke-linejoin="miter" svg:stroke-linecap="butt"/>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8">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resentation" style:name="a1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style:font-family-complex="Arial" style:font-family-generic-complex="swiss" style:font-pitch-complex="variable" fo:font-size="0.38889in" style:font-size-asian="0.38889in" style:font-size-complex="0.38889in" fo:letter-spacing="0in" style:language-complex="ar" style:country-complex="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style:vertical-pos="middl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ptos" style:font-family-complex="Arial" style:font-family-generic-complex="swiss" style:font-pitch-complex="variable" fo:font-size="0.38889in" style:font-size-asian="0.38889in" style:font-size-complex="0.38889in" fo:letter-spacing="0in" style:language-complex="ar" style:country-complex="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style:vertical-pos="middl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5" style:parent-style-name="Graphics">
      <style:graphic-properties draw:fill="none" fo:clip="rect(0in, 4.21667in, 0in, 0in)" draw:stroke="none"/>
    </style:style>
    <style:style style:family="graphic" style:name="a1740">
      <style:graphic-properties draw:fill="none" draw:stroke="dash" draw:stroke-dash="a1739" svg:stroke-width="0.02083in" svg:stroke-color="#a6a6a6" svg:stroke-opacity="100%" draw:stroke-linejoin="miter" svg:stroke-linecap="butt"/>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1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44">
      <style:graphic-properties draw:fill="none" draw:stroke="solid" svg:stroke-width="0.02083in" svg:stroke-color="#e97132" svg:stroke-opacity="100%" draw:stroke-linejoin="miter" svg:stroke-linecap="butt"/>
    </style:style>
    <style:style style:family="graphic" style:name="a902">
      <style:graphic-properties draw:fill="none" draw:stroke="solid" svg:stroke-width="0.04167in" svg:stroke-color="#e97132" draw:marker-end="a901" svg:stroke-opacity="100%" draw:stroke-linejoin="miter" svg:stroke-linecap="butt"/>
    </style:style>
    <style:style style:family="drawing-page" style:name="a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parent-style-name="Graphics">
      <style:graphic-properties draw:fill="none" fo:clip="rect(0.4488in, 0in, 0.38654in, 0.24301in)" draw:stroke="none"/>
    </style:style>
    <style:style style:family="paragraph" style:name="a1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9467bd"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7">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749">
      <style:graphic-properties draw:fill="none" draw:stroke="dash" draw:stroke-dash="a1748" svg:stroke-width="0.02083in" svg:stroke-color="#a6a6a6" svg:stroke-opacity="100%" draw:stroke-linejoin="miter" svg:stroke-linecap="butt"/>
    </style:style>
    <style:style style:family="graphic" style:name="a909">
      <style:graphic-properties draw:fill="none" draw:stroke="solid" svg:stroke-width="0.04167in" svg:stroke-color="#9467bd" draw:marker-end="a908" svg:stroke-opacity="100%" draw:stroke-linejoin="miter" svg:stroke-linecap="butt"/>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0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4">
      <style:graphic-properties style:vertical-pos="middle"/>
    </style:style>
    <style:style style:family="paragraph" style:name="a200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12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b05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2">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3">
      <style:graphic-properties draw:fill="none" draw:stroke="solid" svg:stroke-width="0.02083in" svg:stroke-color="#e97132" svg:stroke-opacity="100%" draw:stroke-linejoin="miter" svg:stroke-linecap="butt"/>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b05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756">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15">
      <style:text-properties fo:font-variant="normal" fo:text-transform="none" fo:color="#0066ff"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draw:fill="none" draw:stroke="dash" draw:stroke-dash="a1757" svg:stroke-width="0.02083in" svg:stroke-color="#a6a6a6" svg:stroke-opacity="100%" draw:stroke-linejoin="miter" svg:stroke-linecap="butt"/>
    </style:style>
    <style:style style:family="graphic" style:name="a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6666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style:vertical-pos="middl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draw:fill="none" draw:stroke="solid" svg:stroke-width="0.08333in" svg:stroke-color="#6666ff" draw:marker-end="a1442" svg:stroke-opacity="100%" draw:stroke-linejoin="miter" svg:stroke-linecap="butt"/>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draw:fill="none" draw:stroke="solid" svg:stroke-width="0.08333in" svg:stroke-color="#6666ff" draw:marker-end="a1444" svg:stroke-opacity="100%" draw:stroke-linejoin="miter" svg:stroke-linecap="butt"/>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draw:fill="none" draw:stroke="solid" svg:stroke-width="0.08333in" svg:stroke-color="#6666ff" draw:marker-end="a1446" svg:stroke-opacity="100%" draw:stroke-linejoin="miter" svg:stroke-linecap="butt"/>
    </style:style>
    <style:style style:family="presentation" style:name="a2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9">
      <style:graphic-properties draw:fill="none" draw:stroke="solid" svg:stroke-width="0.08333in" svg:stroke-color="#6666ff" draw:marker-end="a1448" svg:stroke-opacity="100%" draw:stroke-linejoin="miter" svg:stroke-linecap="butt"/>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draw:fill="none" draw:stroke="solid" svg:stroke-width="0.04167in" svg:stroke-color="#6666ff" draw:marker-end="a1135" svg:stroke-opacity="100%" draw:stroke-linejoin="miter" svg:stroke-linecap="butt"/>
    </style:style>
    <style:style style:family="graphic" style:name="a1761">
      <style:graphic-properties fo:wrap-option="wrap" fo:padding-top="0.05in" fo:padding-bottom="0.05in" fo:padding-left="0.1in" fo:padding-right="0.1in" draw:textarea-vertical-align="middle" draw:textarea-horizontal-align="center" draw:fill="none" draw:stroke="solid" svg:stroke-width="0.02083in" svg:stroke-color="#6666ff" svg:stroke-opacity="100%" draw:stroke-linejoin="miter" svg:stroke-linecap="butt" draw:auto-grow-width="false" draw:auto-grow-height="false"/>
      <style:paragraph-properties style:font-independent-line-spacing="true" style:writing-mode="lr-tb"/>
    </style:style>
    <style:style style:family="text" style:name="a920">
      <style:text-properties fo:font-variant="normal" fo:text-transform="none" fo:color="#6666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2">
      <style:graphic-properties draw:fill="none" draw:stroke="solid" svg:stroke-width="0.04167in" svg:stroke-color="#000000" svg:stroke-opacity="100%" draw:stroke-linejoin="miter" svg:stroke-linecap="butt"/>
    </style:style>
    <style:style style:family="graphic" style:name="a1138">
      <style:graphic-properties draw:fill="none" draw:stroke="solid" svg:stroke-width="0.04167in" svg:stroke-color="#6666ff" draw:marker-end="a1137" svg:stroke-opacity="100%" draw:stroke-linejoin="miter" svg:stroke-linecap="butt"/>
    </style:style>
    <style:style style:family="graphic" style:name="a1763">
      <style:graphic-properties draw:fill="none" draw:stroke="solid" svg:stroke-width="0.04167in" svg:stroke-color="#000000" svg:stroke-opacity="100%" draw:stroke-linejoin="miter" svg:stroke-linecap="butt"/>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23">
      <style:graphic-properties style:vertical-pos="middle"/>
    </style:style>
    <style:style style:family="graphic" style:name="a1765" style:parent-style-name="Graphics">
      <style:graphic-properties draw:fill="none" fo:clip="rect(1.86248in, 0in, 0in, 0in)" draw:stroke="none"/>
    </style:style>
    <style:style style:family="text" style:name="a924">
      <style:text-properties fo:font-variant="normal" fo:text-transform="none" fo:color="#00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6" style:parent-style-name="Graphics">
      <style:graphic-properties draw:fill="none" draw:stroke="non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draw:fill="none" draw:stroke="solid" svg:stroke-width="0.02083in" svg:stroke-color="#e97132" svg:stroke-opacity="100%" draw:stroke-linejoin="miter" svg:stroke-linecap="butt"/>
    </style:style>
    <style:style style:family="graphic" style:name="a9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68">
      <style:graphic-properties draw:fill="none" draw:stroke="solid" svg:stroke-width="0.02083in" svg:stroke-color="#e97132" svg:stroke-opacity="100%" draw:stroke-linejoin="miter" svg:stroke-linecap="butt"/>
    </style:style>
    <style:style style:family="graphic" style:name="a927">
      <style:graphic-properties draw:fill="none" draw:stroke="solid" svg:stroke-width="0.02083in" svg:stroke-color="#e97132" svg:stroke-opacity="100%" draw:stroke-linejoin="miter" svg:stroke-linecap="butt"/>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draw:fill="none" draw:stroke="solid" svg:stroke-width="0.02083in" svg:stroke-color="#e97132" svg:stroke-opacity="100%" draw:stroke-linejoin="miter" svg:stroke-linecap="butt"/>
    </style:style>
    <style:style style:family="graphic" style:name="a929">
      <style:graphic-properties draw:fill="none" draw:stroke="solid" svg:stroke-width="0.02083in" svg:stroke-color="#e97132" svg:stroke-opacity="100%" draw:stroke-linejoin="miter" svg:stroke-linecap="butt"/>
    </style:style>
    <style:style style:family="paragraph" style:name="a2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51">
      <style:graphic-properties draw:fill="none" draw:stroke="solid" svg:stroke-width="0.08333in" svg:stroke-color="#6666ff" draw:marker-end="a1450" svg:stroke-opacity="100%" draw:stroke-linejoin="miter" svg:stroke-linecap="butt"/>
    </style:style>
    <style:style style:family="drawing-page" style:name="a2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3">
      <style:graphic-properties draw:fill="none" draw:stroke="solid" svg:stroke-width="0.08333in" svg:stroke-color="#6666ff" draw:marker-end="a1452" svg:stroke-opacity="100%" draw:stroke-linejoin="miter" svg:stroke-linecap="butt"/>
    </style:style>
    <style:style style:family="graphic" style:name="a1454">
      <style:graphic-properties draw:fill="none" draw:stroke="solid" svg:stroke-width="0.02083in" svg:stroke-color="#000000" svg:stroke-opacity="100%" draw:stroke-linejoin="miter" svg:stroke-linecap="butt"/>
    </style:style>
    <style:style style:family="graphic" style:name="a1455">
      <style:graphic-properties draw:fill="none" draw:stroke="solid" svg:stroke-width="0.02083in" svg:stroke-color="#000000" svg:stroke-opacity="100%" draw:stroke-linejoin="miter" svg:stroke-linecap="butt"/>
    </style:style>
    <style:style style:family="graphic" style:name="a1456">
      <style:graphic-properties draw:fill="none" draw:stroke="solid" svg:stroke-width="0.02083in" svg:stroke-color="#000000" svg:stroke-opacity="100%" draw:stroke-linejoin="miter" svg:stroke-linecap="butt"/>
    </style:style>
    <style:style style:family="graphic" style:name="a1457">
      <style:graphic-properties draw:fill="none" draw:stroke="solid" svg:stroke-width="0.02083in" svg:stroke-color="#000000" svg:stroke-opacity="100%" draw:stroke-linejoin="miter" svg:stroke-linecap="butt"/>
    </style:style>
    <style:style style:family="graphic" style:name="a1458">
      <style:graphic-properties draw:fill="none" draw:stroke="solid" svg:stroke-width="0.02083in" svg:stroke-color="#000000" svg:stroke-opacity="100%" draw:stroke-linejoin="miter" svg:stroke-linecap="butt"/>
    </style:style>
    <style:style style:family="graphic" style:name="a1459">
      <style:graphic-properties draw:fill="none" draw:stroke="solid" svg:stroke-width="0.02083in" svg:stroke-color="#000000" svg:stroke-opacity="100%" draw:stroke-linejoin="miter" svg:stroke-linecap="butt"/>
    </style:style>
    <style:style style:family="paragraph" style:name="a1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1">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147">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e97132"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4">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932">
      <style:text-properties fo:font-variant="normal" fo:text-transform="none" fo:color="#e97132"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5">
      <style:graphic-properties draw:fill="none" draw:stroke="solid" svg:stroke-width="0.02083in" svg:stroke-color="#e97132" svg:stroke-opacity="100%" draw:stroke-linejoin="miter" svg:stroke-linecap="butt"/>
    </style:style>
    <style:style style:family="graphic" style:name="a9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776">
      <style:graphic-properties draw:fill="none" draw:stroke="solid" svg:stroke-width="0.02083in" svg:stroke-color="#e97132" svg:stroke-opacity="100%" draw:stroke-linejoin="miter" svg:stroke-linecap="butt"/>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6">
      <style:graphic-properties draw:fill="none" draw:stroke="solid" svg:stroke-width="0.04167in" svg:stroke-color="#e97132" draw:marker-end="a935" svg:stroke-opacity="100%" draw:stroke-linejoin="miter" svg:stroke-linecap="butt"/>
    </style:style>
    <style:style style:family="paragraph" style:name="a1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b050" svg:stroke-opacity="100%" draw:stroke-linejoin="miter" svg:stroke-linecap="butt" draw:auto-grow-width="false" draw:auto-grow-height="false"/>
      <style:paragraph-properties style:font-independent-line-spacing="true" style:writing-mode="lr-tb"/>
    </style:style>
    <style:style style:family="graphic" style:name="a1460">
      <style:graphic-properties draw:fill="none" draw:stroke="solid" svg:stroke-width="0.02083in" svg:stroke-color="#000000" svg:stroke-opacity="100%" draw:stroke-linejoin="miter" svg:stroke-linecap="butt"/>
    </style:style>
    <style:style style:family="graphic" style:name="a1461">
      <style:graphic-properties draw:fill="none" draw:stroke="solid" svg:stroke-width="0.02083in" svg:stroke-color="#000000" svg:stroke-opacity="100%" draw:stroke-linejoin="miter" svg:stroke-linecap="butt"/>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466">
      <style:graphic-properties draw:fill="none" draw:stroke="solid" svg:stroke-width="0.04167in" svg:stroke-color="#6666ff" draw:marker-end="a1465" svg:stroke-opacity="100%" draw:stroke-linejoin="miter" svg:stroke-linecap="butt"/>
    </style:style>
    <style:style style:family="graphic" style:name="a1468">
      <style:graphic-properties draw:fill="none" draw:stroke="solid" svg:stroke-width="0.04167in" svg:stroke-color="#6666ff" draw:marker-end="a1467" svg:stroke-opacity="100%" draw:stroke-linejoin="miter" svg:stroke-linecap="butt"/>
    </style:style>
    <style:style style:family="graphic" style:name="a11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940">
      <style:text-properties fo:font-variant="normal" fo:text-transform="none" fo:color="#00b05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785">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944">
      <style:graphic-properties draw:fill="none" draw:stroke="solid" svg:stroke-width="0.04167in" svg:stroke-color="#00b050" draw:marker-end="a943" svg:stroke-opacity="100%" draw:stroke-linejoin="miter" svg:stroke-linecap="butt"/>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9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draw:fill="none" draw:stroke="solid" svg:stroke-width="0.02083in" svg:stroke-color="#e97132" svg:stroke-opacity="100%" draw:stroke-linejoin="miter" svg:stroke-linecap="butt"/>
    </style:style>
    <style:style style:family="presentation" style:name="a94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9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0">
      <style:graphic-properties draw:fill="none" draw:stroke="solid" svg:stroke-width="0.04167in" svg:stroke-color="#6666ff" draw:marker-end="a1469" svg:stroke-opacity="100%" draw:stroke-linejoin="miter" svg:stroke-linecap="butt"/>
    </style:style>
    <style:style style:family="graphic" style:name="a1472">
      <style:graphic-properties draw:fill="none" draw:stroke="solid" svg:stroke-width="0.04167in" svg:stroke-color="#6666ff" draw:marker-end="a1471" svg:stroke-opacity="100%" draw:stroke-linejoin="miter" svg:stroke-linecap="butt"/>
    </style:style>
    <style:style style:family="graphic" style:name="a1473">
      <style:graphic-properties draw:fill="none" draw:stroke="solid" svg:stroke-width="0.02083in" svg:stroke-color="#000000" svg:stroke-opacity="100%" draw:stroke-linejoin="miter" svg:stroke-linecap="butt"/>
    </style:style>
    <style:style style:family="graphic" style:name="a1474">
      <style:graphic-properties draw:fill="none" draw:stroke="solid" svg:stroke-width="0.02083in" svg:stroke-color="#000000" svg:stroke-opacity="100%" draw:stroke-linejoin="miter" svg:stroke-linecap="butt"/>
    </style:style>
    <style:style style:family="graphic" style:name="a1475">
      <style:graphic-properties draw:fill="none" draw:stroke="solid" svg:stroke-width="0.02083in" svg:stroke-color="#000000" svg:stroke-opacity="100%" draw:stroke-linejoin="miter" svg:stroke-linecap="butt"/>
    </style:style>
    <style:style style:family="graphic" style:name="a1476">
      <style:graphic-properties draw:fill="none" draw:stroke="solid" svg:stroke-width="0.02083in" svg:stroke-color="#000000" svg:stroke-opacity="100%" draw:stroke-linejoin="miter" svg:stroke-linecap="butt"/>
    </style:style>
    <style:style style:family="graphic" style:name="a1477">
      <style:graphic-properties draw:fill="none" draw:stroke="solid" svg:stroke-width="0.02083in" svg:stroke-color="#000000" svg:stroke-opacity="100%" draw:stroke-linejoin="miter" svg:stroke-linecap="butt"/>
    </style:style>
    <style:style style:family="graphic" style:name="a1478">
      <style:graphic-properties draw:fill="none" draw:stroke="solid" svg:stroke-width="0.02083in" svg:stroke-color="#000000" svg:stroke-opacity="100%" draw:stroke-linejoin="miter" svg:stroke-linecap="butt"/>
    </style:style>
    <style:style style:family="graphic" style:name="a1479">
      <style:graphic-properties draw:fill="none" draw:stroke="solid" svg:stroke-width="0.02083in" svg:stroke-color="#000000" svg:stroke-opacity="100%" draw:stroke-linejoin="miter" svg:stroke-linecap="butt"/>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2">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954">
      <style:text-properties fo:font-variant="normal" fo:text-transform="none" fo:color="#00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6">
      <style:graphic-properties draw:fill="none" draw:stroke="solid" svg:stroke-width="0.02083in" svg:stroke-color="#e97132" svg:stroke-opacity="100%" draw:stroke-linejoin="miter" svg:stroke-linecap="butt"/>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draw:fill="none" draw:stroke="solid" svg:stroke-width="0.02083in" svg:stroke-color="#e97132" svg:stroke-opacity="100%" draw:stroke-linejoin="miter" svg:stroke-linecap="butt"/>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66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draw:fill="none" draw:stroke="solid" svg:stroke-width="0.02083in" svg:stroke-color="#000000" svg:stroke-opacity="100%" draw:stroke-linejoin="miter" svg:stroke-linecap="butt"/>
    </style:style>
    <style:style style:family="drawing-page" style:name="a1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style:vertical-pos="middl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74">
      <style:graphic-properties draw:fill="none" draw:stroke="solid" svg:stroke-width="0.08333in" svg:stroke-color="#6666ff" draw:marker-end="a1173" svg:stroke-opacity="100%" draw:stroke-linejoin="miter" svg:stroke-linecap="butt"/>
    </style:style>
    <style:style style:family="graphic" style:name="a1176">
      <style:graphic-properties draw:fill="none" draw:stroke="solid" svg:stroke-width="0.08333in" svg:stroke-color="#6666ff" draw:marker-end="a1175" svg:stroke-opacity="100%" draw:stroke-linejoin="miter" svg:stroke-linecap="butt"/>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draw:fill="none" draw:stroke="solid" svg:stroke-width="0.08333in" svg:stroke-color="#6666ff" draw:marker-end="a1177" svg:stroke-opacity="100%" draw:stroke-linejoin="miter" svg:stroke-linecap="butt"/>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b05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93" style:parent-style-name="Graphics">
      <style:graphic-properties draw:fill="none" fo:clip="rect(0.53078in, 0.55245in, 0in, 0in)" draw:stroke="none"/>
    </style:style>
    <style:style style:family="drawing-page" style:name="a14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498" style:parent-style-name="Graphics">
      <style:graphic-properties draw:fill="none" draw:stroke="none"/>
    </style:style>
    <style:style style:family="graphic" style:name="a1499" style:parent-style-name="Graphics">
      <style:graphic-properties draw:fill="none" draw:stroke="none"/>
    </style:style>
    <style:style style:family="graphic" style:name="a1180">
      <style:graphic-properties draw:fill="none" draw:stroke="solid" svg:stroke-width="0.08333in" svg:stroke-color="#6666ff" draw:marker-end="a1179" svg:stroke-opacity="100%" draw:stroke-linejoin="miter" svg:stroke-linecap="butt"/>
    </style:style>
    <style:style style:family="graphic" style:name="a1182">
      <style:graphic-properties draw:fill="none" draw:stroke="solid" svg:stroke-width="0.08333in" svg:stroke-color="#6666ff" draw:marker-end="a1181" svg:stroke-opacity="100%" draw:stroke-linejoin="miter" svg:stroke-linecap="butt"/>
    </style:style>
    <style:style style:family="graphic" style:name="a1184">
      <style:graphic-properties draw:fill="none" draw:stroke="solid" svg:stroke-width="0.08333in" svg:stroke-color="#6666ff" draw:marker-end="a1183" svg:stroke-opacity="100%" draw:stroke-linejoin="miter" svg:stroke-linecap="butt"/>
    </style:style>
    <style:style style:family="graphic" style:name="a1186">
      <style:graphic-properties draw:fill="none" draw:stroke="solid" svg:stroke-width="0.04167in" svg:stroke-color="#6666ff" draw:marker-end="a1185" svg:stroke-opacity="100%" draw:stroke-linejoin="miter" svg:stroke-linecap="butt"/>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draw:fill="none" draw:stroke="solid" svg:stroke-width="0.04167in" svg:stroke-color="#6666ff" draw:marker-end="a1187" svg:stroke-opacity="100%" draw:stroke-linejoin="miter" svg:stroke-linecap="butt"/>
    </style:style>
    <style:style style:family="graphic" style:name="a972">
      <style:graphic-properties fo:wrap-option="wrap" fo:padding-top="0.05in" fo:padding-bottom="0.05in" fo:padding-left="0.1in" fo:padding-right="0.1in" draw:textarea-vertical-align="middle" draw:textarea-horizontal-align="center" draw:fill="none" draw:stroke="solid" svg:stroke-width="0.02083in" svg:stroke-color="#9467bd" draw:marker-end="a971" svg:stroke-opacity="100%" draw:stroke-linejoin="miter" svg:stroke-linecap="butt" draw:auto-grow-width="false" draw:auto-grow-height="false"/>
      <style:paragraph-properties style:font-independent-line-spacing="true" style:writing-mode="lr-tb"/>
    </style:style>
    <style:style style:family="graphic" style:name="a973">
      <style:graphic-properties style:vertical-pos="middle"/>
    </style:style>
    <style:style style:family="text" style:name="a974">
      <style:text-properties fo:font-variant="normal" fo:text-transform="none" fo:color="#6666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7">
      <style:text-properties fo:font-variant="normal" fo:text-transform="none" fo:color="#66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b05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0">
      <style:graphic-properties draw:fill="none" draw:stroke="solid" svg:stroke-width="0.04167in" svg:stroke-color="#6666ff" draw:marker-end="a1189" svg:stroke-opacity="100%" draw:stroke-linejoin="miter" svg:stroke-linecap="butt"/>
    </style:style>
    <style:style style:family="graphic" style:name="a1192">
      <style:graphic-properties draw:fill="none" draw:stroke="solid" svg:stroke-width="0.04167in" svg:stroke-color="#6666ff" draw:marker-end="a1191" svg:stroke-opacity="100%" draw:stroke-linejoin="miter" svg:stroke-linecap="butt"/>
    </style:style>
    <style:style style:family="graphic" style:name="a1194">
      <style:graphic-properties draw:fill="none" draw:stroke="solid" svg:stroke-width="0.08333in" svg:stroke-color="#6666ff" draw:marker-end="a1193" svg:stroke-opacity="100%" draw:stroke-linejoin="miter" svg:stroke-linecap="butt"/>
    </style:style>
    <style:style style:family="graphic" style:name="a1196">
      <style:graphic-properties draw:fill="none" draw:stroke="solid" svg:stroke-width="0.08333in" svg:stroke-color="#6666ff" draw:marker-end="a1195" svg:stroke-opacity="100%" draw:stroke-linejoin="miter" svg:stroke-linecap="butt"/>
    </style:style>
    <style:style style:family="text" style:name="a980">
      <style:text-properties fo:font-variant="normal" fo:text-transform="none" fo:color="#00b05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draw:fill="none" draw:stroke="solid" svg:stroke-width="0.08333in" svg:stroke-color="#6666ff" draw:marker-end="a1197" svg:stroke-opacity="100%" draw:stroke-linejoin="miter" svg:stroke-linecap="butt"/>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4">
      <style:text-properties fo:font-variant="normal" fo:text-transform="none" fo:color="#4e95d9"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middle" draw:textarea-horizontal-align="center" draw:fill="solid" draw:fill-color="#4e95d9"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90">
      <style:text-properties fo:font-variant="normal" fo:text-transform="none" fo:color="#66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b05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b05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8888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6a8759"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19" style:parent-style-name="Graphics">
      <style:graphic-properties draw:fill="none" draw:stroke="none"/>
    </style:style>
    <style:style style:family="text" style:name="a1600">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808080"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6897bb"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10">
      <style:text-properties fo:font-variant="normal" fo:text-transform="none" fo:color="#808080"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808080"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middle" draw:textarea-horizontal-align="center" draw:fill="solid" draw:fill-color="#ffffff" draw:opacity="100%" draw:stroke="dash" draw:stroke-dash="a1304"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193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3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808080"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aa492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313">
      <style:graphic-properties draw:fill="none" draw:stroke="solid" svg:stroke-width="0.04167in" svg:stroke-color="#6666ff" draw:marker-end="a1312" svg:stroke-opacity="100%" draw:stroke-linejoin="miter" svg:stroke-linecap="butt"/>
    </style:style>
    <style:style style:family="graphic" style:name="a1315">
      <style:graphic-properties draw:fill="none" draw:stroke="solid" svg:stroke-width="0.04167in" svg:stroke-color="#6666ff" draw:marker-end="a1314" svg:stroke-opacity="100%" draw:stroke-linejoin="miter" svg:stroke-linecap="butt"/>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draw:fill="none" draw:stroke="solid" svg:stroke-width="0.04167in" svg:stroke-color="#6666ff" draw:marker-end="a1316" svg:stroke-opacity="100%" draw:stroke-linejoin="miter" svg:stroke-linecap="butt"/>
    </style:style>
    <style:style style:family="paragraph" style:name="a194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draw:fill="none" draw:stroke="solid" svg:stroke-width="0.04167in" svg:stroke-color="#6666ff" draw:marker-end="a1318" svg:stroke-opacity="100%" draw:stroke-linejoin="miter" svg:stroke-linecap="butt"/>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1">
      <style:graphic-properties fo:wrap-option="wrap" fo:padding-top="0.05in" fo:padding-bottom="0.05in" fo:padding-left="0.1in" fo:padding-right="0.1in" draw:textarea-vertical-align="middle" draw:textarea-horizontal-align="center" draw:fill="none" draw:stroke="dash" draw:stroke-dash="a999" svg:stroke-width="0.02083in" svg:stroke-color="#042433" draw:marker-end="a1000" svg:stroke-opacity="100%" draw:stroke-linejoin="miter" svg:stroke-linecap="butt" draw:auto-grow-width="false" draw:auto-grow-height="false"/>
      <style:paragraph-properties style:font-independent-line-spacing="true" style:writing-mode="lr-tb"/>
    </style:style>
    <style:style style:family="text" style:name="a1002">
      <style:text-properties fo:font-variant="normal" fo:text-transform="none" fo:color="#4e95d9"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7">
      <style:graphic-properties fo:wrap-option="wrap" fo:padding-top="0.05in" fo:padding-bottom="0.05in" fo:padding-left="0.1in" fo:padding-right="0.1in" draw:textarea-vertical-align="middle" draw:textarea-horizontal-align="center" draw:fill="solid" draw:fill-color="#4e95d9"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632">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aa492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808080"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808080"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draw:fill="none" draw:stroke="solid" svg:stroke-width="0.02083in" svg:stroke-color="#000000" svg:stroke-opacity="100%" draw:stroke-linejoin="miter" svg:stroke-linecap="butt"/>
    </style:style>
    <style:style style:family="graphic" style:name="a1321">
      <style:graphic-properties draw:fill="none" draw:stroke="solid" svg:stroke-width="0.02083in" svg:stroke-color="#000000" svg:stroke-opacity="100%" draw:stroke-linejoin="miter" svg:stroke-linecap="butt"/>
    </style:style>
    <style:style style:family="graphic" style:name="a1322">
      <style:graphic-properties draw:fill="none" draw:stroke="solid" svg:stroke-width="0.02083in" svg:stroke-color="#000000" svg:stroke-opacity="100%" draw:stroke-linejoin="miter" svg:stroke-linecap="butt"/>
    </style:style>
    <style:style style:family="graphic" style:name="a1323">
      <style:graphic-properties draw:fill="none" draw:stroke="solid" svg:stroke-width="0.02083in" svg:stroke-color="#000000" svg:stroke-opacity="100%" draw:stroke-linejoin="miter" svg:stroke-linecap="butt"/>
    </style:style>
    <style:style style:family="graphic" style:name="a1324">
      <style:graphic-properties draw:fill="none" draw:stroke="solid" svg:stroke-width="0.02083in" svg:stroke-color="#000000" svg:stroke-opacity="100%" draw:stroke-linejoin="miter" svg:stroke-linecap="butt"/>
    </style:style>
    <style:style style:family="graphic" style:name="a1325">
      <style:graphic-properties draw:fill="none" draw:stroke="solid" svg:stroke-width="0.02083in" svg:stroke-color="#000000" svg:stroke-opacity="100%" draw:stroke-linejoin="miter" svg:stroke-linecap="butt"/>
    </style:style>
    <style:style style:family="paragraph" style:name="a195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draw:fill="none" draw:stroke="solid" svg:stroke-width="0.02083in" svg:stroke-color="#000000" svg:stroke-opacity="100%" draw:stroke-linejoin="miter" svg:stroke-linecap="butt"/>
    </style:style>
    <style:style style:family="graphic" style:name="a1327">
      <style:graphic-properties draw:fill="none" draw:stroke="solid" svg:stroke-width="0.02083in" svg:stroke-color="#000000" svg:stroke-opacity="100%" draw:stroke-linejoin="miter" svg:stroke-linecap="butt"/>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8">
      <style:graphic-properties style:vertical-pos="middl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2">
      <style:graphic-properties fo:wrap-option="wrap" fo:padding-top="0.05in" fo:padding-bottom="0.05in" fo:padding-left="0.1in" fo:padding-right="0.1in" draw:textarea-vertical-align="middle" draw:textarea-horizontal-align="center" draw:fill="none" draw:stroke="dash" draw:stroke-dash="a1010" svg:stroke-width="0.02083in" svg:stroke-color="#042433" draw:marker-end="a1011" svg:stroke-opacity="100%" draw:stroke-linejoin="miter" svg:stroke-linecap="butt" draw:auto-grow-width="false" draw:auto-grow-height="false"/>
      <style:paragraph-properties style:font-independent-line-spacing="true" style:writing-mode="lr-tb"/>
    </style:style>
    <style:style style:family="graphic" style:name="a1013">
      <style:graphic-properties draw:fill="none" draw:stroke="solid" svg:stroke-width="0.02083in" svg:stroke-color="#000000" svg:stroke-opacity="100%" draw:stroke-linejoin="miter" svg:stroke-linecap="butt"/>
    </style:style>
    <style:style style:family="text" style:name="a1014">
      <style:text-properties fo:font-variant="normal" fo:text-transform="none" fo:color="#4e95d9"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1">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7">
      <style:graphic-properties draw:fill="none" draw:stroke="solid" svg:stroke-width="0.02083in" svg:stroke-color="#000000" svg:stroke-opacity="100%" draw:stroke-linejoin="miter" svg:stroke-linecap="butt"/>
    </style:style>
    <style:style style:family="text" style:name="a1642">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808080"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808080"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35">
      <style:drawing-page-properties draw:fill="solid" draw:fill-color="#2b2b2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6" style:parent-style-name="Graphics">
      <style:graphic-properties draw:fill="none" draw:stroke="non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wrap" fo:padding-top="0.05in" fo:padding-bottom="0.05in" fo:padding-left="0.1in" fo:padding-right="0.1in" draw:textarea-vertical-align="middle" draw:textarea-horizontal-align="center" draw:fill="solid" draw:fill-color="#4e95d9"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1">
      <style:drawing-page-properties draw:fill="solid" draw:fill-color="#2b2b2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22" style:parent-style-name="Graphics">
      <style:graphic-properties draw:fill="none" draw:stroke="none"/>
    </style:style>
    <style:style style:family="drawing-page" style:name="a10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51">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54">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34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48" style:parent-style-name="Graphics">
      <style:graphic-properties draw:fill="none" draw:stroke="non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5">
      <style:text-properties fo:font-variant="normal" fo:text-transform="none" fo:color="#6666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style:vertical-pos="middl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7373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6666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6666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6666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6666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88" style:parent-style-name="Graphics">
      <style:graphic-properties draw:fill="none" draw:stroke="non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parent-style-name="Graphics">
      <style:graphic-properties draw:fill="none" draw:stroke="non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5" style:parent-style-name="Graphics">
      <style:graphic-properties draw:fill="none" fo:clip="rect(0in, 0in, 0in, 0in)" draw:stroke="none"/>
    </style:style>
    <style:style style:family="graphic" style:name="a1670">
      <style:graphic-properties style:vertical-pos="middle"/>
    </style:style>
    <style:style style:family="graphic" style:name="a1046" style:parent-style-name="Graphics">
      <style:graphic-properties draw:fill="none" draw:stroke="none"/>
    </style:style>
    <style:style style:family="text" style:name="a1671">
      <style:text-properties fo:font-variant="normal" fo:text-transform="none" fo:color="#0066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wrap" fo:padding-top="0.05in" fo:padding-bottom="0.05in" fo:padding-left="0.1in" fo:padding-right="0.1in" draw:textarea-vertical-align="middle" draw:textarea-horizontal-align="center" draw:fill="solid" draw:fill-color="#8bb8d8" draw:opacity="100%" draw:stroke="none" draw:auto-grow-width="false" draw:auto-grow-height="false"/>
      <style:paragraph-properties style:font-independent-line-spacing="true" style:writing-mode="lr-tb"/>
    </style:style>
    <style:style style:family="text" style:name="a1674">
      <style:text-properties fo:font-variant="normal" fo:text-transform="none" fo:color="#6666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6666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6">
      <style:text-properties fo:font-variant="normal" fo:text-transform="none" fo:color="#6666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6666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6666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6666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6666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90" style:parent-style-name="Graphics">
      <style:graphic-properties draw:fill="none" draw:stroke="non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1">
      <style:graphic-properties draw:fill="none" draw:stroke="solid" svg:stroke-width="0.01389in" svg:stroke-color="#000000" svg:stroke-opacity="100%"/>
    </style:style>
    <style:style style:family="paragraph" style:name="a13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9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5">
      <style:graphic-properties style:vertical-pos="middl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solid" draw:fill-color="#ff9c44" draw:opacity="100%"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4" style:parent-style-name="Graphics">
      <style:graphic-properties draw:fill="none" fo:clip="rect(0.4488in, 0.00013in, 0.38654in, 2.77024in)"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6666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6666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41" style:parent-style-name="Graphics">
      <style:graphic-properties draw:fill="none" draw:stroke="non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2">
      <style:graphic-properties draw:fill="none" draw:stroke="solid" svg:stroke-width="0.01389in" svg:stroke-color="#000000" svg:stroke-opacity="100%"/>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style:vertical-pos="middle"/>
    </style:style>
    <style:style style:family="presentation" style:name="a1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style:vertical-pos="middl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77" style:parent-style-name="Graphics">
      <style:graphic-properties draw:fill="none" fo:clip="rect(0.4488in, 0in, 0.38654in, 0.24301in)" draw:stroke="non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2" style:parent-style-name="Graphics">
      <style:graphic-properties draw:fill="none" fo:clip="rect(0.80621in, 1.24155in, 0.58861in, 1.68976in)" draw:stroke="non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style:vertical-pos="middle"/>
    </style:style>
    <style:style style:family="graphic" style:name="a10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2" style:parent-style-name="Graphics">
      <style:graphic-properties draw:fill="none" draw:stroke="none"/>
    </style:style>
    <style:style style:family="drawing-page" style:name="a10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4" style:parent-style-name="Graphics">
      <style:graphic-properties draw:fill="none" draw:stroke="non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6" style:parent-style-name="Graphics">
      <style:graphic-properties draw:fill="none" draw:stroke="none"/>
    </style:style>
    <style:style style:family="drawing-page" style:name="a10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parent-style-name="Graphics">
      <style:graphic-properties draw:fill="none"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98" style:parent-style-name="Graphics">
      <style:graphic-properties draw:fill="none" fo:clip="rect(0.75505in, 1.3824in, 0.7294in, 1.8048in)" draw:stroke="non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parent-style-name="Graphics">
      <style:graphic-properties draw:fill="none" draw:stroke="none"/>
    </style:style>
    <style:style style:family="drawing-page" style:name="a10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2" style:parent-style-name="Graphics">
      <style:graphic-properties draw:fill="none" draw:stroke="none"/>
    </style:style>
    <style:style style:family="drawing-page" style:name="a10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4" style:parent-style-name="Graphics">
      <style:graphic-properties draw:fill="none" draw:stroke="none"/>
    </style:style>
    <style:style style:family="drawing-page" style:name="a10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78" style:parent-style-name="Graphics">
      <style:graphic-properties draw:fill="none" draw:stroke="non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93" style:parent-style-name="Graphics">
      <style:graphic-properties draw:fill="none" draw:stroke="non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66ff"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6666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style:vertical-pos="middle"/>
    </style:style>
    <style:style style:family="text" style:name="a885">
      <style:text-properties fo:font-variant="normal" fo:text-transform="none" fo:color="#6666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88">
      <style:graphic-properties style:vertical-pos="middle"/>
    </style:style>
    <style:style style:family="text" style:name="a889">
      <style:text-properties fo:font-variant="normal" fo:text-transform="none" fo:color="#00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2">
      <style:graphic-properties draw:fill="none" draw:stroke="solid" svg:stroke-width="0.02083in" svg:stroke-color="#e97132" svg:stroke-opacity="100%" draw:stroke-linejoin="miter" svg:stroke-linecap="butt"/>
    </style:style>
    <style:style style:family="graphic" style:name="a893">
      <style:graphic-properties draw:fill="none" draw:stroke="solid" svg:stroke-width="0.02083in" svg:stroke-color="#e97132" svg:stroke-opacity="100%" draw:stroke-linejoin="miter" svg:stroke-linecap="butt"/>
    </style:style>
    <style:style style:family="graphic" style:name="a894">
      <style:graphic-properties draw:fill="none" draw:stroke="solid" svg:stroke-width="0.02083in" svg:stroke-color="#e97132" svg:stroke-opacity="100%" draw:stroke-linejoin="miter" svg:stroke-linecap="butt"/>
    </style:style>
    <style:style style:family="graphic" style:name="a895" style:parent-style-name="Graphics">
      <style:graphic-properties draw:fill="none" fo:clip="rect(0.47285in, 0.55296in, 0.43238in, 0.66995in)" draw:stroke="none"/>
    </style:style>
    <style:style style:family="text" style:name="a896">
      <style:text-properties fo:font-variant="normal" fo:text-transform="none" fo:color="#e97132"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e97132"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0">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3">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807">
      <style:graphic-properties draw:fill="none" draw:stroke="solid" svg:stroke-width="0.02083in" svg:stroke-color="#e97132" svg:stroke-opacity="100%" draw:stroke-linejoin="miter" svg:stroke-linecap="butt"/>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814">
      <style:graphic-properties draw:fill="none" draw:stroke="solid" svg:stroke-width="0.02083in" svg:stroke-color="#e97132" svg:stroke-opacity="100%" draw:stroke-linejoin="miter" svg:stroke-linecap="butt"/>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819">
      <style:graphic-properties draw:fill="none" draw:stroke="dash" draw:stroke-dash="a1818" svg:stroke-width="0.02083in" svg:stroke-color="#a6a6a6" svg:stroke-opacity="100%" draw:stroke-linejoin="miter" svg:stroke-linecap="butt"/>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07" style:parent-style-name="Graphics">
      <style:graphic-properties draw:fill="none" fo:clip="rect(0.85752in, 1.4976in, 0.33259in, 1.2414in)" draw:stroke="non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826">
      <style:graphic-properties draw:fill="none" draw:stroke="solid" svg:stroke-width="0.02083in" svg:stroke-color="#e97132" svg:stroke-opacity="100%" draw:stroke-linejoin="miter" svg:stroke-linecap="butt"/>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draw:fill="none" draw:stroke="solid" svg:stroke-width="0.08333in" svg:stroke-color="#6666ff" draw:marker-end="a1199" svg:stroke-opacity="100%" draw:stroke-linejoin="miter" svg:stroke-linecap="butt"/>
    </style:style>
    <style:style style:family="graphic" style:name="a1202">
      <style:graphic-properties draw:fill="none" draw:stroke="solid" svg:stroke-width="0.08333in" svg:stroke-color="#6666ff" draw:marker-end="a1201" svg:stroke-opacity="100%" draw:stroke-linejoin="miter" svg:stroke-linecap="butt"/>
    </style:style>
    <style:style style:family="graphic" style:name="a1204">
      <style:graphic-properties draw:fill="none" draw:stroke="solid" svg:stroke-width="0.08333in" svg:stroke-color="#6666ff" draw:marker-end="a1203" svg:stroke-opacity="100%" draw:stroke-linejoin="miter" svg:stroke-linecap="butt"/>
    </style:style>
    <style:style style:family="text" style:name="a18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draw:fill="none" draw:stroke="solid" svg:stroke-width="0.04167in" svg:stroke-color="#6666ff" draw:marker-end="a1205" svg:stroke-opacity="100%" draw:stroke-linejoin="miter" svg:stroke-linecap="butt"/>
    </style:style>
    <style:style style:family="paragraph" style:name="a1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2">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208">
      <style:graphic-properties draw:fill="none" draw:stroke="solid" svg:stroke-width="0.04167in" svg:stroke-color="#6666ff" draw:marker-end="a1207" svg:stroke-opacity="100%" draw:stroke-linejoin="miter" svg:stroke-linecap="butt"/>
    </style:style>
    <style:style style:family="graphic" style:name="a1833">
      <style:graphic-properties draw:fill="none" draw:stroke="solid" svg:stroke-width="0.02083in" svg:stroke-color="#e97132" svg:stroke-opacity="100%" draw:stroke-linejoin="miter" svg:stroke-linecap="butt"/>
    </style:style>
    <style:style style:family="graphic" style:name="a1209">
      <style:graphic-properties draw:fill="none" draw:stroke="solid" svg:stroke-width="0.02083in" svg:stroke-color="#000000" svg:stroke-opacity="100%" draw:stroke-linejoin="miter" svg:stroke-linecap="butt"/>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6">
      <style:graphic-properties fo:wrap-option="wrap" fo:padding-top="0.05in" fo:padding-bottom="0.05in" fo:padding-left="0.1in" fo:padding-right="0.1in" draw:textarea-vertical-align="middle" draw:textarea-horizontal-align="center" draw:fill="solid" draw:fill-color="#a6a6a6"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838">
      <style:graphic-properties draw:fill="none" draw:stroke="dash" draw:stroke-dash="a1837" svg:stroke-width="0.02083in" svg:stroke-color="#a6a6a6" svg:stroke-opacity="100%" draw:stroke-linejoin="miter" svg:stroke-linecap="butt"/>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0">
      <style:graphic-properties draw:fill="none" draw:stroke="solid" svg:stroke-width="0.02083in" svg:stroke-color="#000000" svg:stroke-opacity="100%" draw:stroke-linejoin="miter" svg:stroke-linecap="butt"/>
    </style:style>
    <style:style style:family="graphic" style:name="a1211">
      <style:graphic-properties draw:fill="none" draw:stroke="solid" svg:stroke-width="0.02083in" svg:stroke-color="#000000" svg:stroke-opacity="100%" draw:stroke-linejoin="miter" svg:stroke-linecap="butt"/>
    </style:style>
    <style:style style:family="graphic" style:name="a1212">
      <style:graphic-properties draw:fill="none" draw:stroke="solid" svg:stroke-width="0.02083in" svg:stroke-color="#000000" svg:stroke-opacity="100%" draw:stroke-linejoin="miter" svg:stroke-linecap="butt"/>
    </style:style>
    <style:style style:family="graphic" style:name="a1213">
      <style:graphic-properties draw:fill="none" draw:stroke="solid" svg:stroke-width="0.02083in" svg:stroke-color="#000000" svg:stroke-opacity="100%" draw:stroke-linejoin="miter" svg:stroke-linecap="butt"/>
    </style:style>
    <style:style style:family="graphic" style:name="a1214">
      <style:graphic-properties draw:fill="none" draw:stroke="solid" svg:stroke-width="0.02083in" svg:stroke-color="#000000" svg:stroke-opacity="100%" draw:stroke-linejoin="miter" svg:stroke-linecap="butt"/>
    </style:style>
    <style:style style:family="graphic" style:name="a1215">
      <style:graphic-properties draw:fill="none" draw:stroke="solid" svg:stroke-width="0.02083in" svg:stroke-color="#000000" svg:stroke-opacity="100%" draw:stroke-linejoin="miter" svg:stroke-linecap="butt"/>
    </style:style>
    <style:style style:family="paragraph" style:name="a1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draw:fill="none" draw:stroke="solid" svg:stroke-width="0.02083in" svg:stroke-color="#000000" svg:stroke-opacity="100%" draw:stroke-linejoin="miter" svg:stroke-linecap="butt"/>
    </style:style>
    <style:style style:family="graphic" style:name="a1841">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217">
      <style:graphic-properties draw:fill="none" draw:stroke="solid" svg:stroke-width="0.02083in" svg:stroke-color="#000000" svg:stroke-opacity="100%" draw:stroke-linejoin="miter" svg:stroke-linecap="butt"/>
    </style:style>
    <style:style style:family="drawing-page" style:name="a1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8">
      <style:graphic-properties draw:fill="none" draw:stroke="solid" svg:stroke-width="0.02083in" svg:stroke-color="#000000" svg:stroke-opacity="100%" draw:stroke-linejoin="miter" svg:stroke-linecap="butt"/>
    </style:style>
    <style:style style:family="graphic" style:name="a1843" style:parent-style-name="Graphics">
      <style:graphic-properties draw:fill="none" draw:stroke="none"/>
    </style:style>
    <style:style style:family="graphic" style:name="a1219">
      <style:graphic-properties draw:fill="none" draw:stroke="solid" svg:stroke-width="0.02083in" svg:stroke-color="#000000" svg:stroke-opacity="100%" draw:stroke-linejoin="miter" svg:stroke-linecap="butt"/>
    </style:style>
    <style:style style:family="drawing-page" style:name="a1844">
      <style:drawing-page-properties draw:fill="solid" draw:fill-color="#2b2b2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45">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ffc66d"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37" style:parent-style-name="Graphics">
      <style:graphic-properties draw:fill="none" fo:clip="rect(0.83505in, 1.5168in, 0.3858in, 1.2351in)" draw:stroke="none"/>
    </style:style>
    <style:style style:family="drawing-page" style:name="a1538">
      <style:drawing-page-properties draw:fill="solid" draw:fill-color="#2b2b2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39">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draw:fill="none" draw:stroke="solid" svg:stroke-width="0.02083in" svg:stroke-color="#000000" svg:stroke-opacity="100%" draw:stroke-linejoin="miter" svg:stroke-linecap="butt"/>
    </style:style>
    <style:style style:family="graphic" style:name="a1221">
      <style:graphic-properties draw:fill="none" draw:stroke="solid" svg:stroke-width="0.02083in" svg:stroke-color="#000000" svg:stroke-opacity="100%" draw:stroke-linejoin="miter" svg:stroke-linecap="butt"/>
    </style:style>
    <style:style style:family="graphic" style:name="a1222">
      <style:graphic-properties draw:fill="none" draw:stroke="solid" svg:stroke-width="0.02083in" svg:stroke-color="#000000" svg:stroke-opacity="100%" draw:stroke-linejoin="miter" svg:stroke-linecap="butt"/>
    </style:style>
    <style:style style:family="graphic" style:name="a1223">
      <style:graphic-properties draw:fill="none" draw:stroke="solid" svg:stroke-width="0.02083in" svg:stroke-color="#000000" svg:stroke-opacity="100%" draw:stroke-linejoin="miter" svg:stroke-linecap="butt"/>
    </style:style>
    <style:style style:family="graphic" style:name="a1224">
      <style:graphic-properties draw:fill="none" draw:stroke="solid" svg:stroke-width="0.02083in" svg:stroke-color="#000000" svg:stroke-opacity="100%" draw:stroke-linejoin="miter" svg:stroke-linecap="butt"/>
    </style:style>
    <style:style style:family="graphic" style:name="a1225">
      <style:graphic-properties draw:fill="none" draw:stroke="solid" svg:stroke-width="0.02083in" svg:stroke-color="#000000" svg:stroke-opacity="100%" draw:stroke-linejoin="miter" svg:stroke-linecap="butt"/>
    </style:style>
    <style:style style:family="text" style:name="a1850">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6">
      <style:graphic-properties draw:fill="none" draw:stroke="solid" svg:stroke-width="0.02083in" svg:stroke-color="#000000" svg:stroke-opacity="100%" draw:stroke-linejoin="miter" svg:stroke-linecap="butt"/>
    </style:style>
    <style:style style:family="text" style:name="a1851">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draw:fill="none" draw:stroke="solid" svg:stroke-width="0.02083in" svg:stroke-color="#000000" svg:stroke-opacity="100%" draw:stroke-linejoin="miter" svg:stroke-linecap="butt"/>
    </style:style>
    <style:style style:family="text" style:name="a1852">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8">
      <style:graphic-properties draw:fill="none" draw:stroke="solid" svg:stroke-width="0.02083in" svg:stroke-color="#000000" svg:stroke-opacity="100%" draw:stroke-linejoin="miter" svg:stroke-linecap="butt"/>
    </style:style>
    <style:style style:family="text" style:name="a1853">
      <style:text-properties fo:font-variant="normal" fo:text-transform="none" fo:color="#6897bb"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9">
      <style:graphic-properties draw:fill="none" draw:stroke="solid" svg:stroke-width="0.02083in" svg:stroke-color="#000000" svg:stroke-opacity="100%" draw:stroke-linejoin="miter" svg:stroke-linecap="butt"/>
    </style:style>
    <style:style style:family="text" style:name="a1854">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6897bb"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c66d"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draw:fill="none" draw:stroke="solid" svg:stroke-width="0.02083in" svg:stroke-color="#000000" svg:stroke-opacity="100%" draw:stroke-linejoin="miter" svg:stroke-linecap="butt"/>
    </style:style>
    <style:style style:family="graphic" style:name="a1231">
      <style:graphic-properties draw:fill="none" draw:stroke="solid" svg:stroke-width="0.02083in" svg:stroke-color="#000000" svg:stroke-opacity="100%" draw:stroke-linejoin="miter" svg:stroke-linecap="butt"/>
    </style:style>
    <style:style style:family="graphic" style:name="a1232">
      <style:graphic-properties draw:fill="none" draw:stroke="solid" svg:stroke-width="0.02083in" svg:stroke-color="#000000" svg:stroke-opacity="100%" draw:stroke-linejoin="miter" svg:stroke-linecap="butt"/>
    </style:style>
    <style:style style:family="graphic" style:name="a1233">
      <style:graphic-properties draw:fill="none" draw:stroke="solid" svg:stroke-width="0.02083in" svg:stroke-color="#000000" svg:stroke-opacity="100%" draw:stroke-linejoin="miter" svg:stroke-linecap="butt"/>
    </style:style>
    <style:style style:family="graphic" style:name="a1234">
      <style:graphic-properties draw:fill="none" draw:stroke="solid" svg:stroke-width="0.02083in" svg:stroke-color="#000000" svg:stroke-opacity="100%" draw:stroke-linejoin="miter" svg:stroke-linecap="butt"/>
    </style:style>
    <style:style style:family="graphic" style:name="a1235">
      <style:graphic-properties draw:fill="none" draw:stroke="solid" svg:stroke-width="0.02083in" svg:stroke-color="#000000" svg:stroke-opacity="100%" draw:stroke-linejoin="miter" svg:stroke-linecap="butt"/>
    </style:style>
    <style:style style:family="text" style:name="a1860">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6">
      <style:graphic-properties draw:fill="none" draw:stroke="solid" svg:stroke-width="0.02083in" svg:stroke-color="#000000" svg:stroke-opacity="100%" draw:stroke-linejoin="miter" svg:stroke-linecap="butt"/>
    </style:style>
    <style:style style:family="text" style:name="a1861">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7">
      <style:graphic-properties draw:fill="none" draw:stroke="solid" svg:stroke-width="0.02083in" svg:stroke-color="#000000" svg:stroke-opacity="100%" draw:stroke-linejoin="miter" svg:stroke-linecap="butt"/>
    </style:style>
    <style:style style:family="text" style:name="a1862">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draw:fill="none" draw:stroke="solid" svg:stroke-width="0.02083in" svg:stroke-color="#000000" svg:stroke-opacity="100%" draw:stroke-linejoin="miter" svg:stroke-linecap="butt"/>
    </style:style>
    <style:style style:family="text" style:name="a1863">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9">
      <style:graphic-properties draw:fill="none" draw:stroke="solid" svg:stroke-width="0.02083in" svg:stroke-color="#000000" svg:stroke-opacity="100%" draw:stroke-linejoin="miter" svg:stroke-linecap="butt"/>
    </style:style>
    <style:style style:family="text" style:name="a1864">
      <style:text-properties fo:font-variant="normal" fo:text-transform="none" fo:color="#72737a"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8888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6897bb"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6897bb"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draw:fill="none" draw:stroke="solid" svg:stroke-width="0.02083in" svg:stroke-color="#000000" svg:stroke-opacity="100%" draw:stroke-linejoin="miter" svg:stroke-linecap="butt"/>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66ff" svg:stroke-opacity="100%" draw:stroke-linejoin="miter" svg:stroke-linecap="butt" draw:auto-grow-width="false" draw:auto-grow-height="false"/>
      <style:paragraph-properties style:font-independent-line-spacing="true" style:writing-mode="lr-tb"/>
    </style:style>
    <style:style style:family="text" style:name="a1872">
      <style:text-properties fo:font-variant="normal" fo:text-transform="none" fo:color="#808080"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808080"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808080"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6897bb"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6897bb"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1">
      <style:text-properties fo:font-variant="normal" fo:text-transform="none" fo:color="#66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66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66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82">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e97132"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808080"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66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6a8759"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808080"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6a8759"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6897bb"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e97132"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e97132"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e97132" style:text-line-through-type="none" style:text-line-through-style="none" style:text-line-through-width="auto" style:text-line-through-color="font-color" style:text-position="30% 66.6667%"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e97132"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6897bb"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66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e97132"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cc7832"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94">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a9b7c6" style:text-line-through-type="none" style:text-line-through-style="none" style:text-line-through-width="auto" style:text-line-through-color="font-color" style:text-position="0% 100%" fo:font-family="JetBrains Mon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draw:fill="none" draw:stroke="solid" svg:stroke-width="0.08333in" svg:stroke-color="#6666ff" draw:marker-end="a1270" svg:stroke-opacity="100%" draw:stroke-linejoin="miter" svg:stroke-linecap="butt"/>
    </style:style>
    <style:style style:family="graphic" style:name="a1273">
      <style:graphic-properties draw:fill="none" draw:stroke="solid" svg:stroke-width="0.08333in" svg:stroke-color="#6666ff" draw:marker-end="a1272" svg:stroke-opacity="100%" draw:stroke-linejoin="miter" svg:stroke-linecap="butt"/>
    </style:style>
    <style:style style:family="graphic" style:name="a1275">
      <style:graphic-properties draw:fill="none" draw:stroke="solid" svg:stroke-width="0.08333in" svg:stroke-color="#6666ff" draw:marker-end="a1274" svg:stroke-opacity="100%" draw:stroke-linejoin="miter" svg:stroke-linecap="butt"/>
    </style:style>
    <style:style style:family="graphic" style:name="a1277">
      <style:graphic-properties draw:fill="none" draw:stroke="solid" svg:stroke-width="0.08333in" svg:stroke-color="#6666ff" draw:marker-end="a1276" svg:stroke-opacity="100%" draw:stroke-linejoin="miter" svg:stroke-linecap="butt"/>
    </style:style>
    <style:style style:family="graphic" style:name="a1279">
      <style:graphic-properties draw:fill="none" draw:stroke="solid" svg:stroke-width="0.08333in" svg:stroke-color="#6666ff" draw:marker-end="a1278" svg:stroke-opacity="100%" draw:stroke-linejoin="miter" svg:stroke-linecap="butt"/>
    </style:style>
    <style:style style:family="text" style:name="a1590">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8888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808080"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cc7832"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a9b7c6" style:text-line-through-type="none" style:text-line-through-style="none" style:text-line-through-width="auto" style:text-line-through-color="font-color" style:text-position="0% 100%" fo:font-family="JetBrains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1">
      <style:graphic-properties draw:fill="none" draw:stroke="solid" svg:stroke-width="0.08333in" svg:stroke-color="#6666ff" draw:marker-end="a1280" svg:stroke-opacity="100%" draw:stroke-linejoin="miter" svg:stroke-linecap="butt"/>
    </style:style>
    <style:style style:family="drawing-page" style:name="a12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3">
      <style:graphic-properties style:vertical-pos="middl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95">
      <style:graphic-properties style:vertical-pos="middl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40" draw:style-name="a776" draw:master-page-name="Master1-Layout1-title-Title-Slide" presentation:presentation-page-layout-name="Master1-PPL1" draw:id="Slide-295">
        <draw:frame draw:id="id69" presentation:style-name="a779" draw:name="Title 1" svg:x="1.66667in" svg:y="1.22743in" svg:width="10in" svg:height="2.61111in" presentation:class="title" presentation:placeholder="false">
          <draw:text-box>
            <text:p text:style-name="a778" text:class-names="" text:cond-style-name=""><text:span text:style-name="a777" text:class-names="">Dynamical systems reading group – week 2</text:span></text:p>
          </draw:text-box>
          <svg:title/>
          <svg:desc/>
        </draw:frame>
        <draw:frame draw:id="id70" presentation:style-name="a782" draw:name="Subtitle 2" svg:x="1.66667in" svg:y="5in" svg:width="10in" svg:height="0.75in" presentation:class="subtitle" presentation:placeholder="false">
          <draw:text-box>
            <text:p text:style-name="a781" text:class-names="" text:cond-style-name=""><text:span text:style-name="a780" text:class-names="">Matthew Harvey</text:span></text:p>
          </draw:text-box>
          <svg:title/>
          <svg:desc/>
        </draw:frame>
        <draw:frame draw:id="id71" draw:style-name="a783" draw:name="Picture 102" svg:x="0.30389in" svg:y="6.51111in" svg:width="1.13494in" svg:height="0.81146in" style:rel-width="scale" style:rel-height="scale">
          <draw:image xlink:href="media/image1.png" xlink:type="simple" xlink:show="embed" xlink:actuate="onLoad"/>
          <svg:title/>
          <svg:desc>A black and white image of a mouse

AI-generated content may be incorrect.</svg:desc>
        </draw:frame>
      </draw:page>
      <draw:page draw:name="Slide2" draw:style-name="a784" draw:master-page-name="Master1-Layout2-obj-Title-and-Content" presentation:presentation-page-layout-name="Master1-PPL2" draw:id="Slide-257">
        <draw:frame draw:id="id72" presentation:style-name="a788" draw:name="Title 1" svg:x="0.91667in" svg:y="0.39931in" svg:width="11.5in" svg:height="1.44965in" presentation:class="title" presentation:placeholder="false">
          <draw:text-box>
            <text:p text:style-name="a787" text:class-names="" text:cond-style-name=""><text:span text:style-name="a785" text:class-names="">Week 2: One-Dimensional Flows and Neuronal Excitability<text:line-break/></text:span><text:span text:style-name="a786" text:class-names=""/></text:p>
          </draw:text-box>
          <svg:title/>
          <svg:desc/>
        </draw:frame>
        <draw:frame draw:id="id73" presentation:style-name="a834" draw:name="Content Placeholder 2" svg:x="0.91667in" svg:y="1.99653in" svg:width="9.57796in" svg:height="4.75868in" presentation:class="outline" presentation:placeholder="false">
          <draw:text-box>
            <text:list text:style-name="a792">
              <text:list-item>
                <text:p text:style-name="a791" text:class-names="" text:cond-style-name=""><text:span text:style-name="a789" text:class-names="">●<text:s text:c="1"/></text:span><text:span text:style-name="a790" text:class-names="">Readings:<text:s text:c="1"/></text:span></text:p>
              </text:list-item>
            </text:list>
            <text:list text:style-name="a798">
              <text:list-item>
                <text:p text:style-name="a797" text:class-names="" text:cond-style-name=""><text:span text:style-name="a793" text:class-names="">Strogatz</text:span><text:span text:style-name="a794" text:class-names=""><text:s text:c="1"/>Ch.<text:s text:c="1"/></text:span><text:span text:style-name="a795" text:class-names="">2</text:span><text:span text:style-name="a796" text:class-names=""/></text:p>
              </text:list-item>
            </text:list>
            <text:list text:style-name="a801">
              <text:list-item>
                <text:p text:style-name="a800" text:class-names="" text:cond-style-name=""><text:span text:style-name="a799" text:class-names=""/></text:p>
              </text:list-item>
            </text:list>
            <text:list text:style-name="a806">
              <text:list-item>
                <text:p text:style-name="a805" text:class-names="" text:cond-style-name=""><text:span text:style-name="a802" text:class-names="">●<text:s text:c="1"/></text:span><text:span text:style-name="a803" text:class-names="">Topics:<text:s text:c="1"/></text:span><text:span text:style-name="a804" text:class-names=""/></text:p>
              </text:list-item>
            </text:list>
            <text:list text:style-name="a809">
              <text:list-item>
                <text:p text:style-name="a808" text:class-names="" text:cond-style-name=""><text:span text:style-name="a807" text:class-names="">Recap</text:span></text:p>
              </text:list-item>
            </text:list>
            <text:list text:style-name="a813">
              <text:list-item>
                <text:p text:style-name="a812" text:class-names="" text:cond-style-name=""><text:span text:style-name="a810" text:class-names="">Simulating</text:span><text:span text:style-name="a811" text:class-names=""><text:s text:c="1"/>dynamical systems</text:span></text:p>
              </text:list-item>
            </text:list>
            <text:list text:style-name="a816">
              <text:list-item>
                <text:p text:style-name="a815" text:class-names="" text:cond-style-name=""><text:span text:style-name="a814" text:class-names="">Linear Stability analysis</text:span></text:p>
              </text:list-item>
            </text:list>
            <text:list text:style-name="a823">
              <text:list-item>
                <text:p text:style-name="a822" text:class-names="" text:cond-style-name=""><text:span text:style-name="a817" text:class-names="">The<text:s text:c="1"/></text:span><text:span text:style-name="a818" text:class-names="">Leaky<text:s text:c="1"/></text:span><text:span text:style-name="a819" text:class-names="">Integrate-and-fire<text:s text:c="1"/></text:span><text:span text:style-name="a820" text:class-names="">model</text:span><text:span text:style-name="a821" text:class-names=""/></text:p>
              </text:list-item>
            </text:list>
            <text:list text:style-name="a826">
              <text:list-item>
                <text:p text:style-name="a825" text:class-names="" text:cond-style-name=""><text:span text:style-name="a824" text:class-names=""/></text:p>
              </text:list-item>
            </text:list>
            <text:list text:style-name="a830">
              <text:list-item>
                <text:p text:style-name="a829" text:class-names="" text:cond-style-name=""><text:span text:style-name="a827" text:class-names="">●<text:s text:c="1"/></text:span><text:span text:style-name="a828" text:class-names="">Computational exercise:<text:s text:c="1"/></text:span></text:p>
              </text:list-item>
            </text:list>
            <text:list text:style-name="a833">
              <text:list-item>
                <text:p text:style-name="a832" text:class-names="" text:cond-style-name=""><text:span text:style-name="a831" text:class-names="">Writing a function to find fixed points of a 1D system numerically.</text:span></text:p>
              </text:list-item>
            </text:list>
          </draw:text-box>
          <svg:title/>
          <svg:desc/>
        </draw:frame>
        <draw:frame draw:id="id74" draw:style-name="a840" draw:name="TextBox 3" svg:x="4.3871in" svg:y="1.77369in" svg:width="8.74193in" svg:height="0.77415in">
          <draw:text-box>
            <text:p text:style-name="a836" text:class-names="" text:cond-style-name=""><text:span text:style-name="a835" text:class-names="">Code available:</text:span></text:p>
            <text:p text:style-name="a839" text:class-names="" text:cond-style-name=""><text:span text:style-name="a837" text:class-names="">https://github.com/matt-j-harvey/Dynamical_Systems_Reading_Group</text:span><text:span text:style-name="a838" text:class-names=""/></text:p>
          </draw:text-box>
          <svg:title/>
          <svg:desc/>
        </draw:frame>
        <draw:frame draw:id="id75" draw:style-name="a841" draw:name="Picture 5" svg:x="9.52628in" svg:y="2.8263in" svg:width="2.28555in" svg:height="2.25269in" style:rel-width="scale" style:rel-height="scale">
          <draw:image xlink:href="media/image2.png" xlink:type="simple" xlink:show="embed" xlink:actuate="onLoad"/>
          <svg:title/>
          <svg:desc/>
        </draw:frame>
        <presentation:notes draw:style-name="a873">
          <draw:page-thumbnail draw:page-number="2" svg:x="0.75in" svg:y="1.25in" svg:width="6in" svg:height="3.375in" presentation:class="page" draw:id="id76" presentation:style-name="a842" draw:name="Slide Image Placeholder 1">
            <svg:title/>
            <svg:desc/>
          </draw:page-thumbnail>
          <draw:frame draw:id="id77" presentation:style-name="a869" draw:name="Notes Placeholder 2" svg:x="0.75in" svg:y="4.8125in" svg:width="6in" svg:height="3.9375in" presentation:class="notes" presentation:placeholder="false">
            <draw:text-box>
              <text:p text:style-name="a844" text:class-names="" text:cond-style-name=""><text:span text:style-name="a843" text:class-names=""/></text:p>
              <text:p text:style-name="a848" text:class-names="" text:cond-style-name=""><text:span text:style-name="a845" text:class-names="">Dynamical system:<text:s text:c="1"/></text:span><draw:frame draw:style-name="a846" text:anchor-type="as-char" svg:x="1173.56257in" svg:y="0in" svg:width="1.26028in" svg:height="0.56958in" style:rel-width="scale" style:rel-height="scale"><draw:object xlink:href="Object 1/" xlink:type="simple" xlink:show="embed" xlink:actuate="onLoad"/></draw:frame><text:span text:style-name="a847" text:class-names=""/></text:p>
              <text:p text:style-name="a850" text:class-names="" text:cond-style-name=""><text:span text:style-name="a849" text:class-names="">State [x]</text:span></text:p>
              <text:p text:style-name="a852" text:class-names="" text:cond-style-name=""><text:span text:style-name="a851" text:class-names="">Describe how state evolves over time</text:span></text:p>
              <text:p text:style-name="a854" text:class-names="" text:cond-style-name=""><text:span text:style-name="a853" text:class-names="">The collection of all the possible states are the state space / phase space.</text:span></text:p>
              <text:p text:style-name="a856" text:class-names="" text:cond-style-name=""><text:span text:style-name="a855" text:class-names="">At every state we can calculate the derivative to produce a “vector field / phase portrait” <text:s text:c="1"/>– this can help us understand the behaviour of the system.</text:span></text:p>
              <text:p text:style-name="a860" text:class-names="" text:cond-style-name=""><text:span text:style-name="a857" text:class-names="">At certain<text:s text:c="1"/></text:span><text:span text:style-name="a858" text:class-names="">points</text:span><text:span text:style-name="a859" text:class-names=""><text:s text:c="1"/>the derivative might be 0 – these are “fixed points”</text:span></text:p>
              <text:p text:style-name="a862" text:class-names="" text:cond-style-name=""><text:span text:style-name="a861" text:class-names="">Fixed points can be either “stable” – if nearby states converge to them</text:span></text:p>
              <text:p text:style-name="a864" text:class-names="" text:cond-style-name=""><text:span text:style-name="a863" text:class-names="">“unstable” nearby points are repelled from them.<text:s text:c="1"/></text:span></text:p>
              <text:p text:style-name="a866" text:class-names="" text:cond-style-name=""><text:span text:style-name="a865" text:class-names=""/></text:p>
              <text:p text:style-name="a868" text:class-names="" text:cond-style-name=""><text:span text:style-name="a867" text:class-names=""/></text:p>
            </draw:text-box>
            <svg:title/>
            <svg:desc/>
          </draw:frame>
          <draw:frame draw:id="id78" draw:style-name="a872" draw:name="Slide Number Placeholder 3" svg:x="4.24826in" svg:y="9.49826in" svg:width="3.25in" svg:height="0.50174in">
            <draw:text-box>
              <text:p text:style-name="a871" text:class-names="" text:cond-style-name=""><text:span text:style-name="a870" text:class-names=""><text:page-number style:num-format="1" text:fixed="false"/></text:span></text:p>
            </draw:text-box>
            <svg:title/>
            <svg:desc/>
          </draw:frame>
        </presentation:notes>
      </draw:page>
      <draw:page draw:name="Slide16" draw:style-name="a874" draw:master-page-name="Master1-Layout3-secHead-Section-Header" presentation:presentation-page-layout-name="Master1-PPL3" draw:id="Slide-271">
        <draw:frame draw:id="id79" presentation:style-name="a877" draw:name="Title 1" svg:x="0.56528in" svg:y="1.66979in" svg:width="10.26806in" svg:height="1.18576in" presentation:class="title" presentation:placeholder="false">
          <draw:text-box>
            <text:p text:style-name="a876" text:class-names="" text:cond-style-name=""><text:span text:style-name="a875" text:class-names="">Cheeky recap</text:span></text:p>
          </draw:text-box>
          <svg:title/>
          <svg:desc/>
        </draw:frame>
        <draw:frame draw:id="id80" draw:style-name="a878" draw:name="Graphic 3" svg:x="8.95in" svg:y="3.26667in" svg:width="4.56667in" svg:height="4.56667in" style:rel-width="scale" style:rel-height="scale">
          <draw:image xlink:href="media/image3.svg" xlink:type="simple" xlink:show="embed" xlink:actuate="onLoad"/>
          <svg:title/>
          <svg:desc/>
        </draw:frame>
      </draw:page>
      <draw:page draw:name="Slide13" draw:style-name="a879" draw:master-page-name="Master1-Layout7-blank-Blank" presentation:presentation-page-layout-name="Master1-PPL7" draw:id="Slide-268">
        <draw:frame draw:id="id81" draw:style-name="a882" draw:name="Content Placeholder 2" svg:x="0.40054in" svg:y="0.45117in" svg:width="2.42742in" svg:height="0.48373in">
          <draw:text-box>
            <text:p text:style-name="a881" text:class-names="" text:cond-style-name=""><text:span text:style-name="a880" text:class-names="">Dynamical System</text:span></text:p>
          </draw:text-box>
          <svg:title/>
          <svg:desc/>
        </draw:frame>
        <draw:frame draw:id="id83" draw:style-name="a887" draw:name="TextBox 13" svg:x="0.40054in" svg:y="1.1214in" svg:width="3.24809in" svg:height="0.68271in">
          <draw:text-box>
            <text:p text:style-name="a886" text:class-names="" text:cond-style-name="" text:id="id82"><text:span text:style-name="a883" text:class-names="">Example<text:s text:c="1"/></text:span><draw:frame draw:style-name="a884" text:anchor-type="as-char" svg:x="1173.78146in" svg:y="0in" svg:width="0.82243in" svg:height="0.56958in" style:rel-width="scale" style:rel-height="scale"><draw:object xlink:href="Object 2/" xlink:type="simple" xlink:show="embed" xlink:actuate="onLoad"/></draw:frame><text:span text:style-name="a885" text:class-names=""/></text:p>
          </draw:text-box>
          <svg:title/>
          <svg:desc/>
        </draw:frame>
        <draw:g draw:name="Group 25" draw:id="id84">
          <svg:title/>
          <svg:desc/>
          <draw:g draw:name="Group 14" draw:id="id86">
            <svg:title/>
            <svg:desc/>
            <draw:frame draw:id="id91" draw:style-name="a895" draw:name="Picture 7" svg:x="2.82796in" svg:y="1.52964in" svg:width="6.92471in" svg:height="5.04824in" style:rel-width="scale" style:rel-height="scale">
              <draw:image xlink:href="media/image4.png" xlink:type="simple" xlink:show="embed" xlink:actuate="onLoad"/>
              <svg:title/>
              <svg:desc>A graph of a function

AI-generated content may be incorrect.</svg:desc>
            </draw:frame>
            <draw:g draw:name="Group 2" draw:id="id92">
              <svg:title/>
              <svg:desc/>
              <draw:frame draw:id="id93" draw:style-name="a900" draw:name="TextBox 9" svg:x="8.64785in" svg:y="5.26352in" svg:width="3.16935in" svg:height="0.70684in">
                <draw:text-box>
                  <text:p text:style-name="a897" text:class-names="" text:cond-style-name=""><text:span text:style-name="a896" text:class-names="">State space / phase space</text:span></text:p>
                  <text:p text:style-name="a899" text:class-names="" text:cond-style-name=""><text:span text:style-name="a898" text:class-names="">(real numbers)</text:span></text:p>
                </draw:text-box>
                <svg:title/>
                <svg:desc/>
              </draw:frame>
              <draw:connector draw:type="line" svg:x1="8.60483in" svg:y1="5.30687in" svg:x2="7.99193in" svg:y2="4.823in" draw:id="id94" draw:style-name="a902" draw:name="Straight Arrow Connector 11">
                <svg:title/>
                <svg:desc/>
              </draw:connector>
            </draw:g>
          </draw:g>
          <draw:g draw:name="Group 24" draw:id="id87">
            <svg:title/>
            <svg:desc/>
            <draw:connector draw:type="line" svg:x1="2.56667in" svg:y1="4.2063in" svg:x2="2.56667in" svg:y2="4.6in" draw:id="id88" draw:style-name="a892" draw:name="Straight Connector 16">
              <svg:title/>
              <svg:desc/>
            </draw:connector>
            <draw:connector draw:type="line" svg:x1="10.075in" svg:y1="4.2063in" svg:x2="10.075in" svg:y2="4.6in" draw:id="id89" draw:style-name="a893" draw:name="Straight Connector 18">
              <svg:title/>
              <svg:desc/>
            </draw:connector>
            <draw:connector draw:type="line" svg:x1="2.56667in" svg:y1="4.59167in" svg:x2="10.075in" svg:y2="4.59167in" draw:id="id90" draw:style-name="a894" draw:name="Straight Connector 19">
              <svg:title/>
              <svg:desc/>
            </draw:connector>
          </draw:g>
        </draw:g>
        <draw:frame draw:id="id85" draw:style-name="a891" draw:name="TextBox 27" svg:x="2.3038in" svg:y="0.26468in" svg:width="2.26075in" svg:height="0.67612in">
          <draw:text-box>
            <text:p text:style-name="a890" text:class-names="" text:cond-style-name=""><draw:frame draw:style-name="a888" text:anchor-type="as-char" svg:x="1173.60507in" svg:y="0in" svg:width="1.17521in" svg:height="0.56958in" style:rel-width="scale" style:rel-height="scale"><draw:object xlink:href="Object 3/" xlink:type="simple" xlink:show="embed" xlink:actuate="onLoad"/></draw:frame><text:span text:style-name="a88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8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84" smil:attributeName="visibility" smil:to="visible" smil:begin="0.0s" smil:dur="0.00100000004749745s" smil:fill="hold"/>
                </anim:par>
              </anim:par>
            </anim:par>
          </anim:seq>
        </anim:par>
      </draw:page>
      <draw:page draw:name="Slide11" draw:style-name="a903" draw:master-page-name="Master1-Layout7-blank-Blank" presentation:presentation-page-layout-name="Master1-PPL7" draw:id="Slide-266">
        <draw:frame draw:id="id95" draw:style-name="a904" draw:name="Picture 4" svg:x="2.27437in" svg:y="1.49462in" svg:width="8.18304in" svg:height="5.15076in" style:rel-width="scale" style:rel-height="scale">
          <draw:image xlink:href="media/image5.png" xlink:type="simple" xlink:show="embed" xlink:actuate="onLoad"/>
          <svg:title/>
          <svg:desc>A graph of a function

AI-generated content may be incorrect.</svg:desc>
        </draw:frame>
        <draw:frame draw:id="id96" draw:style-name="a907" draw:name="TextBox 13" svg:x="8.87273in" svg:y="2.56392in" svg:width="3.16935in" svg:height="0.40391in">
          <draw:text-box>
            <text:p text:style-name="a906" text:class-names="" text:cond-style-name=""><text:span text:style-name="a905" text:class-names="">Vector field / phase portrait</text:span></text:p>
          </draw:text-box>
          <svg:title/>
          <svg:desc/>
        </draw:frame>
        <draw:connector draw:type="line" svg:x1="10.08602in" svg:y1="3.04573in" svg:x2="9.82392in" svg:y2="3.83526in" draw:id="id97" draw:style-name="a909" draw:name="Straight Arrow Connector 14">
          <svg:title/>
          <svg:desc/>
        </draw:connector>
        <draw:g draw:name="Group 45" draw:id="id98">
          <svg:title/>
          <svg:desc/>
          <draw:custom-shape svg:x="6.22164in" svg:y="3.96116in" svg:width="0.19685in" svg:height="0.19685in" draw:id="id113" draw:style-name="a939" draw:name="Oval 18">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25" draw:id="id114">
            <svg:title/>
            <svg:desc/>
            <draw:frame draw:id="id115" draw:style-name="a942" draw:name="TextBox 26" svg:x="0.90382in" svg:y="2.25448in" svg:width="3.16935in" svg:height="0.40391in">
              <draw:text-box>
                <text:p text:style-name="a941" text:class-names="" text:cond-style-name=""><text:span text:style-name="a940" text:class-names="">Fixed point (derivative is 0)</text:span></text:p>
              </draw:text-box>
              <svg:title/>
              <svg:desc/>
            </draw:frame>
            <draw:connector draw:type="line" svg:x1="4.07317in" svg:y1="2.45643in" draw:start-shape="id115" draw:start-glue-point="1" svg:x2="6.15in" svg:y2="3.8681in" draw:id="id116" draw:style-name="a944" draw:name="Straight Arrow Connector 27">
              <svg:title/>
              <svg:desc/>
            </draw:connector>
          </draw:g>
        </draw:g>
        <draw:frame draw:id="id101" draw:style-name="a914" draw:name="TextBox 32" svg:x="0.91457in" svg:y="2.67021in" svg:width="3.16935in" svg:height="1.00977in">
          <draw:text-box>
            <text:p text:style-name="a911" text:class-names="" text:cond-style-name="" text:id="id99"><text:span text:style-name="a910" text:class-names="">Unstable</text:span></text:p>
            <text:p text:style-name="a913" text:class-names="" text:cond-style-name="" text:id="id100"><text:span text:style-name="a912" text:class-names="">(nearby points do not converge to it)</text:span></text:p>
          </draw:text-box>
          <svg:title/>
          <svg:desc/>
        </draw:frame>
        <draw:g draw:name="Group 38" draw:id="id102">
          <svg:title/>
          <svg:desc/>
          <draw:g draw:name="Group 9" draw:id="id106">
            <svg:title/>
            <svg:desc/>
            <draw:frame draw:id="id111" draw:style-name="a934" draw:name="TextBox 11" svg:x="8.64785in" svg:y="5.26352in" svg:width="3.16935in" svg:height="0.70684in">
              <draw:text-box>
                <text:p text:style-name="a931" text:class-names="" text:cond-style-name=""><text:span text:style-name="a930" text:class-names="">State space / phase space</text:span></text:p>
                <text:p text:style-name="a933" text:class-names="" text:cond-style-name=""><text:span text:style-name="a932" text:class-names="">(real numbers)</text:span></text:p>
              </draw:text-box>
              <svg:title/>
              <svg:desc/>
            </draw:frame>
            <draw:connector draw:type="line" svg:x1="8.60483in" svg:y1="5.30687in" svg:x2="7.99193in" svg:y2="4.823in" draw:id="id112" draw:style-name="a936" draw:name="Straight Arrow Connector 12">
              <svg:title/>
              <svg:desc/>
            </draw:connector>
          </draw:g>
          <draw:g draw:name="Group 37" draw:id="id107">
            <svg:title/>
            <svg:desc/>
            <draw:connector draw:type="line" svg:x1="2.56667in" svg:y1="4.2063in" svg:x2="2.56667in" svg:y2="4.6in" draw:id="id108" draw:style-name="a927" draw:name="Straight Connector 34">
              <svg:title/>
              <svg:desc/>
            </draw:connector>
            <draw:connector draw:type="line" svg:x1="10.075in" svg:y1="4.2063in" svg:x2="10.075in" svg:y2="4.6in" draw:id="id109" draw:style-name="a928" draw:name="Straight Connector 35">
              <svg:title/>
              <svg:desc/>
            </draw:connector>
            <draw:connector draw:type="line" svg:x1="2.56667in" svg:y1="4.59167in" svg:x2="10.075in" svg:y2="4.59167in" draw:id="id110" draw:style-name="a929" draw:name="Straight Connector 36">
              <svg:title/>
              <svg:desc/>
            </draw:connector>
          </draw:g>
        </draw:g>
        <draw:frame draw:id="id103" draw:style-name="a917" draw:name="Content Placeholder 2" svg:x="0.40054in" svg:y="0.45117in" svg:width="2.42742in" svg:height="0.48373in">
          <draw:text-box>
            <text:p text:style-name="a916" text:class-names="" text:cond-style-name=""><text:span text:style-name="a915" text:class-names="">Dynamical System</text:span></text:p>
          </draw:text-box>
          <svg:title/>
          <svg:desc/>
        </draw:frame>
        <draw:frame draw:id="id104" draw:style-name="a922" draw:name="TextBox 40" svg:x="0.40054in" svg:y="1.1214in" svg:width="3.24809in" svg:height="0.68271in">
          <draw:text-box>
            <text:p text:style-name="a921" text:class-names="" text:cond-style-name=""><text:span text:style-name="a918" text:class-names="">Example<text:s text:c="1"/></text:span><draw:frame draw:style-name="a919" text:anchor-type="as-char" svg:x="1173.78146in" svg:y="0in" svg:width="0.82243in" svg:height="0.56958in" style:rel-width="scale" style:rel-height="scale"><draw:object xlink:href="Object 4/" xlink:type="simple" xlink:show="embed" xlink:actuate="onLoad"/></draw:frame><text:span text:style-name="a920" text:class-names=""/></text:p>
          </draw:text-box>
          <svg:title/>
          <svg:desc/>
        </draw:frame>
        <draw:frame draw:id="id105" draw:style-name="a926" draw:name="TextBox 41" svg:x="2.3038in" svg:y="0.26468in" svg:width="2.26075in" svg:height="0.67612in">
          <draw:text-box>
            <text:p text:style-name="a925" text:class-names="" text:cond-style-name=""><draw:frame draw:style-name="a923" text:anchor-type="as-char" svg:x="1173.60507in" svg:y="0in" svg:width="1.17521in" svg:height="0.56958in" style:rel-width="scale" style:rel-height="scale"><draw:object xlink:href="Object 5/" xlink:type="simple" xlink:show="embed" xlink:actuate="onLoad"/></draw:frame><text:span text:style-name="a92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9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01" smil:attributeName="visibility" smil:to="visible" smil:begin="0.0s" smil:dur="0.00100000004749745s" smil:fill="hold"/>
                </anim:par>
              </anim:par>
            </anim:par>
          </anim:seq>
        </anim:par>
      </draw:page>
      <draw:page draw:name="Slide15" draw:style-name="a945" draw:master-page-name="Master1-Layout3-secHead-Section-Header" presentation:presentation-page-layout-name="Master1-PPL3" draw:id="Slide-270">
        <draw:frame draw:id="id117" presentation:style-name="a948" draw:name="Title 1" svg:x="0.90972in" svg:y="1.86979in" svg:width="11.5in" svg:height="3.11979in" presentation:class="title" presentation:placeholder="false">
          <draw:text-box>
            <text:p text:style-name="a947" text:class-names="" text:cond-style-name=""><text:span text:style-name="a946" text:class-names="">Simulating a dynamical system</text:span></text:p>
          </draw:text-box>
          <svg:title/>
          <svg:desc/>
        </draw:frame>
      </draw:page>
      <draw:page draw:name="Slide8" draw:style-name="a949" draw:master-page-name="Master1-Layout2-obj-Title-and-Content" presentation:presentation-page-layout-name="Master1-PPL2" draw:id="Slide-263">
        <draw:frame draw:id="id118" presentation:style-name="a952" draw:name="Title 1" svg:x="0.91667in" svg:y="0.05522in" svg:width="11.5in" svg:height="1.44965in" presentation:class="title" presentation:placeholder="false">
          <draw:text-box>
            <text:p text:style-name="a951" text:class-names="" text:cond-style-name=""><text:span text:style-name="a950" text:class-names="">Simulating a dynamical system</text:span></text:p>
          </draw:text-box>
          <svg:title/>
          <svg:desc/>
        </draw:frame>
        <draw:frame draw:id="id119" draw:style-name="a968" draw:name="TextBox 3" svg:x="0.83871in" svg:y="1.82695in" svg:width="6.82796in" svg:height="1.91855in">
          <draw:text-box>
            <text:p text:style-name="a955" text:class-names="" text:cond-style-name=""><text:span text:style-name="a953" text:class-names="">1.) Pick an initial<text:s text:c="1"/></text:span><text:span text:style-name="a954" text:class-names="">state</text:span></text:p>
            <text:p text:style-name="a957" text:class-names="" text:cond-style-name=""><text:span text:style-name="a956" text:class-names=""/></text:p>
            <text:p text:style-name="a960" text:class-names="" text:cond-style-name=""><text:span text:style-name="a958" text:class-names="">2.) Calculate the<text:s text:c="1"/></text:span><text:span text:style-name="a959" text:class-names="">derivative</text:span></text:p>
            <text:p text:style-name="a963" text:class-names="" text:cond-style-name=""><text:span text:style-name="a961" text:class-names="">3.) Multiply this derivative by the<text:s text:c="1"/></text:span><text:span text:style-name="a962" text:class-names="">timestep (0.1)</text:span></text:p>
            <text:p text:style-name="a965" text:class-names="" text:cond-style-name=""><text:span text:style-name="a964" text:class-names="">4.) Add the derivative to the current state to get the new state</text:span></text:p>
            <text:p text:style-name="a967" text:class-names="" text:cond-style-name=""><text:span text:style-name="a966" text:class-names="">5.) Repeat step 2 again with the new state!</text:span></text:p>
          </draw:text-box>
          <svg:title/>
          <svg:desc/>
        </draw:frame>
        <draw:custom-shape svg:x="0.40366in" svg:y="2.6625in" svg:width="0.40689in" svg:height="0.86667in" draw:id="id120" draw:style-name="a972" draw:name="Free-form: Shape 5">
          <svg:title/>
          <svg:desc/>
          <text:p text:style-name="a970" text:class-names="" text:cond-style-name=""><text:span text:style-name="a969" text:class-names=""/></text:p>
          <draw:enhanced-geometry xmlns:dr3d="urn:oasis:names:tc:opendocument:xmlns:dr3d:1.0" draw:type="non-primitive" svg:viewBox="0 0 372063 945658" draw:enhanced-path="M ?f3 ?f2 C ?f4 ?f5 ?f6 ?f7 ?f8 ?f9 ?f10 ?f11 ?f12 ?f13 ?f14 ?f15 ?f16 ?f17 ?f18 ?f19 ?f20 ?f21 ?f22 ?f23 ?f24 ?f25 ?f26 ?f27 ?f28 ?f29 ?f30 ?f31 ?f32 ?f33 ?f34 ?f35 ?f36 ?f37 ?f1 ?f0 N" draw:text-areas="?f70 ?f72 ?f71 ?f73" draw:glue-points="?f74 ?f75 ?f76 ?f77 ?f78 ?f79 ?f80 ?f81 ?f82 ?f83 ?f84 ?f85 ?f86 ?f87" draw:glue-point-leaving-directions="-90, -90, -90, -90, -90, -90, -90">
            <draw:equation draw:name="f0" draw:formula="0"/>
            <draw:equation draw:name="f1" draw:formula="372063"/>
            <draw:equation draw:name="f2" draw:formula="945658"/>
            <draw:equation draw:name="f3" draw:formula="354304"/>
            <draw:equation draw:name="f4" draw:formula="281381"/>
            <draw:equation draw:name="f5" draw:formula="917800"/>
            <draw:equation draw:name="f6" draw:formula="198503"/>
            <draw:equation draw:name="f7" draw:formula="870424"/>
            <draw:equation draw:name="f8" draw:formula="155446"/>
            <draw:equation draw:name="f9" draw:formula="824149"/>
            <draw:equation draw:name="f10" draw:formula="112389"/>
            <draw:equation draw:name="f11" draw:formula="777874"/>
            <draw:equation draw:name="f12" draw:formula="76143"/>
            <draw:equation draw:name="f13" draw:formula="733767"/>
            <draw:equation draw:name="f14" draw:formula="50241"/>
            <draw:equation draw:name="f15" draw:formula="678572"/>
            <draw:equation draw:name="f16" draw:formula="24339"/>
            <draw:equation draw:name="f17" draw:formula="623377"/>
            <draw:equation draw:name="f18" draw:formula="998"/>
            <draw:equation draw:name="f19" draw:formula="559156"/>
            <draw:equation draw:name="f20" draw:formula="35"/>
            <draw:equation draw:name="f21" draw:formula="492976"/>
            <draw:equation draw:name="f22" draw:formula="0 - 928"/>
            <draw:equation draw:name="f23" draw:formula="426796"/>
            <draw:equation draw:name="f24" draw:formula="18000"/>
            <draw:equation draw:name="f25" draw:formula="340389"/>
            <draw:equation draw:name="f26" draw:formula="44465"/>
            <draw:equation draw:name="f27" draw:formula="281492"/>
            <draw:equation draw:name="f28" draw:formula="74740"/>
            <draw:equation draw:name="f29" draw:formula="206746"/>
            <draw:equation draw:name="f30" draw:formula="125499"/>
            <draw:equation draw:name="f31" draw:formula="156701"/>
            <draw:equation draw:name="f32" draw:formula="183591"/>
            <draw:equation draw:name="f33" draw:formula="100698"/>
            <draw:equation draw:name="f34" draw:formula="253113"/>
            <draw:equation draw:name="f35" draw:formula="51739"/>
            <draw:equation draw:name="f36" draw:formula="299059"/>
            <draw:equation draw:name="f37" draw:formula="22408"/>
            <draw:equation draw:name="f38" draw:formula="?f2 - ?f0"/>
            <draw:equation draw:name="f39" draw:formula="?f1 - ?f0"/>
            <draw:equation draw:name="f40" draw:formula="?f39 / 372063"/>
            <draw:equation draw:name="f41" draw:formula="?f38 / 945658"/>
            <draw:equation draw:name="f42" draw:formula="354304 * ?f39"/>
            <draw:equation draw:name="f43" draw:formula="945658 * ?f38"/>
            <draw:equation draw:name="f44" draw:formula="155446 * ?f39"/>
            <draw:equation draw:name="f45" draw:formula="824149 * ?f38"/>
            <draw:equation draw:name="f46" draw:formula="50241 * ?f39"/>
            <draw:equation draw:name="f47" draw:formula="678572 * ?f38"/>
            <draw:equation draw:name="f48" draw:formula="35 * ?f39"/>
            <draw:equation draw:name="f49" draw:formula="492976 * ?f38"/>
            <draw:equation draw:name="f50" draw:formula="44465 * ?f39"/>
            <draw:equation draw:name="f51" draw:formula="281492 * ?f38"/>
            <draw:equation draw:name="f52" draw:formula="183591 * ?f39"/>
            <draw:equation draw:name="f53" draw:formula="100698 * ?f38"/>
            <draw:equation draw:name="f54" draw:formula="372063 * ?f39"/>
            <draw:equation draw:name="f55" draw:formula="0 * ?f38"/>
            <draw:equation draw:name="f56" draw:formula="?f42 / 372063"/>
            <draw:equation draw:name="f57" draw:formula="?f43 / 945658"/>
            <draw:equation draw:name="f58" draw:formula="?f44 / 372063"/>
            <draw:equation draw:name="f59" draw:formula="?f45 / 945658"/>
            <draw:equation draw:name="f60" draw:formula="?f46 / 372063"/>
            <draw:equation draw:name="f61" draw:formula="?f47 / 945658"/>
            <draw:equation draw:name="f62" draw:formula="?f48 / 372063"/>
            <draw:equation draw:name="f63" draw:formula="?f49 / 945658"/>
            <draw:equation draw:name="f64" draw:formula="?f50 / 372063"/>
            <draw:equation draw:name="f65" draw:formula="?f51 / 945658"/>
            <draw:equation draw:name="f66" draw:formula="?f52 / 372063"/>
            <draw:equation draw:name="f67" draw:formula="?f53 / 945658"/>
            <draw:equation draw:name="f68" draw:formula="?f54 / 372063"/>
            <draw:equation draw:name="f69" draw:formula="?f55 / 945658"/>
            <draw:equation draw:name="f70" draw:formula="?f0 / ?f40"/>
            <draw:equation draw:name="f71" draw:formula="?f1 / ?f40"/>
            <draw:equation draw:name="f72" draw:formula="?f0 / ?f41"/>
            <draw:equation draw:name="f73" draw:formula="?f2 / ?f41"/>
            <draw:equation draw:name="f74" draw:formula="?f56 / ?f40"/>
            <draw:equation draw:name="f75" draw:formula="?f57 / ?f41"/>
            <draw:equation draw:name="f76" draw:formula="?f58 / ?f40"/>
            <draw:equation draw:name="f77" draw:formula="?f59 / ?f41"/>
            <draw:equation draw:name="f78" draw:formula="?f60 / ?f40"/>
            <draw:equation draw:name="f79" draw:formula="?f61 / ?f41"/>
            <draw:equation draw:name="f80" draw:formula="?f62 / ?f40"/>
            <draw:equation draw:name="f81" draw:formula="?f63 / ?f41"/>
            <draw:equation draw:name="f82" draw:formula="?f64 / ?f40"/>
            <draw:equation draw:name="f83" draw:formula="?f65 / ?f41"/>
            <draw:equation draw:name="f84" draw:formula="?f66 / ?f40"/>
            <draw:equation draw:name="f85" draw:formula="?f67 / ?f41"/>
            <draw:equation draw:name="f86" draw:formula="?f68 / ?f40"/>
            <draw:equation draw:name="f87" draw:formula="?f69 / ?f41"/>
          </draw:enhanced-geometry>
        </draw:custom-shape>
        <draw:frame draw:id="id122" draw:style-name="a976" draw:name="TextBox 15" svg:x="1.28499in" svg:y="5.07192in" svg:width="1.23237in" svg:height="0.67612in">
          <draw:text-box>
            <text:p text:style-name="a975" text:class-names="" text:cond-style-name="" text:id="id121"><draw:frame draw:style-name="a973" text:anchor-type="as-char" svg:x="1173.78146in" svg:y="0in" svg:width="0.82243in" svg:height="0.56958in" style:rel-width="scale" style:rel-height="scale"><draw:object xlink:href="Object 6/" xlink:type="simple" xlink:show="embed" xlink:actuate="onLoad"/></draw:frame><text:span text:style-name="a974" text:class-names=""/></text:p>
          </draw:text-box>
          <svg:title/>
          <svg:desc/>
        </draw:frame>
        <draw:g draw:name="Group 38" draw:id="id123">
          <svg:title/>
          <svg:desc/>
          <draw:connector draw:type="line" svg:x1="4.2259in" svg:y1="5.53968in" svg:x2="4.2259in" svg:y2="5.87275in" draw:id="id135" draw:style-name="a1013" draw:name="Straight Connector 25">
            <svg:title/>
            <svg:desc/>
          </draw:connector>
          <draw:frame draw:id="id136" draw:style-name="a1016" draw:name="TextBox 16" svg:x="4.04481in" svg:y="4.89398in" svg:width="0.33372in" svg:height="0.50488in">
            <draw:text-box>
              <text:p text:style-name="a1015" text:class-names="" text:cond-style-name=""><text:span text:style-name="a1014" text:class-names="">1</text:span></text:p>
            </draw:text-box>
            <svg:title/>
            <svg:desc/>
          </draw:frame>
          <draw:connector draw:type="line" svg:x1="3.81061in" svg:y1="5.53968in" svg:x2="12.57427in" svg:y2="5.55815in" draw:id="id137" draw:style-name="a1017" draw:name="Straight Connector 22">
            <svg:title/>
            <svg:desc/>
          </draw:connector>
          <draw:custom-shape svg:x="4.09258in" svg:y="5.40629in" svg:width="0.26372in" svg:height="0.26372in" draw:id="id138" draw:style-name="a1020" draw:name="Oval 23">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25" draw:style-name="a983" draw:name="TextBox 19" svg:x="5.29943in" svg:y="6.33273in" svg:width="1.59451in" svg:height="0.40391in">
          <draw:text-box>
            <text:p text:style-name="a982" text:class-names="" text:cond-style-name="" text:id="id124"><text:span text:style-name="a977" text:class-names="">1</text:span><text:span text:style-name="a978" text:class-names=""><text:s text:c="1"/></text:span><text:span text:style-name="a979" text:class-names="">x</text:span><text:span text:style-name="a980" text:class-names=""><text:s text:c="1"/>0.1<text:s text:c="1"/></text:span><text:span text:style-name="a981" text:class-names="">= 0.1</text:span></text:p>
          </draw:text-box>
          <svg:title/>
          <svg:desc/>
        </draw:frame>
        <draw:g draw:name="Group 39" draw:id="id126">
          <svg:title/>
          <svg:desc/>
          <draw:frame draw:id="id132" draw:style-name="a1004" draw:name="TextBox 17" svg:x="7.12143in" svg:y="4.87312in" svg:width="0.7614in" svg:height="0.50488in">
            <draw:text-box>
              <text:p text:style-name="a1003" text:class-names="" text:cond-style-name=""><text:span text:style-name="a1002" text:class-names="">1.1</text:span></text:p>
            </draw:text-box>
            <svg:title/>
            <svg:desc/>
          </draw:frame>
          <draw:custom-shape svg:x="7.36949in" svg:y="5.39883in" svg:width="0.26372in" svg:height="0.26372in" draw:id="id133" draw:style-name="a1007" draw:name="Oval 28">
            <svg:title/>
            <svg:desc/>
            <text:p text:style-name="a1006" text:class-names="" text:cond-style-name=""><text:span text:style-name="a10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50233in" svg:y="5.72859in" svg:width="2.81111in" svg:height="0.43118in" draw:id="id134" draw:style-name="a1012" draw:name="Free-form: Shape 34">
            <svg:title/>
            <svg:desc/>
            <text:p text:style-name="a1009" text:class-names="" text:cond-style-name=""><text:span text:style-name="a1008" text:class-names=""/></text:p>
            <draw:enhanced-geometry xmlns:dr3d="urn:oasis:names:tc:opendocument:xmlns:dr3d:1.0" draw:type="non-primitive" svg:viewBox="0 0 2570480 394267" draw:enhanced-path="M ?f0 ?f3 C ?f4 ?f5 ?f6 ?f7 ?f8 ?f9 ?f10 ?f11 ?f12 ?f13 ?f14 ?f15 ?f16 ?f17 ?f18 ?f19 ?f1 ?f0 N" draw:text-areas="?f40 ?f42 ?f41 ?f43" draw:glue-points="?f44 ?f45 ?f46 ?f47 ?f48 ?f49 ?f50 ?f51" draw:glue-point-leaving-directions="-90, -90, -90, -90">
              <draw:equation draw:name="f0" draw:formula="0"/>
              <draw:equation draw:name="f1" draw:formula="2570480"/>
              <draw:equation draw:name="f2" draw:formula="394267"/>
              <draw:equation draw:name="f3" draw:formula="76200"/>
              <draw:equation draw:name="f4" draw:formula="88053"/>
              <draw:equation draw:name="f5" draw:formula="181186"/>
              <draw:equation draw:name="f6" draw:formula="345440"/>
              <draw:equation draw:name="f7" draw:formula="305816"/>
              <draw:equation draw:name="f8" draw:formula="638048"/>
              <draw:equation draw:name="f9" draw:formula="354584"/>
              <draw:equation draw:name="f10" draw:formula="930656"/>
              <draw:equation draw:name="f11" draw:formula="403352"/>
              <draw:equation draw:name="f12" draw:formula="1423755"/>
              <draw:equation draw:name="f13" draw:formula="406061"/>
              <draw:equation draw:name="f14" draw:formula="1755648"/>
              <draw:equation draw:name="f15" draw:formula="368808"/>
              <draw:equation draw:name="f16" draw:formula="2087541"/>
              <draw:equation draw:name="f17" draw:formula="331555"/>
              <draw:equation draw:name="f18" draw:formula="2401146"/>
              <draw:equation draw:name="f19" draw:formula="133773"/>
              <draw:equation draw:name="f20" draw:formula="?f2 - ?f0"/>
              <draw:equation draw:name="f21" draw:formula="?f1 - ?f0"/>
              <draw:equation draw:name="f22" draw:formula="?f21 / 2570480"/>
              <draw:equation draw:name="f23" draw:formula="?f20 / 394267"/>
              <draw:equation draw:name="f24" draw:formula="0 * ?f21"/>
              <draw:equation draw:name="f25" draw:formula="638048 * ?f21"/>
              <draw:equation draw:name="f26" draw:formula="2570480 * ?f21"/>
              <draw:equation draw:name="f27" draw:formula="76200 * ?f20"/>
              <draw:equation draw:name="f28" draw:formula="354584 * ?f20"/>
              <draw:equation draw:name="f29" draw:formula="1755648 * ?f21"/>
              <draw:equation draw:name="f30" draw:formula="368808 * ?f20"/>
              <draw:equation draw:name="f31" draw:formula="0 * ?f20"/>
              <draw:equation draw:name="f32" draw:formula="?f24 / 2570480"/>
              <draw:equation draw:name="f33" draw:formula="?f25 / 2570480"/>
              <draw:equation draw:name="f34" draw:formula="?f26 / 2570480"/>
              <draw:equation draw:name="f35" draw:formula="?f27 / 394267"/>
              <draw:equation draw:name="f36" draw:formula="?f28 / 394267"/>
              <draw:equation draw:name="f37" draw:formula="?f29 / 2570480"/>
              <draw:equation draw:name="f38" draw:formula="?f30 / 394267"/>
              <draw:equation draw:name="f39" draw:formula="?f31 / 394267"/>
              <draw:equation draw:name="f40" draw:formula="?f0 / ?f22"/>
              <draw:equation draw:name="f41" draw:formula="?f1 / ?f22"/>
              <draw:equation draw:name="f42" draw:formula="?f0 / ?f23"/>
              <draw:equation draw:name="f43" draw:formula="?f2 / ?f23"/>
              <draw:equation draw:name="f44" draw:formula="?f32 / ?f22"/>
              <draw:equation draw:name="f45" draw:formula="?f35 / ?f23"/>
              <draw:equation draw:name="f46" draw:formula="?f33 / ?f22"/>
              <draw:equation draw:name="f47" draw:formula="?f36 / ?f23"/>
              <draw:equation draw:name="f48" draw:formula="?f37 / ?f22"/>
              <draw:equation draw:name="f49" draw:formula="?f38 / ?f23"/>
              <draw:equation draw:name="f50" draw:formula="?f34 / ?f22"/>
              <draw:equation draw:name="f51" draw:formula="?f39 / ?f23"/>
            </draw:enhanced-geometry>
          </draw:custom-shape>
        </draw:g>
        <draw:g draw:name="Group 37" draw:id="id127">
          <svg:title/>
          <svg:desc/>
          <draw:frame draw:id="id128" draw:style-name="a986" draw:name="TextBox 18" svg:x="10.55079in" svg:y="4.89114in" svg:width="0.89871in" svg:height="0.50488in">
            <draw:text-box>
              <text:p text:style-name="a985" text:class-names="" text:cond-style-name=""><text:span text:style-name="a984" text:class-names="">1.21</text:span></text:p>
            </draw:text-box>
            <svg:title/>
            <svg:desc/>
          </draw:frame>
          <draw:custom-shape svg:x="10.87543in" svg:y="5.40476in" svg:width="0.26372in" svg:height="0.26372in" draw:id="id129" draw:style-name="a989" draw:name="Oval 29">
            <svg:title/>
            <svg:desc/>
            <text:p text:style-name="a988" text:class-names="" text:cond-style-name=""><text:span text:style-name="a9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30" draw:style-name="a996" draw:name="TextBox 30" svg:x="8.57584in" svg:y="6.33273in" svg:width="1.84461in" svg:height="0.40391in">
            <draw:text-box>
              <text:p text:style-name="a995" text:class-names="" text:cond-style-name=""><text:span text:style-name="a990" text:class-names="">1.1</text:span><text:span text:style-name="a991" text:class-names=""><text:s text:c="1"/></text:span><text:span text:style-name="a992" text:class-names="">x</text:span><text:span text:style-name="a993" text:class-names=""><text:s text:c="1"/>0.1<text:s text:c="1"/></text:span><text:span text:style-name="a994" text:class-names="">= 0.11</text:span></text:p>
            </draw:text-box>
            <svg:title/>
            <svg:desc/>
          </draw:frame>
          <draw:custom-shape svg:x="7.89394in" svg:y="5.70622in" svg:width="2.81111in" svg:height="0.43118in" draw:id="id131" draw:style-name="a1001" draw:name="Free-form: Shape 35">
            <svg:title/>
            <svg:desc/>
            <text:p text:style-name="a998" text:class-names="" text:cond-style-name=""><text:span text:style-name="a997" text:class-names=""/></text:p>
            <draw:enhanced-geometry xmlns:dr3d="urn:oasis:names:tc:opendocument:xmlns:dr3d:1.0" draw:type="non-primitive" svg:viewBox="0 0 2570480 394267" draw:enhanced-path="M ?f0 ?f3 C ?f4 ?f5 ?f6 ?f7 ?f8 ?f9 ?f10 ?f11 ?f12 ?f13 ?f14 ?f15 ?f16 ?f17 ?f18 ?f19 ?f1 ?f0 N" draw:text-areas="?f40 ?f42 ?f41 ?f43" draw:glue-points="?f44 ?f45 ?f46 ?f47 ?f48 ?f49 ?f50 ?f51" draw:glue-point-leaving-directions="-90, -90, -90, -90">
              <draw:equation draw:name="f0" draw:formula="0"/>
              <draw:equation draw:name="f1" draw:formula="2570480"/>
              <draw:equation draw:name="f2" draw:formula="394267"/>
              <draw:equation draw:name="f3" draw:formula="76200"/>
              <draw:equation draw:name="f4" draw:formula="88053"/>
              <draw:equation draw:name="f5" draw:formula="181186"/>
              <draw:equation draw:name="f6" draw:formula="345440"/>
              <draw:equation draw:name="f7" draw:formula="305816"/>
              <draw:equation draw:name="f8" draw:formula="638048"/>
              <draw:equation draw:name="f9" draw:formula="354584"/>
              <draw:equation draw:name="f10" draw:formula="930656"/>
              <draw:equation draw:name="f11" draw:formula="403352"/>
              <draw:equation draw:name="f12" draw:formula="1423755"/>
              <draw:equation draw:name="f13" draw:formula="406061"/>
              <draw:equation draw:name="f14" draw:formula="1755648"/>
              <draw:equation draw:name="f15" draw:formula="368808"/>
              <draw:equation draw:name="f16" draw:formula="2087541"/>
              <draw:equation draw:name="f17" draw:formula="331555"/>
              <draw:equation draw:name="f18" draw:formula="2401146"/>
              <draw:equation draw:name="f19" draw:formula="133773"/>
              <draw:equation draw:name="f20" draw:formula="?f2 - ?f0"/>
              <draw:equation draw:name="f21" draw:formula="?f1 - ?f0"/>
              <draw:equation draw:name="f22" draw:formula="?f21 / 2570480"/>
              <draw:equation draw:name="f23" draw:formula="?f20 / 394267"/>
              <draw:equation draw:name="f24" draw:formula="0 * ?f21"/>
              <draw:equation draw:name="f25" draw:formula="638048 * ?f21"/>
              <draw:equation draw:name="f26" draw:formula="2570480 * ?f21"/>
              <draw:equation draw:name="f27" draw:formula="76200 * ?f20"/>
              <draw:equation draw:name="f28" draw:formula="354584 * ?f20"/>
              <draw:equation draw:name="f29" draw:formula="1755648 * ?f21"/>
              <draw:equation draw:name="f30" draw:formula="368808 * ?f20"/>
              <draw:equation draw:name="f31" draw:formula="0 * ?f20"/>
              <draw:equation draw:name="f32" draw:formula="?f24 / 2570480"/>
              <draw:equation draw:name="f33" draw:formula="?f25 / 2570480"/>
              <draw:equation draw:name="f34" draw:formula="?f26 / 2570480"/>
              <draw:equation draw:name="f35" draw:formula="?f27 / 394267"/>
              <draw:equation draw:name="f36" draw:formula="?f28 / 394267"/>
              <draw:equation draw:name="f37" draw:formula="?f29 / 2570480"/>
              <draw:equation draw:name="f38" draw:formula="?f30 / 394267"/>
              <draw:equation draw:name="f39" draw:formula="?f31 / 394267"/>
              <draw:equation draw:name="f40" draw:formula="?f0 / ?f22"/>
              <draw:equation draw:name="f41" draw:formula="?f1 / ?f22"/>
              <draw:equation draw:name="f42" draw:formula="?f0 / ?f23"/>
              <draw:equation draw:name="f43" draw:formula="?f2 / ?f23"/>
              <draw:equation draw:name="f44" draw:formula="?f32 / ?f22"/>
              <draw:equation draw:name="f45" draw:formula="?f35 / ?f23"/>
              <draw:equation draw:name="f46" draw:formula="?f33 / ?f22"/>
              <draw:equation draw:name="f47" draw:formula="?f36 / ?f23"/>
              <draw:equation draw:name="f48" draw:formula="?f37 / ?f22"/>
              <draw:equation draw:name="f49" draw:formula="?f38 / ?f23"/>
              <draw:equation draw:name="f50" draw:formula="?f34 / ?f22"/>
              <draw:equation draw:name="f51" draw:formula="?f39 / ?f23"/>
            </draw:enhanced-geometry>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2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2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2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2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27" smil:attributeName="visibility" smil:to="visible" smil:begin="0.0s" smil:dur="0.00100000004749745s" smil:fill="hold"/>
                </anim:par>
              </anim:par>
            </anim:par>
          </anim:seq>
        </anim:par>
      </draw:page>
      <draw:page draw:name="Slide54" draw:style-name="a1021" draw:master-page-name="Master1-Layout7-blank-Blank" presentation:presentation-page-layout-name="Master1-PPL7" draw:id="Slide-309">
        <draw:frame draw:id="id139" draw:style-name="a1022" draw:name="Picture 2" svg:x="0.51228in" svg:y="0.65034in" svg:width="12.30878in" svg:height="6.19931in" style:rel-width="scale" style:rel-height="scale">
          <draw:image xlink:href="media/image6.png" xlink:type="simple" xlink:show="embed" xlink:actuate="onLoad"/>
          <svg:title/>
          <svg:desc/>
        </draw:frame>
      </draw:page>
      <draw:page draw:name="Slide20" draw:style-name="a1023" draw:master-page-name="Master1-Layout2-obj-Title-and-Content" presentation:presentation-page-layout-name="Master1-PPL2" draw:id="Slide-275">
        <draw:frame draw:id="id140" draw:style-name="a1026" draw:name="TextBox 3" svg:x="0.87097in" svg:y="2.82488in" svg:width="1.76136in" svg:height="0.40391in">
          <draw:text-box>
            <text:p text:style-name="a1025" text:class-names="" text:cond-style-name=""><text:span text:style-name="a1024" text:class-names="">10 steps of 1s</text:span></text:p>
          </draw:text-box>
          <svg:title/>
          <svg:desc/>
        </draw:frame>
        <draw:frame draw:id="id141" draw:style-name="a1029" draw:name="TextBox 4" svg:x="0.87831in" svg:y="3.47261in" svg:width="2.27651in" svg:height="0.40391in">
          <draw:text-box>
            <text:p text:style-name="a1028" text:class-names="" text:cond-style-name=""><text:span text:style-name="a1027" text:class-names="">100 steps of 0.1s</text:span></text:p>
          </draw:text-box>
          <svg:title/>
          <svg:desc/>
        </draw:frame>
        <draw:frame draw:id="id142" draw:style-name="a1034" draw:name="TextBox 6" svg:x="0.16193in" svg:y="1.80398in" svg:width="2.91761in" svg:height="0.70684in">
          <draw:text-box>
            <text:p text:style-name="a1031" text:class-names="" text:cond-style-name=""><text:span text:style-name="a1030" text:class-names="">Start at 1</text:span></text:p>
            <text:p text:style-name="a1033" text:class-names="" text:cond-style-name=""><text:span text:style-name="a1032" text:class-names="">Simulate for 10 Seconds</text:span></text:p>
          </draw:text-box>
          <svg:title/>
          <svg:desc/>
        </draw:frame>
        <draw:g draw:name="Group 12" draw:id="id143">
          <svg:title/>
          <svg:desc/>
          <draw:frame draw:id="id149" draw:style-name="a1046" draw:name="Picture 8" svg:x="3.33333in" svg:y="0in" svg:width="10in" svg:height="7.5in" style:rel-width="scale" style:rel-height="scale">
            <draw:image xlink:href="media/image7.png" xlink:type="simple" xlink:show="embed" xlink:actuate="onLoad"/>
            <svg:title/>
            <svg:desc>A graph with orange and blue dots

AI-generated content may be incorrect.</svg:desc>
          </draw:frame>
          <draw:custom-shape svg:x="0.47727in" svg:y="2.81541in" svg:width="0.3937in" svg:height="0.3937in" draw:id="id150" draw:style-name="a1049" draw:name="Rectangle 9">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custom-shape svg:x="0.47727in" svg:y="3.46314in" svg:width="0.3937in" svg:height="0.3937in" draw:id="id151" draw:style-name="a1052" draw:name="Rectangle 10">
            <svg:title/>
            <svg:desc/>
            <text:p text:style-name="a1051" text:class-names="" text:cond-style-name=""><text:span text:style-name="a1050" text:class-names=""/></text:p>
            <draw:enhanced-geometry xmlns:dr3d="urn:oasis:names:tc:opendocument:xmlns:dr3d:1.0" draw:type="non-primitive" svg:viewBox="0 0 21600 21600" draw:enhanced-path="M 0 0 L 21600 0 21600 21600 0 21600 Z N"/>
          </draw:custom-shape>
        </draw:g>
        <draw:g draw:name="Group 13" draw:id="id144">
          <svg:title/>
          <svg:desc/>
          <draw:frame draw:id="id147" draw:style-name="a1044" draw:name="TextBox 11" svg:x="0.36553in" svg:y="6.28807in" svg:width="3.07955in" svg:height="0.40391in">
            <draw:text-box>
              <text:p text:style-name="a1043" text:class-names="" text:cond-style-name=""><text:span text:style-name="a1042" text:class-names="">What on earth is going on?</text:span></text:p>
            </draw:text-box>
            <svg:title/>
            <svg:desc/>
          </draw:frame>
          <draw:frame draw:id="id148" draw:style-name="a1045" draw:name="Picture 2" svg:x="0.47727in" svg:y="4.1693in" svg:width="2.85606in" svg:height="1.6983in" style:rel-width="scale" style:rel-height="scale">
            <draw:image xlink:href="media/image8.jpeg" xlink:type="simple" xlink:show="embed" xlink:actuate="onLoad"/>
            <svg:title/>
            <svg:desc>Oh no Meme Generator - Piñata Farms - The best meme generator and meme  maker for video &amp; image memes</svg:desc>
          </draw:frame>
        </draw:g>
        <draw:frame draw:id="id145" draw:style-name="a1037" draw:name="TextBox 14" svg:x="0.16193in" svg:y="0.23958in" svg:width="4.94318in" svg:height="0.50488in">
          <draw:text-box>
            <text:p text:style-name="a1036" text:class-names="" text:cond-style-name=""><text:span text:style-name="a1035" text:class-names="">Why do we need a timestep?</text:span></text:p>
          </draw:text-box>
          <svg:title/>
          <svg:desc/>
        </draw:frame>
        <draw:frame draw:id="id146" draw:style-name="a1041" draw:name="TextBox 15" svg:x="1.28911in" svg:y="0.86347in" svg:width="1.23237in" svg:height="0.67612in">
          <draw:text-box>
            <text:p text:style-name="a1040" text:class-names="" text:cond-style-name=""><draw:frame draw:style-name="a1038" text:anchor-type="as-char" svg:x="1173.78146in" svg:y="0in" svg:width="0.82243in" svg:height="0.56958in" style:rel-width="scale" style:rel-height="scale"><draw:object xlink:href="Object 7/" xlink:type="simple" xlink:show="embed" xlink:actuate="onLoad"/></draw:frame><text:span text:style-name="a103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4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4" smil:attributeName="visibility" smil:to="visible" smil:begin="0.0s" smil:dur="0.00100000004749745s" smil:fill="hold"/>
                </anim:par>
              </anim:par>
            </anim:par>
          </anim:seq>
        </anim:par>
      </draw:page>
      <draw:page draw:name="Slide21" draw:style-name="a1053" draw:master-page-name="Master1-Layout7-blank-Blank" presentation:presentation-page-layout-name="Master1-PPL7" draw:id="Slide-276">
        <draw:frame draw:id="id152" draw:style-name="a1054" draw:name="Picture 1" svg:x="1.51163in" svg:y="0.44532in" svg:width="6.48856in" svg:height="6.92803in" style:rel-width="scale" style:rel-height="scale">
          <draw:image xlink:href="media/image5.png" xlink:type="simple" xlink:show="embed" xlink:actuate="onLoad"/>
          <svg:title/>
          <svg:desc>A graph of a function

AI-generated content may be incorrect.</svg:desc>
        </draw:frame>
        <draw:frame draw:id="id153" draw:style-name="a1070" draw:name="TextBox 2" svg:x="3.48864in" svg:y="1.19962in" svg:width="9.32955in" svg:height="1.61563in">
          <draw:text-box>
            <text:p text:style-name="a1056" text:class-names="" text:cond-style-name=""><text:span text:style-name="a1055" text:class-names="">When we simulate iteratively, each iteration we “jump” by the timestep</text:span></text:p>
            <text:p text:style-name="a1058" text:class-names="" text:cond-style-name=""><text:span text:style-name="a1057" text:class-names=""/></text:p>
            <text:p text:style-name="a1065" text:class-names="" text:cond-style-name=""><text:span text:style-name="a1059" text:class-names="">However,<text:s text:c="1"/></text:span><text:span text:style-name="a1060" text:class-names="">in reality the</text:span><text:span text:style-name="a1061" text:class-names=""><text:s text:c="1"/>derivative<text:s text:c="1"/></text:span><text:span text:style-name="a1062" text:class-names="">may be</text:span><text:span text:style-name="a1063" text:class-names=""><text:s text:c="1"/></text:span><text:span text:style-name="a1064" text:class-names="">changing continuously over this period</text:span></text:p>
            <text:p text:style-name="a1067" text:class-names="" text:cond-style-name=""><text:span text:style-name="a1066" text:class-names=""/></text:p>
            <text:p text:style-name="a1069" text:class-names="" text:cond-style-name=""><text:span text:style-name="a1068" text:class-names="">If we have a timestep which is too big – our simulation will be inaccurate<text:s text:c="1"/></text:span></text:p>
          </draw:text-box>
          <svg:title/>
          <svg:desc/>
        </draw:frame>
      </draw:page>
      <draw:page draw:name="Slide23" draw:style-name="a1071" draw:master-page-name="Master1-Layout7-blank-Blank" presentation:presentation-page-layout-name="Master1-PPL7" draw:id="Slide-278">
        <draw:frame draw:id="id154" draw:style-name="a1072" draw:name="Picture 2" svg:x="1.67979in" svg:y="0.00984in" svg:width="9.97375in" svg:height="7.48031in" style:rel-width="scale" style:rel-height="scale">
          <draw:image xlink:href="media/image9.png" xlink:type="simple" xlink:show="embed" xlink:actuate="onLoad"/>
          <svg:title/>
          <svg:desc>A graph with a line

AI-generated content may be incorrect.</svg:desc>
        </draw:frame>
      </draw:page>
      <draw:page draw:name="Slide25" draw:style-name="a1073" draw:master-page-name="Master1-Layout7-blank-Blank" presentation:presentation-page-layout-name="Master1-PPL7" draw:id="Slide-280">
        <draw:frame draw:id="id155" draw:style-name="a1074" draw:name="Picture 4" svg:x="1.67979in" svg:y="0.01136in" svg:width="9.97375in" svg:height="7.48031in" style:rel-width="scale" style:rel-height="scale">
          <draw:image xlink:href="media/image10.png" xlink:type="simple" xlink:show="embed" xlink:actuate="onLoad"/>
          <svg:title/>
          <svg:desc>A graph with a line

AI-generated content may be incorrect.</svg:desc>
        </draw:frame>
      </draw:page>
      <draw:page draw:name="Slide26" draw:style-name="a1075" draw:master-page-name="Master1-Layout7-blank-Blank" presentation:presentation-page-layout-name="Master1-PPL7" draw:id="Slide-281">
        <draw:frame draw:id="id156" draw:style-name="a1076" draw:name="Picture 6" svg:x="1.67979in" svg:y="0.00832in" svg:width="9.97375in" svg:height="7.48031in" style:rel-width="scale" style:rel-height="scale">
          <draw:image xlink:href="media/image11.png" xlink:type="simple" xlink:show="embed" xlink:actuate="onLoad"/>
          <svg:title/>
          <svg:desc>A graph of a number of objects

AI-generated content may be incorrect.</svg:desc>
        </draw:frame>
      </draw:page>
      <draw:page draw:name="Slide27" draw:style-name="a1077" draw:master-page-name="Master1-Layout7-blank-Blank" presentation:presentation-page-layout-name="Master1-PPL7" draw:id="Slide-282">
        <draw:frame draw:id="id157" draw:style-name="a1078" draw:name="Picture 8" svg:x="1.67979in" svg:y="0in" svg:width="9.97375in" svg:height="7.48031in" style:rel-width="scale" style:rel-height="scale">
          <draw:image xlink:href="media/image12.png" xlink:type="simple" xlink:show="embed" xlink:actuate="onLoad"/>
          <svg:title/>
          <svg:desc>A graph of a number of objects

AI-generated content may be incorrect.</svg:desc>
        </draw:frame>
      </draw:page>
      <draw:page draw:name="Slide28" draw:style-name="a1079" draw:master-page-name="Master1-Layout7-blank-Blank" presentation:presentation-page-layout-name="Master1-PPL7" draw:id="Slide-283">
        <draw:frame draw:id="id158" draw:style-name="a1080" draw:name="Picture 10" svg:x="1.67979in" svg:y="0in" svg:width="9.97375in" svg:height="7.48031in" style:rel-width="scale" style:rel-height="scale">
          <draw:image xlink:href="media/image13.png" xlink:type="simple" xlink:show="embed" xlink:actuate="onLoad"/>
          <svg:title/>
          <svg:desc>A graph of a number of objects

AI-generated content may be incorrect.</svg:desc>
        </draw:frame>
      </draw:page>
      <draw:page draw:name="Slide29" draw:style-name="a1081" draw:master-page-name="Master1-Layout7-blank-Blank" presentation:presentation-page-layout-name="Master1-PPL7" draw:id="Slide-284">
        <draw:frame draw:id="id159" draw:style-name="a1082" draw:name="Picture 12" svg:x="1.67979in" svg:y="0in" svg:width="9.97375in" svg:height="7.48031in" style:rel-width="scale" style:rel-height="scale">
          <draw:image xlink:href="media/image14.png" xlink:type="simple" xlink:show="embed" xlink:actuate="onLoad"/>
          <svg:title/>
          <svg:desc>A graph of a number of objects

AI-generated content may be incorrect.</svg:desc>
        </draw:frame>
      </draw:page>
      <draw:page draw:name="Slide30" draw:style-name="a1083" draw:master-page-name="Master1-Layout7-blank-Blank" presentation:presentation-page-layout-name="Master1-PPL7" draw:id="Slide-285">
        <draw:frame draw:id="id160" draw:style-name="a1084" draw:name="Picture 2" svg:x="1.67979in" svg:y="0in" svg:width="9.97375in" svg:height="7.48031in" style:rel-width="scale" style:rel-height="scale">
          <draw:image xlink:href="media/image15.png" xlink:type="simple" xlink:show="embed" xlink:actuate="onLoad"/>
          <svg:title/>
          <svg:desc>A graph of a number of objects

AI-generated content may be incorrect.</svg:desc>
        </draw:frame>
      </draw:page>
      <draw:page draw:name="Slide31" draw:style-name="a1085" draw:master-page-name="Master1-Layout2-obj-Title-and-Content" presentation:presentation-page-layout-name="Master1-PPL2" draw:id="Slide-286">
        <draw:frame draw:id="id161" presentation:style-name="a1092" draw:name="Content Placeholder 2" svg:x="0.91667in" svg:y="0.74479in" svg:width="11.5in" svg:height="1.06632in" presentation:class="outline" presentation:placeholder="false">
          <draw:text-box>
            <text:list text:style-name="a1088">
              <text:list-item>
                <text:p text:style-name="a1087" text:class-names="" text:cond-style-name=""><text:span text:style-name="a1086" text:class-names="">If the timestep is small enough, the simulation results will be a good approximation of the truth</text:span></text:p>
              </text:list-item>
            </text:list>
            <text:list text:style-name="a1091">
              <text:list-item>
                <text:p text:style-name="a1090" text:class-names="" text:cond-style-name=""><text:span text:style-name="a1089" text:class-names=""/></text:p>
              </text:list-item>
            </text:list>
          </draw:text-box>
          <svg:title/>
          <svg:desc/>
        </draw:frame>
        <draw:frame draw:id="id162" draw:style-name="a1093" draw:name="Picture 4" svg:x="4.79545in" svg:y="4.0092in" svg:width="7.72185in" svg:height="1.56247in" style:rel-width="scale" style:rel-height="scale">
          <draw:image xlink:href="media/image16.png" xlink:type="simple" xlink:show="embed" xlink:actuate="onLoad"/>
          <svg:title/>
          <svg:desc>A black and pink rectangle with black lines

AI-generated content may be incorrect.</svg:desc>
        </draw:frame>
        <draw:frame draw:id="id165" draw:style-name="a1098" draw:name="TextBox 3" svg:x="0.61566in" svg:y="5.77059in" svg:width="12.58712in" svg:height="0.70684in">
          <draw:text-box>
            <text:p text:style-name="a1095" text:class-names="" text:cond-style-name="" text:id="id163"><text:span text:style-name="a1094" text:class-names="">Computers cannot represent numbers with arbitrary precision – they can only go up to so many decimal points</text:span></text:p>
            <text:p text:style-name="a1097" text:class-names="" text:cond-style-name="" text:id="id164"><text:span text:style-name="a1096" text:class-names="">If the change is extremely small – the computer will start making errors representing these number.<text:s text:c="1"/></text:span></text:p>
          </draw:text-box>
          <svg:title/>
          <svg:desc/>
        </draw:frame>
        <draw:frame draw:id="id167" draw:style-name="a1103" draw:name="TextBox 5" svg:x="0.91667in" svg:y="2.62406in" svg:width="9.40555in" svg:height="0.5722in">
          <draw:text-box>
            <text:p text:style-name="a1102" text:class-names="" text:cond-style-name="" text:id="id166"><text:span text:style-name="a1099" text:class-names="">So - let’s just make it really,<text:s text:c="1"/></text:span><text:span text:style-name="a1100" text:class-names="">really tiny</text:span><text:span text:style-name="a1101" text:class-names=""><text:s text:c="1"/>right?</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6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2"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65" smil:attributeName="visibility" smil:to="visible" smil:begin="0.0s" smil:dur="0.00100000004749745s" smil:fill="hold"/>
                </anim:par>
              </anim:par>
            </anim:par>
          </anim:seq>
        </anim:par>
      </draw:page>
      <draw:page draw:name="Slide14" draw:style-name="a1104" draw:master-page-name="Master1-Layout2-obj-Title-and-Content" presentation:presentation-page-layout-name="Master1-PPL2" draw:id="Slide-269">
        <draw:frame draw:id="id171" presentation:style-name="a1114" draw:name="Content Placeholder 2" svg:x="0.91667in" svg:y="0.79729in" svg:width="11.5in" svg:height="3.61938in" presentation:class="outline" presentation:placeholder="false">
          <draw:text-box>
            <text:list text:style-name="a1107">
              <text:list-item>
                <text:p text:style-name="a1106" text:class-names="" text:cond-style-name="" text:id="id168"><text:span text:style-name="a1105" text:class-names="">If my timestep is too big – my simulation will be wrong, because the system will be changing in between my jumps</text:span></text:p>
              </text:list-item>
            </text:list>
            <text:list text:style-name="a1110">
              <text:list-item>
                <text:p text:style-name="a1109" text:class-names="" text:cond-style-name="" text:id="id169"><text:span text:style-name="a1108" text:class-names=""/></text:p>
              </text:list-item>
            </text:list>
            <text:list text:style-name="a1113">
              <text:list-item>
                <text:p text:style-name="a1112" text:class-names="" text:cond-style-name="" text:id="id170"><text:span text:style-name="a1111" text:class-names="">If my timestep is too small – my simulation will be wrong, because computer are not infinitely precise, they make errors on very, very small numbers.</text:span></text:p>
              </text:list-item>
            </text:list>
          </draw:text-box>
          <svg:title/>
          <svg:desc/>
        </draw:frame>
        <draw:g draw:name="Group 4" draw:id="id172">
          <svg:title/>
          <svg:desc/>
          <draw:frame draw:id="id173" draw:style-name="a1115" draw:name="Picture 2" svg:x="9.25556in" svg:y="3.53696in" svg:width="3.52778in" svg:height="3.74916in" style:rel-width="scale" style:rel-height="scale">
            <draw:image xlink:href="media/image17.jpeg" xlink:type="simple" xlink:show="embed" xlink:actuate="onLoad"/>
            <svg:title/>
            <svg:desc/>
          </draw:frame>
          <draw:frame draw:id="id174" draw:style-name="a1119" draw:name="TextBox 3" svg:x="0.72222in" svg:y="5.30908in" svg:width="7.21667in" svg:height="0.70684in">
            <draw:text-box>
              <text:p text:style-name="a1118" text:class-names="" text:cond-style-name=""><text:span text:style-name="a1116" text:class-names="">It needs to be just right..</text:span><text:span text:style-name="a1117" text:class-names=""/></text:p>
            </draw:text-box>
            <svg:title/>
            <svg:desc/>
          </draw:fram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7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72" smil:attributeName="visibility" smil:to="visible" smil:begin="0.0s" smil:dur="0.001s" smil:fill="hold"/>
                </anim:par>
              </anim:par>
            </anim:par>
          </anim:seq>
        </anim:par>
      </draw:page>
      <draw:page draw:name="Slide17" draw:style-name="a1120" draw:master-page-name="Master1-Layout3-secHead-Section-Header" presentation:presentation-page-layout-name="Master1-PPL3" draw:id="Slide-272">
        <draw:frame draw:id="id175" presentation:style-name="a1123" draw:name="Title 1" svg:x="0.90972in" svg:y="2.88333in" svg:width="11.5in" svg:height="1.07292in" presentation:class="title" presentation:placeholder="false">
          <draw:text-box>
            <text:p text:style-name="a1122" text:class-names="" text:cond-style-name=""><text:span text:style-name="a1121" text:class-names="">Linear Stability Analysis</text:span></text:p>
          </draw:text-box>
          <svg:title/>
          <svg:desc/>
        </draw:frame>
      </draw:page>
      <draw:page draw:name="Slide18" draw:style-name="a1124" draw:master-page-name="Master1-Layout2-obj-Title-and-Content" presentation:presentation-page-layout-name="Master1-PPL2" draw:id="Slide-273">
        <draw:frame draw:id="id176" presentation:style-name="a1131" draw:name="Content Placeholder 2" svg:x="0.91667in" svg:y="0.63289in" svg:width="11.5in" svg:height="0.70239in" presentation:class="outline" presentation:placeholder="false">
          <draw:text-box>
            <text:list text:style-name="a1127">
              <text:list-item>
                <text:p text:style-name="a1126" text:class-names="" text:cond-style-name=""><text:span text:style-name="a1125" text:class-names="">Some fixed points are more stable / unstable than others.</text:span></text:p>
              </text:list-item>
            </text:list>
            <text:list text:style-name="a1130">
              <text:list-item>
                <text:p text:style-name="a1129" text:class-names="" text:cond-style-name=""><text:span text:style-name="a1128" text:class-names=""/></text:p>
              </text:list-item>
            </text:list>
          </draw:text-box>
          <svg:title/>
          <svg:desc/>
        </draw:frame>
        <draw:g draw:name="Group 51" draw:id="id177">
          <svg:title/>
          <svg:desc/>
          <draw:g draw:name="Group 16" draw:id="id219">
            <svg:title/>
            <svg:desc/>
            <draw:connector draw:type="line" svg:x1="2.7093in" svg:y1="2.88279in" svg:x2="5.85891in" svg:y2="2.88279in" draw:id="id250" draw:style-name="a1233" draw:name="Straight Connector 4">
              <svg:title/>
              <svg:desc/>
            </draw:connector>
            <draw:g draw:name="Group 15" draw:id="id251">
              <svg:title/>
              <svg:desc/>
              <draw:connector draw:type="line" svg:x1="2.72359in" svg:y1="2.875in" svg:x2="2.72359in" svg:y2="3.03248in" draw:id="id252" draw:style-name="a1234" draw:name="Straight Connector 6">
                <svg:title/>
                <svg:desc/>
              </draw:connector>
              <draw:connector draw:type="line" svg:x1="5.84224in" svg:y1="2.875in" svg:x2="5.84224in" svg:y2="3.03248in" draw:id="id253" draw:style-name="a1235" draw:name="Straight Connector 7">
                <svg:title/>
                <svg:desc/>
              </draw:connector>
              <draw:connector draw:type="line" svg:x1="3.76314in" svg:y1="2.875in" svg:x2="3.76314in" svg:y2="3.03248in" draw:id="id254" draw:style-name="a1236" draw:name="Straight Connector 8">
                <svg:title/>
                <svg:desc/>
              </draw:connector>
              <draw:connector draw:type="line" svg:x1="4.28291in" svg:y1="2.875in" svg:x2="4.28291in" svg:y2="3.03248in" draw:id="id255" draw:style-name="a1237" draw:name="Straight Connector 9">
                <svg:title/>
                <svg:desc/>
              </draw:connector>
              <draw:connector draw:type="line" svg:x1="4.80269in" svg:y1="2.875in" svg:x2="4.80269in" svg:y2="3.03248in" draw:id="id256" draw:style-name="a1238" draw:name="Straight Connector 10">
                <svg:title/>
                <svg:desc/>
              </draw:connector>
              <draw:connector draw:type="line" svg:x1="5.32247in" svg:y1="2.875in" svg:x2="5.32247in" svg:y2="3.03248in" draw:id="id257" draw:style-name="a1239" draw:name="Straight Connector 11">
                <svg:title/>
                <svg:desc/>
              </draw:connector>
              <draw:connector draw:type="line" svg:x1="3.24336in" svg:y1="2.875in" svg:x2="3.24336in" svg:y2="3.03248in" draw:id="id258" draw:style-name="a1240" draw:name="Straight Connector 12">
                <svg:title/>
                <svg:desc/>
              </draw:connector>
            </draw:g>
          </draw:g>
          <draw:g draw:name="Group 17" draw:id="id220">
            <svg:title/>
            <svg:desc/>
            <draw:connector draw:type="line" svg:x1="2.7093in" svg:y1="5.06254in" svg:x2="5.85891in" svg:y2="5.06254in" draw:id="id241" draw:style-name="a1225" draw:name="Straight Connector 18">
              <svg:title/>
              <svg:desc/>
            </draw:connector>
            <draw:g draw:name="Group 19" draw:id="id242">
              <svg:title/>
              <svg:desc/>
              <draw:connector draw:type="line" svg:x1="2.72359in" svg:y1="5.05475in" svg:x2="2.72359in" svg:y2="5.21223in" draw:id="id243" draw:style-name="a1226" draw:name="Straight Connector 20">
                <svg:title/>
                <svg:desc/>
              </draw:connector>
              <draw:connector draw:type="line" svg:x1="5.84224in" svg:y1="5.05475in" svg:x2="5.84224in" svg:y2="5.21223in" draw:id="id244" draw:style-name="a1227" draw:name="Straight Connector 21">
                <svg:title/>
                <svg:desc/>
              </draw:connector>
              <draw:connector draw:type="line" svg:x1="3.76314in" svg:y1="5.05475in" svg:x2="3.76314in" svg:y2="5.21223in" draw:id="id245" draw:style-name="a1228" draw:name="Straight Connector 22">
                <svg:title/>
                <svg:desc/>
              </draw:connector>
              <draw:connector draw:type="line" svg:x1="4.28291in" svg:y1="5.05475in" svg:x2="4.28291in" svg:y2="5.21223in" draw:id="id246" draw:style-name="a1229" draw:name="Straight Connector 23">
                <svg:title/>
                <svg:desc/>
              </draw:connector>
              <draw:connector draw:type="line" svg:x1="4.80269in" svg:y1="5.05475in" svg:x2="4.80269in" svg:y2="5.21223in" draw:id="id247" draw:style-name="a1230" draw:name="Straight Connector 24">
                <svg:title/>
                <svg:desc/>
              </draw:connector>
              <draw:connector draw:type="line" svg:x1="5.32247in" svg:y1="5.05475in" svg:x2="5.32247in" svg:y2="5.21223in" draw:id="id248" draw:style-name="a1231" draw:name="Straight Connector 25">
                <svg:title/>
                <svg:desc/>
              </draw:connector>
              <draw:connector draw:type="line" svg:x1="3.24336in" svg:y1="5.05475in" svg:x2="3.24336in" svg:y2="5.21223in" draw:id="id249" draw:style-name="a1232" draw:name="Straight Connector 26">
                <svg:title/>
                <svg:desc/>
              </draw:connector>
            </draw:g>
          </draw:g>
          <draw:g draw:name="Group 27" draw:id="id221">
            <svg:title/>
            <svg:desc/>
            <draw:connector draw:type="line" svg:x1="8.7898in" svg:y1="2.88279in" svg:x2="11.93941in" svg:y2="2.88279in" draw:id="id232" draw:style-name="a1217" draw:name="Straight Connector 28">
              <svg:title/>
              <svg:desc/>
            </draw:connector>
            <draw:g draw:name="Group 29" draw:id="id233">
              <svg:title/>
              <svg:desc/>
              <draw:connector draw:type="line" svg:x1="8.80408in" svg:y1="2.875in" svg:x2="8.80408in" svg:y2="3.03248in" draw:id="id234" draw:style-name="a1218" draw:name="Straight Connector 30">
                <svg:title/>
                <svg:desc/>
              </draw:connector>
              <draw:connector draw:type="line" svg:x1="11.92274in" svg:y1="2.875in" svg:x2="11.92274in" svg:y2="3.03248in" draw:id="id235" draw:style-name="a1219" draw:name="Straight Connector 31">
                <svg:title/>
                <svg:desc/>
              </draw:connector>
              <draw:connector draw:type="line" svg:x1="9.84363in" svg:y1="2.875in" svg:x2="9.84363in" svg:y2="3.03248in" draw:id="id236" draw:style-name="a1220" draw:name="Straight Connector 32">
                <svg:title/>
                <svg:desc/>
              </draw:connector>
              <draw:connector draw:type="line" svg:x1="10.36341in" svg:y1="2.875in" svg:x2="10.36341in" svg:y2="3.03248in" draw:id="id237" draw:style-name="a1221" draw:name="Straight Connector 33">
                <svg:title/>
                <svg:desc/>
              </draw:connector>
              <draw:connector draw:type="line" svg:x1="10.88319in" svg:y1="2.875in" svg:x2="10.88319in" svg:y2="3.03248in" draw:id="id238" draw:style-name="a1222" draw:name="Straight Connector 34">
                <svg:title/>
                <svg:desc/>
              </draw:connector>
              <draw:connector draw:type="line" svg:x1="11.40296in" svg:y1="2.875in" svg:x2="11.40296in" svg:y2="3.03248in" draw:id="id239" draw:style-name="a1223" draw:name="Straight Connector 35">
                <svg:title/>
                <svg:desc/>
              </draw:connector>
              <draw:connector draw:type="line" svg:x1="9.32386in" svg:y1="2.875in" svg:x2="9.32386in" svg:y2="3.03248in" draw:id="id240" draw:style-name="a1224" draw:name="Straight Connector 36">
                <svg:title/>
                <svg:desc/>
              </draw:connector>
            </draw:g>
          </draw:g>
          <draw:g draw:name="Group 37" draw:id="id222">
            <svg:title/>
            <svg:desc/>
            <draw:connector draw:type="line" svg:x1="8.7898in" svg:y1="5.06254in" svg:x2="11.93941in" svg:y2="5.06254in" draw:id="id223" draw:style-name="a1209" draw:name="Straight Connector 38">
              <svg:title/>
              <svg:desc/>
            </draw:connector>
            <draw:g draw:name="Group 39" draw:id="id224">
              <svg:title/>
              <svg:desc/>
              <draw:connector draw:type="line" svg:x1="8.80408in" svg:y1="5.05475in" svg:x2="8.80408in" svg:y2="5.21223in" draw:id="id225" draw:style-name="a1210" draw:name="Straight Connector 40">
                <svg:title/>
                <svg:desc/>
              </draw:connector>
              <draw:connector draw:type="line" svg:x1="11.92274in" svg:y1="5.05475in" svg:x2="11.92274in" svg:y2="5.21223in" draw:id="id226" draw:style-name="a1211" draw:name="Straight Connector 41">
                <svg:title/>
                <svg:desc/>
              </draw:connector>
              <draw:connector draw:type="line" svg:x1="9.84363in" svg:y1="5.05475in" svg:x2="9.84363in" svg:y2="5.21223in" draw:id="id227" draw:style-name="a1212" draw:name="Straight Connector 42">
                <svg:title/>
                <svg:desc/>
              </draw:connector>
              <draw:connector draw:type="line" svg:x1="10.36341in" svg:y1="5.05475in" svg:x2="10.36341in" svg:y2="5.21223in" draw:id="id228" draw:style-name="a1213" draw:name="Straight Connector 43">
                <svg:title/>
                <svg:desc/>
              </draw:connector>
              <draw:connector draw:type="line" svg:x1="10.88319in" svg:y1="5.05475in" svg:x2="10.88319in" svg:y2="5.21223in" draw:id="id229" draw:style-name="a1214" draw:name="Straight Connector 44">
                <svg:title/>
                <svg:desc/>
              </draw:connector>
              <draw:connector draw:type="line" svg:x1="11.40296in" svg:y1="5.05475in" svg:x2="11.40296in" svg:y2="5.21223in" draw:id="id230" draw:style-name="a1215" draw:name="Straight Connector 45">
                <svg:title/>
                <svg:desc/>
              </draw:connector>
              <draw:connector draw:type="line" svg:x1="9.32386in" svg:y1="5.05475in" svg:x2="9.32386in" svg:y2="5.21223in" draw:id="id231" draw:style-name="a1216" draw:name="Straight Connector 46">
                <svg:title/>
                <svg:desc/>
              </draw:connector>
            </draw:g>
          </draw:g>
        </draw:g>
        <draw:custom-shape svg:x="4.18114in" svg:y="2.78448in" svg:width="0.19685in" svg:height="0.19685in" draw:id="id178" draw:style-name="a1134" draw:name="Oval 52">
          <svg:title/>
          <svg:desc/>
          <text:p text:style-name="a1133" text:class-names="" text:cond-style-name=""><text:span text:style-name="a11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55" draw:id="id179">
          <svg:title/>
          <svg:desc/>
          <draw:connector draw:type="line" svg:x1="4.66658in" svg:y1="2.88279in" svg:x2="4.98154in" svg:y2="2.88279in" draw:id="id217" draw:style-name="a1206" draw:name="Straight Arrow Connector 48">
            <svg:title/>
            <svg:desc/>
          </draw:connector>
          <draw:connector draw:type="line" svg:x1="5.19158in" svg:y1="2.88279in" svg:x2="5.50654in" svg:y2="2.88279in" draw:id="id218" draw:style-name="a1208" draw:name="Straight Arrow Connector 54">
            <svg:title/>
            <svg:desc/>
          </draw:connector>
        </draw:g>
        <draw:connector draw:type="line" svg:x1="3.90029in" svg:y1="2.88279in" svg:x2="3.58533in" svg:y2="2.88279in" draw:id="id180" draw:style-name="a1136" draw:name="Straight Arrow Connector 57">
          <svg:title/>
          <svg:desc/>
        </draw:connector>
        <draw:connector draw:type="line" svg:x1="3.37529in" svg:y1="2.88279in" svg:x2="3.06033in" svg:y2="2.88279in" draw:id="id181" draw:style-name="a1138" draw:name="Straight Arrow Connector 58">
          <svg:title/>
          <svg:desc/>
        </draw:connector>
        <draw:g draw:name="Group 67" draw:id="id182">
          <svg:title/>
          <svg:desc/>
          <draw:connector draw:type="line" svg:x1="4.82233in" svg:y1="5.06254in" svg:x2="5.33786in" svg:y2="5.06254in" draw:id="id214" draw:style-name="a1200" draw:name="Straight Arrow Connector 60">
            <svg:title/>
            <svg:desc/>
          </draw:connector>
          <draw:connector draw:type="line" svg:x1="5.33786in" svg:y1="5.06254in" svg:x2="5.98497in" svg:y2="5.06254in" draw:id="id215" draw:style-name="a1202" draw:name="Straight Arrow Connector 61">
            <svg:title/>
            <svg:desc/>
          </draw:connector>
          <draw:connector draw:type="line" svg:x1="4.41017in" svg:y1="5.06254in" svg:x2="4.82233in" svg:y2="5.06254in" draw:id="id216" draw:style-name="a1204" draw:name="Straight Arrow Connector 64">
            <svg:title/>
            <svg:desc/>
          </draw:connector>
        </draw:g>
        <draw:custom-shape svg:x="4.18334in" svg:y="4.9658in" svg:width="0.19685in" svg:height="0.19685in" draw:id="id183" draw:style-name="a1141" draw:name="Oval 68">
          <svg:title/>
          <svg:desc/>
          <text:p text:style-name="a1140" text:class-names="" text:cond-style-name=""><text:span text:style-name="a11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69" draw:id="id184">
          <svg:title/>
          <svg:desc/>
          <draw:connector draw:type="line" svg:x1="3.73912in" svg:y1="5.06254in" svg:x2="3.22359in" svg:y2="5.06254in" draw:id="id211" draw:style-name="a1194" draw:name="Straight Arrow Connector 70">
            <svg:title/>
            <svg:desc/>
          </draw:connector>
          <draw:connector draw:type="line" svg:x1="3.22359in" svg:y1="5.06254in" svg:x2="2.57648in" svg:y2="5.06254in" draw:id="id212" draw:style-name="a1196" draw:name="Straight Arrow Connector 71">
            <svg:title/>
            <svg:desc/>
          </draw:connector>
          <draw:connector draw:type="line" svg:x1="4.15128in" svg:y1="5.06254in" svg:x2="3.73912in" svg:y2="5.06254in" draw:id="id213" draw:style-name="a1198" draw:name="Straight Arrow Connector 72">
            <svg:title/>
            <svg:desc/>
          </draw:connector>
        </draw:g>
        <draw:custom-shape svg:x="10.26045in" svg:y="2.78481in" svg:width="0.19685in" svg:height="0.19685in" draw:id="id185" draw:style-name="a1144" draw:name="Oval 74">
          <svg:title/>
          <svg:desc/>
          <text:p text:style-name="a1143" text:class-names="" text:cond-style-name=""><text:span text:style-name="a11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26461in" svg:y="4.96257in" svg:width="0.19685in" svg:height="0.19685in" draw:id="id186" draw:style-name="a1147" draw:name="Oval 76">
          <svg:title/>
          <svg:desc/>
          <text:p text:style-name="a1146" text:class-names="" text:cond-style-name=""><text:span text:style-name="a11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77" draw:id="id187">
          <svg:title/>
          <svg:desc/>
          <draw:connector draw:type="line" svg:x1="11.58476in" svg:y1="2.88071in" svg:x2="11.26979in" svg:y2="2.88071in" draw:id="id209" draw:style-name="a1190" draw:name="Straight Arrow Connector 78">
            <svg:title/>
            <svg:desc/>
          </draw:connector>
          <draw:connector draw:type="line" svg:x1="11.05976in" svg:y1="2.88071in" svg:x2="10.74479in" svg:y2="2.88071in" draw:id="id210" draw:style-name="a1192" draw:name="Straight Arrow Connector 79">
            <svg:title/>
            <svg:desc/>
          </draw:connector>
        </draw:g>
        <draw:g draw:name="Group 80" draw:id="id188">
          <svg:title/>
          <svg:desc/>
          <draw:connector draw:type="line" svg:x1="9.13854in" svg:y1="2.88071in" svg:x2="9.45351in" svg:y2="2.88071in" draw:id="id207" draw:style-name="a1186" draw:name="Straight Arrow Connector 81">
            <svg:title/>
            <svg:desc/>
          </draw:connector>
          <draw:connector draw:type="line" svg:x1="9.66354in" svg:y1="2.88071in" svg:x2="9.97851in" svg:y2="2.88071in" draw:id="id208" draw:style-name="a1188" draw:name="Straight Arrow Connector 82">
            <svg:title/>
            <svg:desc/>
          </draw:connector>
        </draw:g>
        <draw:g draw:name="Group 91" draw:id="id189">
          <svg:title/>
          <svg:desc/>
          <draw:connector draw:type="line" svg:x1="11.65545in" svg:y1="5.06098in" svg:x2="11.13992in" svg:y2="5.06098in" draw:id="id204" draw:style-name="a1180" draw:name="Straight Arrow Connector 92">
            <svg:title/>
            <svg:desc/>
          </draw:connector>
          <draw:connector draw:type="line" svg:x1="11.13992in" svg:y1="5.06098in" svg:x2="10.49281in" svg:y2="5.06098in" draw:id="id205" draw:style-name="a1182" draw:name="Straight Arrow Connector 93">
            <svg:title/>
            <svg:desc/>
          </draw:connector>
          <draw:connector draw:type="line" svg:x1="12.06761in" svg:y1="5.06098in" svg:x2="11.65546in" svg:y2="5.06098in" draw:id="id206" draw:style-name="a1184" draw:name="Straight Arrow Connector 94">
            <svg:title/>
            <svg:desc/>
          </draw:connector>
        </draw:g>
        <draw:g draw:name="Group 95" draw:id="id190">
          <svg:title/>
          <svg:desc/>
          <draw:connector draw:type="line" svg:x1="9.06919in" svg:y1="5.06098in" svg:x2="9.58473in" svg:y2="5.06098in" draw:id="id201" draw:style-name="a1174" draw:name="Straight Arrow Connector 96">
            <svg:title/>
            <svg:desc/>
          </draw:connector>
          <draw:connector draw:type="line" svg:x1="9.58473in" svg:y1="5.06098in" svg:x2="10.23184in" svg:y2="5.06098in" draw:id="id202" draw:style-name="a1176" draw:name="Straight Arrow Connector 97">
            <svg:title/>
            <svg:desc/>
          </draw:connector>
          <draw:connector draw:type="line" svg:x1="8.65704in" svg:y1="5.06098in" svg:x2="9.06919in" svg:y2="5.06098in" draw:id="id203" draw:style-name="a1178" draw:name="Straight Arrow Connector 98">
            <svg:title/>
            <svg:desc/>
          </draw:connector>
        </draw:g>
        <draw:frame draw:id="id191" draw:style-name="a1150" draw:name="TextBox 99" svg:x="1.10743in" svg:y="1.90909in" svg:width="2.37971in" svg:height="0.40391in">
          <draw:text-box>
            <text:p text:style-name="a1149" text:class-names="" text:cond-style-name=""><text:span text:style-name="a1148" text:class-names="">A little bit unstable</text:span></text:p>
          </draw:text-box>
          <svg:title/>
          <svg:desc/>
        </draw:frame>
        <draw:frame draw:id="id192" draw:style-name="a1153" draw:name="TextBox 100" svg:x="1.10165in" svg:y="4.29079in" svg:width="2.37971in" svg:height="0.40391in">
          <draw:text-box>
            <text:p text:style-name="a1152" text:class-names="" text:cond-style-name=""><text:span text:style-name="a1151" text:class-names="">Very unstable!</text:span></text:p>
          </draw:text-box>
          <svg:title/>
          <svg:desc/>
        </draw:frame>
        <draw:frame draw:id="id193" draw:style-name="a1156" draw:name="TextBox 101" svg:x="7.67326in" svg:y="4.29079in" svg:width="2.37971in" svg:height="0.40391in">
          <draw:text-box>
            <text:p text:style-name="a1155" text:class-names="" text:cond-style-name=""><text:span text:style-name="a1154" text:class-names="">Very stable</text:span></text:p>
          </draw:text-box>
          <svg:title/>
          <svg:desc/>
        </draw:frame>
        <draw:frame draw:id="id194" draw:style-name="a1159" draw:name="TextBox 102" svg:x="7.97916in" svg:y="1.99328in" svg:width="2.37971in" svg:height="0.40391in">
          <draw:text-box>
            <text:p text:style-name="a1158" text:class-names="" text:cond-style-name=""><text:span text:style-name="a1157" text:class-names="">A little bit stable</text:span></text:p>
          </draw:text-box>
          <svg:title/>
          <svg:desc/>
        </draw:frame>
        <draw:frame draw:id="id200" draw:style-name="a1172" draw:name="TextBox 103" svg:x="0.70744in" svg:y="6.04916in" svg:width="11.40971in" svg:height="1.61563in">
          <draw:text-box>
            <text:p text:style-name="a1163" text:class-names="" text:cond-style-name="" text:id="id195"><text:span text:style-name="a1160" text:class-names="">The derivative of the function around a fixed point tell us how stable it<text:s text:c="1"/></text:span><text:span text:style-name="a1161" text:class-names="">is</text:span><text:span text:style-name="a1162" text:class-names=""/></text:p>
            <text:p text:style-name="a1165" text:class-names="" text:cond-style-name="" text:id="id196"><text:span text:style-name="a1164" text:class-names=""/></text:p>
            <text:p text:style-name="a1167" text:class-names="" text:cond-style-name="" text:id="id197"><text:span text:style-name="a1166" text:class-names=""><text:tab/>negative derivative = stable</text:span></text:p>
            <text:p text:style-name="a1169" text:class-names="" text:cond-style-name="" text:id="id198"><text:span text:style-name="a1168" text:class-names=""><text:tab/>positive derivative = unstable</text:span></text:p>
            <text:p text:style-name="a1171" text:class-names="" text:cond-style-name="" text:id="id199"><text:span text:style-name="a1170" text:class-names=""><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00" smil:attributeName="visibility" smil:to="visible" smil:begin="0.0s" smil:dur="0.00100000004749745s" smil:fill="hold"/>
                </anim:par>
              </anim:par>
            </anim:par>
          </anim:seq>
        </anim:par>
      </draw:page>
      <draw:page draw:name="Slide34" draw:style-name="a1241" draw:master-page-name="Master1-Layout2-obj-Title-and-Content" presentation:presentation-page-layout-name="Master1-PPL2" draw:id="Slide-289">
        <draw:frame draw:id="id259" presentation:style-name="a1244" draw:name="Title 1" svg:x="0.91667in" svg:y="0.39931in" svg:width="11.5in" svg:height="1.44965in" presentation:class="title" presentation:placeholder="false">
          <draw:text-box>
            <text:p text:style-name="a1243" text:class-names="" text:cond-style-name=""><text:span text:style-name="a1242" text:class-names="">Clarify the layers:<text:s text:c="1"/></text:span></text:p>
          </draw:text-box>
          <svg:title/>
          <svg:desc/>
        </draw:frame>
        <draw:g draw:name="Group 3" draw:id="id260">
          <svg:title/>
          <svg:desc/>
          <draw:connector draw:type="line" svg:x1="6.92624in" svg:y1="4.67423in" svg:x2="7.44178in" svg:y2="4.67423in" draw:id="id269" draw:style-name="a1277" draw:name="Straight Arrow Connector 4">
            <svg:title/>
            <svg:desc/>
          </draw:connector>
          <draw:connector draw:type="line" svg:x1="7.44178in" svg:y1="4.67423in" svg:x2="8.08889in" svg:y2="4.67423in" draw:id="id270" draw:style-name="a1279" draw:name="Straight Arrow Connector 5">
            <svg:title/>
            <svg:desc/>
          </draw:connector>
          <draw:connector draw:type="line" svg:x1="6.51409in" svg:y1="4.67423in" svg:x2="6.92624in" svg:y2="4.67423in" draw:id="id271" draw:style-name="a1281" draw:name="Straight Arrow Connector 6">
            <svg:title/>
            <svg:desc/>
          </draw:connector>
        </draw:g>
        <draw:custom-shape svg:x="6.28726in" svg:y="4.57749in" svg:width="0.19685in" svg:height="0.19685in" draw:id="id261" draw:style-name="a1247" draw:name="Oval 7">
          <svg:title/>
          <svg:desc/>
          <text:p text:style-name="a1246" text:class-names="" text:cond-style-name=""><text:span text:style-name="a12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8" draw:id="id262">
          <svg:title/>
          <svg:desc/>
          <draw:connector draw:type="line" svg:x1="5.84304in" svg:y1="4.67423in" svg:x2="5.3275in" svg:y2="4.67423in" draw:id="id266" draw:style-name="a1271" draw:name="Straight Arrow Connector 9">
            <svg:title/>
            <svg:desc/>
          </draw:connector>
          <draw:connector draw:type="line" svg:x1="5.3275in" svg:y1="4.67423in" svg:x2="4.68039in" svg:y2="4.67423in" draw:id="id267" draw:style-name="a1273" draw:name="Straight Arrow Connector 10">
            <svg:title/>
            <svg:desc/>
          </draw:connector>
          <draw:connector draw:type="line" svg:x1="6.2552in" svg:y1="4.67423in" svg:x2="5.84304in" svg:y2="4.67423in" draw:id="id268" draw:style-name="a1275" draw:name="Straight Arrow Connector 11">
            <svg:title/>
            <svg:desc/>
          </draw:connector>
        </draw:g>
        <draw:frame draw:id="id263" draw:style-name="a1250" draw:name="TextBox 12" svg:x="1.36112in" svg:y="2.60193in" svg:width="1.16456in" svg:height="0.40391in">
          <draw:text-box>
            <text:p text:style-name="a1249" text:class-names="" text:cond-style-name=""><text:span text:style-name="a1248" text:class-names="">State (x)</text:span></text:p>
          </draw:text-box>
          <svg:title/>
          <svg:desc/>
        </draw:frame>
        <draw:frame draw:id="id264" draw:style-name="a1257" draw:name="TextBox 13" svg:x="4.04315in" svg:y="2.42318in" svg:width="4.4241in" svg:height="1.00977in">
          <draw:text-box>
            <text:p text:style-name="a1252" text:class-names="" text:cond-style-name=""><text:span text:style-name="a1251" text:class-names="">function (x)<text:s text:c="1"/></text:span></text:p>
            <text:p text:style-name="a1254" text:class-names="" text:cond-style-name=""><text:span text:style-name="a1253" text:class-names="">derivative of x with respect to time</text:span></text:p>
            <text:p text:style-name="a1256" text:class-names="" text:cond-style-name=""><text:span text:style-name="a1255" text:class-names="">(which is 0 at fixed points)</text:span></text:p>
          </draw:text-box>
          <svg:title/>
          <svg:desc/>
        </draw:frame>
        <draw:frame draw:id="id265" draw:style-name="a1269" draw:name="TextBox 14" svg:x="9.02034in" svg:y="2.50096in" svg:width="3.71299in" svg:height="1.00977in">
          <draw:text-box>
            <text:p text:style-name="a1260" text:class-names="" text:cond-style-name=""><text:span text:style-name="a1258" text:class-names="">Derivative of the<text:s text:c="1"/></text:span><text:span text:style-name="a1259" text:class-names="">function</text:span></text:p>
            <text:p text:style-name="a1262" text:class-names="" text:cond-style-name=""><text:span text:style-name="a1261" text:class-names="">Tell us if the point Is stable</text:span></text:p>
            <text:p text:style-name="a1268" text:class-names="" text:cond-style-name=""><text:span text:style-name="a1263" text:class-names="">(2</text:span><text:span text:style-name="a1264" text:class-names="">nd</text:span><text:span text:style-name="a1265" text:class-names=""><text:s text:c="1"/>derivative of<text:s text:c="1"/></text:span><text:span text:style-name="a1266" text:class-names="">x</text:span><text:span text:style-name="a1267" text:class-names="">)</text:span></text:p>
          </draw:text-box>
          <svg:title/>
          <svg:desc/>
        </draw:frame>
      </draw:page>
      <draw:page draw:name="Slide19" draw:style-name="a1282" draw:master-page-name="Master1-Layout2-obj-Title-and-Content" presentation:presentation-page-layout-name="Master1-PPL2" draw:id="Slide-274">
        <draw:frame draw:id="id272" draw:style-name="a1286" draw:name="TextBox 3" svg:x="8.3in" svg:y="1.10413in" svg:width="1.38527in" svg:height="0.57515in">
          <draw:text-box>
            <text:p text:style-name="a1285" text:class-names="" text:cond-style-name=""><draw:frame draw:style-name="a1283" text:anchor-type="as-char" svg:x="1173.49722in" svg:y="0in" svg:width="1.39097in" svg:height="0.56958in" style:rel-width="scale" style:rel-height="scale"><draw:object xlink:href="Object 8/" xlink:type="simple" xlink:show="embed" xlink:actuate="onLoad"/></draw:frame><text:span text:style-name="a1284" text:class-names=""/></text:p>
          </draw:text-box>
          <svg:title/>
          <svg:desc/>
        </draw:frame>
        <draw:frame draw:id="id273" draw:style-name="a1289" draw:name="TextBox 5" svg:x="1.08889in" svg:y="1.17292in" svg:width="7.6in" svg:height="0.43757in">
          <draw:text-box>
            <text:p text:style-name="a1288" text:class-names="" text:cond-style-name=""><text:span text:style-name="a1287" text:class-names="">Sometimes we can calculate the derivative analytically</text:span></text:p>
          </draw:text-box>
          <svg:title/>
          <svg:desc/>
        </draw:frame>
        <draw:g draw:name="Group 29" draw:id="id274">
          <svg:title/>
          <svg:desc/>
          <draw:frame draw:id="id300" draw:style-name="a1331" draw:name="TextBox 6" svg:x="4.34444in" svg:y="2.83297in" svg:width="3.34969in" svg:height="0.57515in">
            <draw:text-box>
              <text:p text:style-name="a1330" text:class-names="" text:cond-style-name=""><draw:frame draw:style-name="a1328" text:anchor-type="as-char" svg:x="1172.52451in" svg:y="0in" svg:width="3.33639in" svg:height="0.56958in" style:rel-width="scale" style:rel-height="scale"><draw:object xlink:href="Object 10/" xlink:type="simple" xlink:show="embed" xlink:actuate="onLoad"/></draw:frame><text:span text:style-name="a1329" text:class-names=""/></text:p>
            </draw:text-box>
            <svg:title/>
            <svg:desc/>
          </draw:frame>
          <draw:frame draw:id="id301" draw:style-name="a1334" draw:name="TextBox 7" svg:x="1.08889in" svg:y="2.93819in" svg:width="3.02955in" svg:height="0.43757in">
            <draw:text-box>
              <text:p text:style-name="a1333" text:class-names="" text:cond-style-name=""><text:span text:style-name="a1332" text:class-names="">Sometimes we cannot</text:span></text:p>
            </draw:text-box>
            <svg:title/>
            <svg:desc/>
          </draw:frame>
        </draw:g>
        <draw:g draw:name="Group 30" draw:id="id275">
          <svg:title/>
          <svg:desc/>
          <draw:frame draw:id="id276" draw:style-name="a1294" draw:name="TextBox 10" svg:x="1.08889in" svg:y="4.27504in" svg:width="11.66667in" svg:height="0.43757in">
            <draw:text-box>
              <text:p text:style-name="a1293" text:class-names="" text:cond-style-name=""><text:span text:style-name="a1290" text:class-names="">In these<text:s text:c="1"/></text:span><text:span text:style-name="a1291" text:class-names="">cases</text:span><text:span text:style-name="a1292" text:class-names=""><text:s text:c="1"/>we can try to estimate the derivative numerically:</text:span></text:p>
            </draw:text-box>
            <svg:title/>
            <svg:desc/>
          </draw:frame>
          <draw:frame draw:id="id277" draw:style-name="a1298" draw:name="TextBox 7" svg:x="1.21853in" svg:y="5.72055in" svg:width="3.67036in" svg:height="0.63889in">
            <draw:text-box>
              <text:p text:style-name="a1297" text:class-names="" text:cond-style-name=""><draw:frame draw:style-name="a1295" text:anchor-type="as-char" svg:x="1172.36569in" svg:y="0in" svg:width="3.65396in" svg:height="0.63271in" style:rel-width="scale" style:rel-height="scale"><draw:object xlink:href="Object 9/" xlink:type="simple" xlink:show="embed" xlink:actuate="onLoad"/></draw:frame><text:span text:style-name="a1296" text:class-names=""/></text:p>
            </draw:text-box>
            <svg:title/>
            <svg:desc/>
          </draw:frame>
          <draw:custom-shape svg:width="0.18612in" svg:height="0.39504in" draw:id="id278" draw:style-name="a1301" draw:transform="translate(-0.09306in -0.19752in) rotate(-1.5708) translate(9.45693in 5.94693in)" draw:name="Left Brace 56">
            <svg:title/>
            <svg:desc/>
            <text:p text:style-name="a1300" text:class-names="" text:cond-style-name=""><text:span text:style-name="a1299"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40286"/>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g draw:name="Group 60" draw:id="id279">
            <svg:title/>
            <svg:desc/>
            <draw:g draw:name="Group 59" draw:id="id282">
              <svg:title/>
              <svg:desc/>
              <draw:g draw:name="Group 27" draw:id="id284">
                <svg:title/>
                <svg:desc/>
                <draw:connector draw:type="line" svg:x1="7.69413in" svg:y1="6.20701in" svg:x2="10.84374in" svg:y2="6.20701in" draw:id="id291" draw:style-name="a1320" draw:name="Straight Connector 28">
                  <svg:title/>
                  <svg:desc/>
                </draw:connector>
                <draw:g draw:name="Group 29" draw:id="id292">
                  <svg:title/>
                  <svg:desc/>
                  <draw:connector draw:type="line" svg:x1="7.70841in" svg:y1="6.19922in" svg:x2="7.70841in" svg:y2="6.3567in" draw:id="id293" draw:style-name="a1321" draw:name="Straight Connector 30">
                    <svg:title/>
                    <svg:desc/>
                  </draw:connector>
                  <draw:connector draw:type="line" svg:x1="10.82707in" svg:y1="6.19922in" svg:x2="10.82707in" svg:y2="6.3567in" draw:id="id294" draw:style-name="a1322" draw:name="Straight Connector 31">
                    <svg:title/>
                    <svg:desc/>
                  </draw:connector>
                  <draw:connector draw:type="line" svg:x1="8.74796in" svg:y1="6.19922in" svg:x2="8.74796in" svg:y2="6.3567in" draw:id="id295" draw:style-name="a1323" draw:name="Straight Connector 32">
                    <svg:title/>
                    <svg:desc/>
                  </draw:connector>
                  <draw:connector draw:type="line" svg:x1="9.26774in" svg:y1="6.19922in" svg:x2="9.26774in" svg:y2="6.3567in" draw:id="id296" draw:style-name="a1324" draw:name="Straight Connector 33">
                    <svg:title/>
                    <svg:desc/>
                  </draw:connector>
                  <draw:connector draw:type="line" svg:x1="9.78752in" svg:y1="6.19922in" svg:x2="9.78752in" svg:y2="6.3567in" draw:id="id297" draw:style-name="a1325" draw:name="Straight Connector 34">
                    <svg:title/>
                    <svg:desc/>
                  </draw:connector>
                  <draw:connector draw:type="line" svg:x1="10.30729in" svg:y1="6.19922in" svg:x2="10.30729in" svg:y2="6.3567in" draw:id="id298" draw:style-name="a1326" draw:name="Straight Connector 35">
                    <svg:title/>
                    <svg:desc/>
                  </draw:connector>
                  <draw:connector draw:type="line" svg:x1="8.22819in" svg:y1="6.19922in" svg:x2="8.22819in" svg:y2="6.3567in" draw:id="id299" draw:style-name="a1327" draw:name="Straight Connector 36">
                    <svg:title/>
                    <svg:desc/>
                  </draw:connector>
                </draw:g>
              </draw:g>
              <draw:g draw:name="Group 55" draw:id="id285">
                <svg:title/>
                <svg:desc/>
                <draw:connector draw:type="line" svg:x1="9.65445in" svg:y1="6.20536in" svg:x2="9.96941in" svg:y2="6.20536in" draw:id="id289" draw:style-name="a1317" draw:name="Straight Arrow Connector 48">
                  <svg:title/>
                  <svg:desc/>
                </draw:connector>
                <draw:connector draw:type="line" svg:x1="10.17945in" svg:y1="6.20536in" svg:x2="10.49441in" svg:y2="6.20536in" draw:id="id290" draw:style-name="a1319" draw:name="Straight Arrow Connector 54">
                  <svg:title/>
                  <svg:desc/>
                </draw:connector>
              </draw:g>
              <draw:g draw:name="Group 56" draw:id="id286">
                <svg:title/>
                <svg:desc/>
                <draw:connector draw:type="line" svg:x1="8.88816in" svg:y1="6.20536in" svg:x2="8.5732in" svg:y2="6.20536in" draw:id="id287" draw:style-name="a1313" draw:name="Straight Arrow Connector 57">
                  <svg:title/>
                  <svg:desc/>
                </draw:connector>
                <draw:connector draw:type="line" svg:x1="8.36316in" svg:y1="6.20536in" svg:x2="8.0482in" svg:y2="6.20536in" draw:id="id288" draw:style-name="a1315" draw:name="Straight Arrow Connector 58">
                  <svg:title/>
                  <svg:desc/>
                </draw:connector>
              </draw:g>
            </draw:g>
            <draw:custom-shape svg:x="9.16901in" svg:y="6.10496in" svg:width="0.19685in" svg:height="0.19685in" draw:id="id283" draw:style-name="a1311" draw:name="Oval 52">
              <svg:title/>
              <svg:desc/>
              <text:p text:style-name="a1310" text:class-names="" text:cond-style-name=""><text:span text:style-name="a1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9.53936in" svg:y="6.10629in" svg:width="0.19685in" svg:height="0.19685in" draw:id="id280" draw:style-name="a1305" draw:name="Oval 52">
            <svg:title/>
            <svg:desc/>
            <text:p text:style-name="a1303" text:class-names="" text:cond-style-name=""><text:span text:style-name="a13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81" draw:style-name="a1308" draw:name="TextBox 62" svg:x="8.79649in" svg:y="5.41029in" svg:width="1.29962in" svg:height="0.40391in">
            <draw:text-box>
              <text:p text:style-name="a1307" text:class-names="" text:cond-style-name=""><text:span text:style-name="a1306" text:class-names="">Little step</text:span></text:p>
            </draw:text-box>
            <svg:title/>
            <svg:desc/>
          </draw:fram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7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75" smil:attributeName="visibility" smil:to="visible" smil:begin="0.0s" smil:dur="0.001s" smil:fill="hold"/>
                </anim:par>
              </anim:par>
            </anim:par>
          </anim:seq>
        </anim:par>
      </draw:page>
      <draw:page draw:name="Slide55" draw:style-name="a1335" draw:master-page-name="Master1-Layout7-blank-Blank" presentation:presentation-page-layout-name="Master1-PPL7" draw:id="Slide-310">
        <draw:frame draw:id="id302" draw:style-name="a1336" draw:name="Picture 2" svg:x="1.30534in" svg:y="0.96549in" svg:width="10.72266in" svg:height="5.56901in" style:rel-width="scale" style:rel-height="scale">
          <draw:image xlink:href="media/image18.png" xlink:type="simple" xlink:show="embed" xlink:actuate="onLoad"/>
          <svg:title/>
          <svg:desc/>
        </draw:frame>
      </draw:page>
      <draw:page draw:name="Slide35" draw:style-name="a1337" draw:master-page-name="Master1-Layout3-secHead-Section-Header" presentation:presentation-page-layout-name="Master1-PPL3" draw:id="Slide-290">
        <draw:frame draw:id="id303" presentation:style-name="a1340" draw:name="Title 1" svg:x="0.90972in" svg:y="1.86979in" svg:width="11.5in" svg:height="1.24132in" presentation:class="title" presentation:placeholder="false">
          <draw:text-box>
            <text:p text:style-name="a1339" text:class-names="" text:cond-style-name=""><text:span text:style-name="a1338" text:class-names="">The leaky integrate and fire model</text:span></text:p>
          </draw:text-box>
          <svg:title/>
          <svg:desc/>
        </draw:frame>
      </draw:page>
      <draw:page draw:name="Slide36" draw:style-name="a1341" draw:master-page-name="Master1-Layout2-obj-Title-and-Content" presentation:presentation-page-layout-name="Master1-PPL2" draw:id="Slide-291">
        <draw:frame draw:id="id304" presentation:style-name="a1344" draw:name="Title 1" svg:x="0.91667in" svg:y="0.05487in" svg:width="11.5in" svg:height="1.44965in" presentation:class="title" presentation:placeholder="false">
          <draw:text-box>
            <text:p text:style-name="a1343" text:class-names="" text:cond-style-name=""><text:span text:style-name="a1342" text:class-names="">What do I want?</text:span></text:p>
          </draw:text-box>
          <svg:title/>
          <svg:desc/>
        </draw:frame>
        <draw:frame draw:id="id306" draw:style-name="a1347" draw:name="TextBox 3" svg:x="0.55556in" svg:y="1.48937in" svg:width="9.01111in" svg:height="0.40391in">
          <draw:text-box>
            <text:p text:style-name="a1346" text:class-names="" text:cond-style-name="" text:id="id305"><text:span text:style-name="a1345" text:class-names="">1.) A model for how the voltage across a neuron's membrane changes over time</text:span></text:p>
          </draw:text-box>
          <svg:title/>
          <svg:desc/>
        </draw:frame>
        <draw:frame draw:id="id307" draw:style-name="a1348" draw:name="Picture 5" svg:x="2.40045in" svg:y="3.92303in" svg:width="8.53244in" svg:height="3.36505in" style:rel-width="scale" style:rel-height="scale">
          <draw:image xlink:href="media/image19.png" xlink:type="simple" xlink:show="embed" xlink:actuate="onLoad"/>
          <svg:title/>
          <svg:desc/>
        </draw:frame>
        <draw:frame draw:id="id309" draw:style-name="a1351" draw:name="TextBox 5" svg:x="0.55556in" svg:y="2.02892in" svg:width="8.07778in" svg:height="0.40391in">
          <draw:text-box>
            <text:p text:style-name="a1350" text:class-names="" text:cond-style-name="" text:id="id308"><text:span text:style-name="a1349" text:class-names="">2.) I want to be able to inject current in and change this voltage</text:span></text:p>
          </draw:text-box>
          <svg:title/>
          <svg:desc/>
        </draw:frame>
        <draw:frame draw:id="id311" draw:style-name="a1354" draw:name="TextBox 7" svg:x="0.55556in" svg:y="2.56847in" svg:width="10.43889in" svg:height="0.40391in">
          <draw:text-box>
            <text:p text:style-name="a1353" text:class-names="" text:cond-style-name="" text:id="id310"><text:span text:style-name="a1352" text:class-names="">3.) If the voltage goes over a certain threshold – I want it to “spike”</text:span></text:p>
          </draw:text-box>
          <svg:title/>
          <svg:desc/>
        </draw:frame>
        <draw:frame draw:id="id313" draw:style-name="a1364" draw:name="TextBox 9" svg:x="0.55556in" svg:y="3.10801in" svg:width="10.58888in" svg:height="0.40391in">
          <draw:text-box>
            <text:p text:style-name="a1363" text:class-names="" text:cond-style-name="" text:id="id312"><text:span text:style-name="a1355" text:class-names="">4.) In the absence of any input, I want the voltage to return to<text:s text:c="1"/></text:span><text:span text:style-name="a1356" text:class-names="">a</text:span><text:span text:style-name="a1357" text:class-names="">n</text:span><text:span text:style-name="a1358" text:class-names=""><text:s text:c="1"/>“</text:span><text:span text:style-name="a1359" text:class-names="">equilibriu</text:span><text:span text:style-name="a1360" text:class-names="">m</text:span><text:span text:style-name="a1361" text:class-names=""><text:s text:c="1"/></text:span><text:span text:style-name="a1362" text:class-names="">voltage”<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30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0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1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1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07" smil:attributeName="visibility" smil:to="visible" smil:begin="0.0s" smil:dur="0.001s" smil:fill="hold"/>
                </anim:par>
              </anim:par>
            </anim:par>
          </anim:seq>
        </anim:par>
      </draw:page>
      <draw:page draw:name="Slide5" draw:style-name="a1365" draw:master-page-name="Master1-Layout2-obj-Title-and-Content" presentation:presentation-page-layout-name="Master1-PPL2" draw:id="Slide-260">
        <draw:frame draw:id="id314" presentation:style-name="a1368" draw:name="Title 1" svg:x="0.91667in" svg:y="0.39931in" svg:width="11.5in" svg:height="1.44965in" presentation:class="title" presentation:placeholder="false">
          <draw:text-box>
            <text:p text:style-name="a1367" text:class-names="" text:cond-style-name=""><text:span text:style-name="a1366" text:class-names="">How about a dynamical system!?</text:span></text:p>
          </draw:text-box>
          <svg:title/>
          <svg:desc/>
        </draw:frame>
        <draw:frame draw:id="id315" presentation:style-name="a1376" draw:name="Content Placeholder 2" svg:x="0.82777in" svg:y="2.23128in" svg:width="1.82778in" svg:height="1.55903in" presentation:class="outline" presentation:placeholder="false">
          <draw:text-box>
            <text:list text:style-name="a1371">
              <text:list-item>
                <text:p text:style-name="a1370" text:class-names="" text:cond-style-name=""><text:span text:style-name="a1369" text:class-names=""/></text:p>
              </text:list-item>
            </text:list>
            <text:list text:style-name="a1375">
              <text:list-item>
                <text:p text:style-name="a1374" text:class-names="" text:cond-style-name=""><draw:frame draw:style-name="a1372" text:anchor-type="as-char" svg:x="1173.75854in" svg:y="0in" svg:width="0.86826in" svg:height="0.56958in" style:rel-width="scale" style:rel-height="scale"><draw:object xlink:href="Object 11/" xlink:type="simple" xlink:show="embed" xlink:actuate="onLoad"/></draw:frame><text:span text:style-name="a1373" text:class-names=""/></text:p>
              </text:list-item>
            </text:list>
          </draw:text-box>
          <svg:title/>
          <svg:desc/>
        </draw:frame>
        <draw:frame draw:id="id316" draw:style-name="a1377" draw:name="Picture 3" svg:x="3.66666in" svg:y="2.02674in" svg:width="7.56565in" svg:height="4.76215in" style:rel-width="scale" style:rel-height="scale">
          <draw:image xlink:href="media/image5.png" xlink:type="simple" xlink:show="embed" xlink:actuate="onLoad"/>
          <svg:title/>
          <svg:desc>A graph of a function

AI-generated content may be incorrect.</svg:desc>
        </draw:frame>
        <draw:frame draw:id="id318" draw:style-name="a1380" draw:name="TextBox 4" svg:x="10.12223in" svg:y="5.72191in" svg:width="3.63333in" svg:height="0.40391in">
          <draw:text-box>
            <text:p text:style-name="a1379" text:class-names="" text:cond-style-name="" text:id="id317"><text:span text:style-name="a1378" text:class-names="">well, that’s no good…..</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31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18" smil:attributeName="visibility" smil:to="visible" smil:begin="0.0s" smil:dur="0.001s" smil:fill="hold"/>
                </anim:par>
              </anim:par>
            </anim:par>
          </anim:seq>
        </anim:par>
      </draw:page>
      <draw:page draw:name="Slide41" draw:style-name="a1381" draw:master-page-name="Master1-Layout2-obj-Title-and-Content" presentation:presentation-page-layout-name="Master1-PPL2" draw:id="Slide-296">
        <draw:frame draw:id="id319" draw:style-name="a1382" draw:name="Picture 6" svg:x="3.07824in" svg:y="2.2108in" svg:width="8.67186in" svg:height="4.32254in" style:rel-width="scale" style:rel-height="scale">
          <draw:image xlink:href="media/image20.png" xlink:type="simple" xlink:show="embed" xlink:actuate="onLoad"/>
          <svg:title/>
          <svg:desc>A graph of a graph

AI-generated content may be incorrect.</svg:desc>
        </draw:frame>
        <draw:frame draw:id="id320" presentation:style-name="a1385" draw:name="Title 1" svg:x="0.82777in" svg:y="0.24184in" svg:width="11.5in" svg:height="1.44965in" presentation:class="title" presentation:placeholder="false">
          <draw:text-box>
            <text:p text:style-name="a1384" text:class-names="" text:cond-style-name=""><text:span text:style-name="a1383" text:class-names="">What if we subtract the current voltage….</text:span></text:p>
          </draw:text-box>
          <svg:title/>
          <svg:desc/>
        </draw:frame>
        <draw:frame draw:id="id321" presentation:style-name="a1393" draw:name="Content Placeholder 2" svg:x="0.82777in" svg:y="2.23128in" svg:width="1.82778in" svg:height="1.55903in" presentation:class="outline" presentation:placeholder="false">
          <draw:text-box>
            <text:list text:style-name="a1388">
              <text:list-item>
                <text:p text:style-name="a1387" text:class-names="" text:cond-style-name=""><text:span text:style-name="a1386" text:class-names=""/></text:p>
              </text:list-item>
            </text:list>
            <text:list text:style-name="a1392">
              <text:list-item>
                <text:p text:style-name="a1391" text:class-names="" text:cond-style-name=""><draw:frame draw:style-name="a1389" text:anchor-type="as-char" svg:x="1173.66479in" svg:y="0in" svg:width="1.05576in" svg:height="0.56958in" style:rel-width="scale" style:rel-height="scale"><draw:object xlink:href="Object 12/" xlink:type="simple" xlink:show="embed" xlink:actuate="onLoad"/></draw:frame><text:span text:style-name="a1390" text:class-names=""/></text:p>
              </text:list-item>
            </text:list>
          </draw:text-box>
          <svg:title/>
          <svg:desc/>
        </draw:frame>
        <draw:frame draw:id="id322" draw:style-name="a1396" draw:name="TextBox 4" svg:x="10.12223in" svg:y="5.72191in" svg:width="3.63333in" svg:height="0.40391in">
          <draw:text-box>
            <text:p text:style-name="a1395" text:class-names="" text:cond-style-name=""><text:span text:style-name="a1394" text:class-names="">That’s a little better</text:span></text:p>
          </draw:text-box>
          <svg:title/>
          <svg:desc/>
        </draw:frame>
      </draw:page>
      <draw:page draw:name="Slide42" draw:style-name="a1397" draw:master-page-name="Master1-Layout2-obj-Title-and-Content" presentation:presentation-page-layout-name="Master1-PPL2" draw:id="Slide-297">
        <draw:frame draw:id="id323" draw:style-name="a1398" draw:name="Picture 3" svg:x="3.56944in" svg:y="1.94705in" svg:width="9.00834in" svg:height="4.51838in" style:rel-width="scale" style:rel-height="scale">
          <draw:image xlink:href="media/image21.png" xlink:type="simple" xlink:show="embed" xlink:actuate="onLoad"/>
          <svg:title/>
          <svg:desc>A graph with arrows pointing to the center

AI-generated content may be incorrect.</svg:desc>
        </draw:frame>
        <draw:frame draw:id="id324" presentation:style-name="a1401" draw:name="Title 1" svg:x="0.82777in" svg:y="0.24184in" svg:width="11.5in" svg:height="1.44965in" presentation:class="title" presentation:placeholder="false">
          <draw:text-box>
            <text:p text:style-name="a1400" text:class-names="" text:cond-style-name=""><text:span text:style-name="a1399" text:class-names="">Add a term to determine the equilibrium voltage</text:span></text:p>
          </draw:text-box>
          <svg:title/>
          <svg:desc/>
        </draw:frame>
        <draw:frame draw:id="id325" presentation:style-name="a1409" draw:name="Content Placeholder 2" svg:x="0.82777in" svg:y="2.23128in" svg:width="3.2389in" svg:height="1.55903in" presentation:class="outline" presentation:placeholder="false">
          <draw:text-box>
            <text:list text:style-name="a1404">
              <text:list-item>
                <text:p text:style-name="a1403" text:class-names="" text:cond-style-name=""><text:span text:style-name="a1402" text:class-names=""/></text:p>
              </text:list-item>
            </text:list>
            <text:list text:style-name="a1408">
              <text:list-item>
                <text:p text:style-name="a1407" text:class-names="" text:cond-style-name=""><draw:frame draw:style-name="a1405" text:anchor-type="as-char" svg:x="1173.29951in" svg:y="0in" svg:width="1.78639in" svg:height="0.56958in" style:rel-width="scale" style:rel-height="scale"><draw:object xlink:href="Object 13/" xlink:type="simple" xlink:show="embed" xlink:actuate="onLoad"/></draw:frame><text:span text:style-name="a1406" text:class-names=""/></text:p>
              </text:list-item>
            </text:list>
          </draw:text-box>
          <svg:title/>
          <svg:desc/>
        </draw:frame>
        <draw:frame draw:id="id326" draw:style-name="a1412" draw:name="TextBox 4" svg:x="10.12223in" svg:y="5.72191in" svg:width="3.63333in" svg:height="0.40391in">
          <draw:text-box>
            <text:p text:style-name="a1411" text:class-names="" text:cond-style-name=""><text:span text:style-name="a1410" text:class-names="">That’s a little better again</text:span></text:p>
          </draw:text-box>
          <svg:title/>
          <svg:desc/>
        </draw:frame>
        <draw:frame draw:id="id327" draw:style-name="a1416" draw:name="TextBox 5" svg:x="9.38889in" svg:y="2.23128in" svg:width="1.17778in" svg:height="0.40391in">
          <draw:text-box>
            <text:p text:style-name="a1415" text:class-names="" text:cond-style-name=""><draw:frame draw:style-name="a1413" text:anchor-type="as-char" svg:x="1173.81347in" svg:y="0in" svg:width="0.7584in" svg:height="0.3in" style:rel-width="scale" style:rel-height="scale"><draw:object xlink:href="Object 14/" xlink:type="simple" xlink:show="embed" xlink:actuate="onLoad"/></draw:frame><text:span text:style-name="a1414" text:class-names=""/></text:p>
          </draw:text-box>
          <svg:title/>
          <svg:desc/>
        </draw:frame>
      </draw:page>
      <draw:page draw:name="Slide44" draw:style-name="a1417" draw:master-page-name="Master1-Layout2-obj-Title-and-Content" presentation:presentation-page-layout-name="Master1-PPL2" draw:id="Slide-299">
        <draw:frame draw:id="id328" presentation:style-name="a1420" draw:name="Title 1" svg:x="0.91667in" svg:y="0.39931in" svg:width="11.5in" svg:height="1.44965in" presentation:class="title" presentation:placeholder="false">
          <draw:text-box>
            <text:p text:style-name="a1419" text:class-names="" text:cond-style-name=""><text:span text:style-name="a1418" text:class-names="">Okay, but HOW leaky?</text:span></text:p>
          </draw:text-box>
          <svg:title/>
          <svg:desc/>
        </draw:frame>
        <draw:frame draw:id="id329" draw:style-name="a1426" draw:name="Content Placeholder 2" svg:x="0.82777in" svg:y="2.23128in" svg:width="3.2389in" svg:height="1.55903in">
          <draw:text-box>
            <text:p text:style-name="a1422" text:class-names="" text:cond-style-name=""><text:span text:style-name="a1421" text:class-names=""/></text:p>
            <text:p text:style-name="a1425" text:class-names="" text:cond-style-name=""><draw:frame draw:style-name="a1423" text:anchor-type="as-char" svg:x="1172.6491in" svg:y="0in" svg:width="3.12542in" svg:height="0.88597in" style:rel-width="scale" style:rel-height="scale"><draw:object xlink:href="Object 15/" xlink:type="simple" xlink:show="embed" xlink:actuate="onLoad"/></draw:frame><text:span text:style-name="a1424" text:class-names=""/></text:p>
          </draw:text-box>
          <svg:title/>
          <svg:desc/>
        </draw:frame>
        <draw:g draw:name="Group 42" draw:id="id330">
          <svg:title/>
          <svg:desc/>
          <draw:g draw:name="Group 27" draw:id="id353">
            <svg:title/>
            <svg:desc/>
            <draw:connector draw:type="line" svg:x1="8.8511in" svg:y1="2.99031in" svg:x2="12.00071in" svg:y2="2.99031in" draw:id="id361" draw:style-name="a1473" draw:name="Straight Connector 28">
              <svg:title/>
              <svg:desc/>
            </draw:connector>
            <draw:g draw:name="Group 29" draw:id="id362">
              <svg:title/>
              <svg:desc/>
              <draw:connector draw:type="line" svg:x1="8.86538in" svg:y1="2.98252in" svg:x2="8.86538in" svg:y2="3.14in" draw:id="id363" draw:style-name="a1474" draw:name="Straight Connector 30">
                <svg:title/>
                <svg:desc/>
              </draw:connector>
              <draw:connector draw:type="line" svg:x1="11.98404in" svg:y1="2.98252in" svg:x2="11.98404in" svg:y2="3.14in" draw:id="id364" draw:style-name="a1475" draw:name="Straight Connector 31">
                <svg:title/>
                <svg:desc/>
              </draw:connector>
              <draw:connector draw:type="line" svg:x1="9.90493in" svg:y1="2.98252in" svg:x2="9.90493in" svg:y2="3.14in" draw:id="id365" draw:style-name="a1476" draw:name="Straight Connector 32">
                <svg:title/>
                <svg:desc/>
              </draw:connector>
              <draw:connector draw:type="line" svg:x1="10.42471in" svg:y1="2.98252in" svg:x2="10.42471in" svg:y2="3.14in" draw:id="id366" draw:style-name="a1477" draw:name="Straight Connector 33">
                <svg:title/>
                <svg:desc/>
              </draw:connector>
              <draw:connector draw:type="line" svg:x1="10.94449in" svg:y1="2.98252in" svg:x2="10.94449in" svg:y2="3.14in" draw:id="id367" draw:style-name="a1478" draw:name="Straight Connector 34">
                <svg:title/>
                <svg:desc/>
              </draw:connector>
              <draw:connector draw:type="line" svg:x1="11.46426in" svg:y1="2.98252in" svg:x2="11.46426in" svg:y2="3.14in" draw:id="id368" draw:style-name="a1479" draw:name="Straight Connector 35">
                <svg:title/>
                <svg:desc/>
              </draw:connector>
              <draw:connector draw:type="line" svg:x1="9.38516in" svg:y1="2.98252in" svg:x2="9.38516in" svg:y2="3.14in" draw:id="id369" draw:style-name="a1480" draw:name="Straight Connector 36">
                <svg:title/>
                <svg:desc/>
              </draw:connector>
            </draw:g>
          </draw:g>
          <draw:custom-shape svg:x="10.32175in" svg:y="2.89233in" svg:width="0.19685in" svg:height="0.19685in" draw:id="id354" draw:style-name="a1464" draw:name="Oval 74">
            <svg:title/>
            <svg:desc/>
            <text:p text:style-name="a1463" text:class-names="" text:cond-style-name=""><text:span text:style-name="a14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77" draw:id="id355">
            <svg:title/>
            <svg:desc/>
            <draw:connector draw:type="line" svg:x1="11.64606in" svg:y1="2.98823in" svg:x2="11.33109in" svg:y2="2.98823in" draw:id="id359" draw:style-name="a1470" draw:name="Straight Arrow Connector 78">
              <svg:title/>
              <svg:desc/>
            </draw:connector>
            <draw:connector draw:type="line" svg:x1="11.12106in" svg:y1="2.98823in" svg:x2="10.80609in" svg:y2="2.98823in" draw:id="id360" draw:style-name="a1472" draw:name="Straight Arrow Connector 79">
              <svg:title/>
              <svg:desc/>
            </draw:connector>
          </draw:g>
          <draw:g draw:name="Group 80" draw:id="id356">
            <svg:title/>
            <svg:desc/>
            <draw:connector draw:type="line" svg:x1="9.19984in" svg:y1="2.98823in" svg:x2="9.51481in" svg:y2="2.98823in" draw:id="id357" draw:style-name="a1466" draw:name="Straight Arrow Connector 81">
              <svg:title/>
              <svg:desc/>
            </draw:connector>
            <draw:connector draw:type="line" svg:x1="9.72484in" svg:y1="2.98823in" svg:x2="10.03981in" svg:y2="2.98823in" draw:id="id358" draw:style-name="a1468" draw:name="Straight Arrow Connector 82">
              <svg:title/>
              <svg:desc/>
            </draw:connector>
          </draw:g>
        </draw:g>
        <draw:frame draw:id="id331" draw:style-name="a1432" draw:name="TextBox 54" svg:x="6.19913in" svg:y="2.11881in" svg:width="3.06754in" svg:height="0.40391in">
          <draw:text-box>
            <text:p text:style-name="a1431" text:class-names="" text:cond-style-name=""><text:span text:style-name="a1427" text:class-names="">Small<text:s text:c="1"/></text:span><draw:frame draw:style-name="a1428" text:anchor-type="as-char" svg:x="1174.04542in" svg:y="0in" svg:width="0.29451in" svg:height="0.3in" style:rel-width="scale" style:rel-height="scale"><draw:object xlink:href="Object 16/" xlink:type="simple" xlink:show="embed" xlink:actuate="onLoad"/></draw:frame><text:span text:style-name="a1429" text:class-names=""><text:s text:c="1"/>(not very leaky)</text:span><text:span text:style-name="a1430" text:class-names=""/></text:p>
          </draw:text-box>
          <svg:title/>
          <svg:desc/>
        </draw:frame>
        <draw:frame draw:id="id332" draw:style-name="a1438" draw:name="TextBox 55" svg:x="6.44145in" svg:y="5.32623in" svg:width="3.06754in" svg:height="0.40391in">
          <draw:text-box>
            <text:p text:style-name="a1437" text:class-names="" text:cond-style-name=""><text:span text:style-name="a1433" text:class-names="">Big<text:s text:c="1"/></text:span><draw:frame draw:style-name="a1434" text:anchor-type="as-char" svg:x="1174.04542in" svg:y="0in" svg:width="0.29451in" svg:height="0.3in" style:rel-width="scale" style:rel-height="scale"><draw:object xlink:href="Object 17/" xlink:type="simple" xlink:show="embed" xlink:actuate="onLoad"/></draw:frame><text:span text:style-name="a1435" text:class-names=""><text:s text:c="1"/></text:span><text:span text:style-name="a1436" text:class-names="">(very leaky!)</text:span></text:p>
          </draw:text-box>
          <svg:title/>
          <svg:desc/>
        </draw:frame>
        <draw:g draw:name="Group 41" draw:id="id333">
          <svg:title/>
          <svg:desc/>
          <draw:g draw:name="Group 37" draw:id="id334">
            <svg:title/>
            <svg:desc/>
            <draw:connector draw:type="line" svg:x1="8.85582in" svg:y1="6.28479in" svg:x2="12.00543in" svg:y2="6.28479in" draw:id="id344" draw:style-name="a1454" draw:name="Straight Connector 38">
              <svg:title/>
              <svg:desc/>
            </draw:connector>
            <draw:g draw:name="Group 39" draw:id="id345">
              <svg:title/>
              <svg:desc/>
              <draw:connector draw:type="line" svg:x1="8.8701in" svg:y1="6.277in" svg:x2="8.8701in" svg:y2="6.43448in" draw:id="id346" draw:style-name="a1455" draw:name="Straight Connector 40">
                <svg:title/>
                <svg:desc/>
              </draw:connector>
              <draw:connector draw:type="line" svg:x1="11.98876in" svg:y1="6.277in" svg:x2="11.98876in" svg:y2="6.43448in" draw:id="id347" draw:style-name="a1456" draw:name="Straight Connector 41">
                <svg:title/>
                <svg:desc/>
              </draw:connector>
              <draw:connector draw:type="line" svg:x1="9.90965in" svg:y1="6.277in" svg:x2="9.90965in" svg:y2="6.43448in" draw:id="id348" draw:style-name="a1457" draw:name="Straight Connector 42">
                <svg:title/>
                <svg:desc/>
              </draw:connector>
              <draw:connector draw:type="line" svg:x1="10.42943in" svg:y1="6.277in" svg:x2="10.42943in" svg:y2="6.43448in" draw:id="id349" draw:style-name="a1458" draw:name="Straight Connector 43">
                <svg:title/>
                <svg:desc/>
              </draw:connector>
              <draw:connector draw:type="line" svg:x1="10.94921in" svg:y1="6.277in" svg:x2="10.94921in" svg:y2="6.43448in" draw:id="id350" draw:style-name="a1459" draw:name="Straight Connector 44">
                <svg:title/>
                <svg:desc/>
              </draw:connector>
              <draw:connector draw:type="line" svg:x1="11.46898in" svg:y1="6.277in" svg:x2="11.46898in" svg:y2="6.43448in" draw:id="id351" draw:style-name="a1460" draw:name="Straight Connector 45">
                <svg:title/>
                <svg:desc/>
              </draw:connector>
              <draw:connector draw:type="line" svg:x1="9.38988in" svg:y1="6.277in" svg:x2="9.38988in" svg:y2="6.43448in" draw:id="id352" draw:style-name="a1461" draw:name="Straight Connector 46">
                <svg:title/>
                <svg:desc/>
              </draw:connector>
            </draw:g>
          </draw:g>
          <draw:custom-shape svg:x="10.32819in" svg:y="6.18208in" svg:width="0.19685in" svg:height="0.19685in" draw:id="id335" draw:style-name="a1441" draw:name="Oval 76">
            <svg:title/>
            <svg:desc/>
            <text:p text:style-name="a1440" text:class-names="" text:cond-style-name=""><text:span text:style-name="a1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91" draw:id="id336">
            <svg:title/>
            <svg:desc/>
            <draw:connector draw:type="line" svg:x1="11.71903in" svg:y1="6.28049in" svg:x2="11.2035in" svg:y2="6.28049in" draw:id="id341" draw:style-name="a1449" draw:name="Straight Arrow Connector 92">
              <svg:title/>
              <svg:desc/>
            </draw:connector>
            <draw:connector draw:type="line" svg:x1="11.2035in" svg:y1="6.28049in" svg:x2="10.55639in" svg:y2="6.28049in" draw:id="id342" draw:style-name="a1451" draw:name="Straight Arrow Connector 93">
              <svg:title/>
              <svg:desc/>
            </draw:connector>
            <draw:connector draw:type="line" svg:x1="12.13119in" svg:y1="6.28049in" svg:x2="11.71904in" svg:y2="6.28049in" draw:id="id343" draw:style-name="a1453" draw:name="Straight Arrow Connector 94">
              <svg:title/>
              <svg:desc/>
            </draw:connector>
          </draw:g>
          <draw:g draw:name="Group 95" draw:id="id337">
            <svg:title/>
            <svg:desc/>
            <draw:connector draw:type="line" svg:x1="9.13277in" svg:y1="6.28049in" svg:x2="9.64831in" svg:y2="6.28049in" draw:id="id338" draw:style-name="a1443" draw:name="Straight Arrow Connector 96">
              <svg:title/>
              <svg:desc/>
            </draw:connector>
            <draw:connector draw:type="line" svg:x1="9.64831in" svg:y1="6.28049in" svg:x2="10.29542in" svg:y2="6.28049in" draw:id="id339" draw:style-name="a1445" draw:name="Straight Arrow Connector 97">
              <svg:title/>
              <svg:desc/>
            </draw:connector>
            <draw:connector draw:type="line" svg:x1="8.72062in" svg:y1="6.28049in" svg:x2="9.13277in" svg:y2="6.28049in" draw:id="id340" draw:style-name="a1447" draw:name="Straight Arrow Connector 98">
              <svg:title/>
              <svg:desc/>
            </draw:connector>
          </draw:g>
        </draw:g>
      </draw:page>
      <draw:page draw:name="Slide43" draw:style-name="a1481" draw:master-page-name="Master1-Layout2-obj-Title-and-Content" presentation:presentation-page-layout-name="Master1-PPL2" draw:id="Slide-298">
        <draw:frame draw:id="id370" presentation:style-name="a1484" draw:name="Title 1" svg:x="0.43011in" svg:y="0.23802in" svg:width="11.5in" svg:height="1.44965in" presentation:class="title" presentation:placeholder="false">
          <draw:text-box>
            <text:p text:style-name="a1483" text:class-names="" text:cond-style-name=""><text:span text:style-name="a1482" text:class-names="">Now let’s inject some current!</text:span></text:p>
          </draw:text-box>
          <svg:title/>
          <svg:desc/>
        </draw:frame>
        <draw:frame draw:id="id371" presentation:style-name="a1492" draw:name="Content Placeholder 2" svg:x="0.34121in" svg:y="1.84896in" svg:width="4.11668in" svg:height="1.55903in" presentation:class="outline" presentation:placeholder="false">
          <draw:text-box>
            <text:list text:style-name="a1487">
              <text:list-item>
                <text:p text:style-name="a1486" text:class-names="" text:cond-style-name=""><text:span text:style-name="a1485" text:class-names=""/></text:p>
              </text:list-item>
            </text:list>
            <text:list text:style-name="a1491">
              <text:list-item>
                <text:p text:style-name="a1490" text:class-names="" text:cond-style-name=""><draw:frame draw:style-name="a1488" text:anchor-type="as-char" svg:x="1172.98639in" svg:y="0in" svg:width="2.41264in" svg:height="0.56958in" style:rel-width="scale" style:rel-height="scale"><draw:object xlink:href="Object 18/" xlink:type="simple" xlink:show="embed" xlink:actuate="onLoad"/></draw:frame><text:span text:style-name="a1489" text:class-names=""/></text:p>
              </text:list-item>
            </text:list>
          </draw:text-box>
          <svg:title/>
          <svg:desc/>
        </draw:frame>
        <draw:frame draw:id="id372" draw:style-name="a1493" draw:name="Picture 4" svg:x="4.94445in" svg:y="1.5914in" svg:width="7.95878in" svg:height="5.8106in" style:rel-width="scale" style:rel-height="scale">
          <draw:image xlink:href="media/image22.png" xlink:type="simple" xlink:show="embed" xlink:actuate="onLoad"/>
          <svg:title/>
          <svg:desc>A graph of a graph

AI-generated content may be incorrect.</svg:desc>
        </draw:frame>
      </draw:page>
      <draw:page draw:name="Slide45" draw:style-name="a1494" draw:master-page-name="Master1-Layout2-obj-Title-and-Content" presentation:presentation-page-layout-name="Master1-PPL2" draw:id="Slide-300">
        <draw:frame draw:id="id373" presentation:style-name="a1497" draw:name="Title 1" svg:x="0.91667in" svg:y="0.39931in" svg:width="11.5in" svg:height="1.44965in" presentation:class="title" presentation:placeholder="false">
          <draw:text-box>
            <text:p text:style-name="a1496" text:class-names="" text:cond-style-name=""><text:span text:style-name="a1495" text:class-names="">By altering the leak conductance, <text:s text:c="1"/>we change how current is integrated</text:span></text:p>
          </draw:text-box>
          <svg:title/>
          <svg:desc/>
        </draw:frame>
        <draw:frame draw:id="id374" draw:style-name="a1498" draw:name="Picture 8" svg:x="0.17634in" svg:y="2.38401in" svg:width="6.40001in" svg:height="4.80001in" style:rel-width="scale" style:rel-height="scale">
          <draw:image xlink:href="media/image23.png" xlink:type="simple" xlink:show="embed" xlink:actuate="onLoad"/>
          <svg:title/>
          <svg:desc>A graph of a graph

AI-generated content may be incorrect.</svg:desc>
        </draw:frame>
        <draw:frame draw:id="id375" draw:style-name="a1499" draw:name="Picture 10" svg:x="6.75698in" svg:y="2.38401in" svg:width="6.40001in" svg:height="4.80001in" style:rel-width="scale" style:rel-height="scale">
          <draw:image xlink:href="media/image24.png" xlink:type="simple" xlink:show="embed" xlink:actuate="onLoad"/>
          <svg:title/>
          <svg:desc>A graph of a graph of a graph

AI-generated content may be incorrect.</svg:desc>
        </draw:frame>
        <draw:frame draw:id="id376" draw:style-name="a1502" draw:name="TextBox 11" svg:x="1.55914in" svg:y="2.52688in" svg:width="1.3871in" svg:height="0.40391in">
          <draw:text-box>
            <text:p text:style-name="a1501" text:class-names="" text:cond-style-name=""><text:span text:style-name="a1500" text:class-names="">gl = 0.4</text:span></text:p>
          </draw:text-box>
          <svg:title/>
          <svg:desc/>
        </draw:frame>
        <draw:frame draw:id="id377" draw:style-name="a1505" draw:name="TextBox 12" svg:x="8.13441in" svg:y="2.72884in" svg:width="1.3871in" svg:height="0.40391in">
          <draw:text-box>
            <text:p text:style-name="a1504" text:class-names="" text:cond-style-name=""><text:span text:style-name="a1503" text:class-names="">gl = 4</text:span></text:p>
          </draw:text-box>
          <svg:title/>
          <svg:desc/>
        </draw:frame>
      </draw:page>
      <draw:page draw:name="Slide46" draw:style-name="a1506" draw:master-page-name="Master1-Layout2-obj-Title-and-Content" presentation:presentation-page-layout-name="Master1-PPL2" draw:id="Slide-301">
        <draw:frame draw:id="id378" draw:style-name="a1507" draw:name="Picture 9" svg:x="2.52222in" svg:y="2.9423in" svg:width="8.61667in" svg:height="4.36951in" style:rel-width="scale" style:rel-height="scale">
          <draw:image xlink:href="media/image25.png" xlink:type="simple" xlink:show="embed" xlink:actuate="onLoad"/>
          <svg:title/>
          <svg:desc>A graph of a graph

AI-generated content may be incorrect.</svg:desc>
        </draw:frame>
        <draw:frame draw:id="id379" presentation:style-name="a1516" draw:name="Title 1" svg:x="0.19444in" svg:y="0.18819in" svg:width="13.13889in" svg:height="1.44965in" presentation:class="title" presentation:placeholder="false">
          <draw:text-box>
            <text:p text:style-name="a1515" text:class-names="" text:cond-style-name=""><text:span text:style-name="a1508" text:class-names="">Add in the<text:s text:c="1"/></text:span><text:span text:style-name="a1509" text:class-names="">spiking</text:span><text:span text:style-name="a1510" text:class-names=""><text:s text:c="1"/>-<text:s text:c="1"/></text:span><text:span text:style-name="a1511" text:class-names="">(</text:span><text:span text:style-name="a1512" text:class-names="">basically,</text:span><text:span text:style-name="a1513" text:class-names=""><text:s text:c="1"/></text:span><text:span text:style-name="a1514" text:class-names="">cheat with computers)</text:span></text:p>
          </draw:text-box>
          <svg:title/>
          <svg:desc/>
        </draw:frame>
        <draw:frame draw:id="id380" draw:style-name="a1528" draw:name="TextBox 5" svg:x="0.19444in" svg:y="1.63785in" svg:width="6.3in" svg:height="1.00977in">
          <draw:text-box>
            <text:p text:style-name="a1519" text:class-names="" text:cond-style-name=""><text:span text:style-name="a1517" text:class-names="">At each timepoint:</text:span><text:span text:style-name="a1518" text:class-names=""/></text:p>
            <text:list text:style-name="a1523">
              <text:list-item>
                <text:list text:style-name="a1523">
                  <text:list-item>
                    <text:p text:style-name="a1522" text:class-names="" text:cond-style-name=""><text:span text:style-name="a1520" text:class-names="">If voltage &gt;= Threshold voltage</text:span><text:span text:style-name="a1521" text:class-names=""/></text:p>
                  </text:list-item>
                </text:list>
              </text:list-item>
            </text:list>
            <text:list text:style-name="a1527">
              <text:list-item>
                <text:list text:style-name="a1527">
                  <text:list-item>
                    <text:p text:style-name="a1526" text:class-names="" text:cond-style-name=""><text:span text:style-name="a1524" text:class-names="">Record a spike time – and subtract some voltage <text:s text:c="1"/></text:span><text:span text:style-name="a1525" text:class-names=""/></text:p>
                  </text:list-item>
                </text:list>
              </text:list-item>
            </text:list>
          </draw:text-box>
          <svg:title/>
          <svg:desc/>
        </draw:frame>
      </draw:page>
      <draw:page draw:name="Slide47" draw:style-name="a1529" draw:master-page-name="Master1-Layout2-obj-Title-and-Content" presentation:presentation-page-layout-name="Master1-PPL2" draw:id="Slide-302">
        <draw:frame draw:id="id381" presentation:style-name="a1532" draw:name="Title 1" svg:x="0.91667in" svg:y="0.39931in" svg:width="11.5in" svg:height="1.44965in" presentation:class="title" presentation:placeholder="false">
          <draw:text-box>
            <text:p text:style-name="a1531" text:class-names="" text:cond-style-name=""><text:span text:style-name="a1530" text:class-names="">Spiking behaviour</text:span></text:p>
          </draw:text-box>
          <svg:title/>
          <svg:desc/>
        </draw:frame>
        <draw:frame draw:id="id382" draw:style-name="a1536" draw:name="TextBox 3" svg:x="0.17778in" svg:y="1.99201in" svg:width="9.42222in" svg:height="0.40391in">
          <draw:text-box>
            <text:p text:style-name="a1535" text:class-names="" text:cond-style-name=""><text:span text:style-name="a1533" text:class-names="">We can then go through later and change the voltage to 0.3 at the spike times…</text:span><text:span text:style-name="a1534" text:class-names=""/></text:p>
          </draw:text-box>
          <svg:title/>
          <svg:desc/>
        </draw:frame>
        <draw:frame draw:id="id383" draw:style-name="a1537" draw:name="Picture 10" svg:x="2.52222in" svg:y="2.92764in" svg:width="8.61667in" svg:height="4.35289in" style:rel-width="scale" style:rel-height="scale">
          <draw:image xlink:href="media/image26.png" xlink:type="simple" xlink:show="embed" xlink:actuate="onLoad"/>
          <svg:title/>
          <svg:desc>A graph of a graph

AI-generated content may be incorrect.</svg:desc>
        </draw:frame>
      </draw:page>
      <draw:page draw:name="Slide56" draw:style-name="a1538" draw:master-page-name="Master1-Layout7-blank-Blank" presentation:presentation-page-layout-name="Master1-PPL7" draw:id="Slide-311">
        <draw:frame draw:id="id384" draw:style-name="a1661" draw:name="TextBox 3" svg:x="0in" svg:y="0in" svg:width="13.33333in" svg:height="7.57324in">
          <draw:text-box>
            <text:p text:style-name="a1660" text:class-names="" text:cond-style-name=""><text:span text:style-name="a1539" text:class-names="">def<text:s text:c="1"/></text:span><text:span text:style-name="a1540" text:class-names="">simulate_lif_neuron</text:span><text:span text:style-name="a1541" text:class-names="">(model</text:span><text:span text:style-name="a1542" text:class-names="">,</text:span><text:span text:style-name="a1543" text:class-names=""><text:s text:c="1"/></text:span><text:span text:style-name="a1544" text:class-names="">input</text:span><text:span text:style-name="a1545" text:class-names="">_currents</text:span><text:span text:style-name="a1546" text:class-names="">,</text:span><text:span text:style-name="a1547" text:class-names=""><text:s text:c="1"/></text:span><text:span text:style-name="a1548" text:class-names="">timestep</text:span><text:span text:style-name="a1549" text:class-names="">=</text:span><text:span text:style-name="a1550" text:class-names="">0.1</text:span><text:span text:style-name="a1551" text:class-names="">,</text:span><text:span text:style-name="a1552" text:class-names=""><text:s text:c="1"/></text:span><text:span text:style-name="a1553" text:class-names="">n</text:span><text:span text:style-name="a1554" text:class-names="">_timepoints</text:span><text:span text:style-name="a1555" text:class-names="">=</text:span><text:span text:style-name="a1556" text:class-names="">100</text:span><text:span text:style-name="a1557" text:class-names="">,</text:span><text:span text:style-name="a1558" text:class-names=""><text:s text:c="1"/></text:span><text:span text:style-name="a1559" text:class-names="">equilibrium</text:span><text:span text:style-name="a1560" text:class-names="">_voltage</text:span><text:span text:style-name="a1561" text:class-names="">=-</text:span><text:span text:style-name="a1562" text:class-names="">0.7</text:span><text:span text:style-name="a1563" text:class-names="">,</text:span><text:span text:style-name="a1564" text:class-names=""><text:s text:c="1"/></text:span><text:span text:style-name="a1565" text:class-names="">l</text:span><text:span text:style-name="a1566" text:class-names="">eak</text:span><text:span text:style-name="a1567" text:class-names="">_conductance</text:span><text:span text:style-name="a1568" text:class-names="">=</text:span><text:span text:style-name="a1569" text:class-names="">0.5</text:span><text:span text:style-name="a1570" text:class-names="">,</text:span><text:span text:style-name="a1571" text:class-names=""><text:s text:c="1"/></text:span><text:span text:style-name="a1572" text:class-names="">threshold</text:span><text:span text:style-name="a1573" text:class-names="">_voltage</text:span><text:span text:style-name="a1574" text:class-names="">=-</text:span><text:span text:style-name="a1575" text:class-names="">0.55</text:span><text:span text:style-name="a1576" text:class-names="">):<text:line-break/><text:line-break/> <text:s text:c="3"/></text:span><text:span text:style-name="a1577" text:class-names="">membrane_voltage</text:span><text:span text:style-name="a1578" text:class-names=""><text:s text:c="1"/>=<text:s text:c="1"/></text:span><text:span text:style-name="a1579" text:class-names="">np.zeros</text:span><text:span text:style-name="a1580" text:class-names="">(</text:span><text:span text:style-name="a1581" text:class-names="">n_timepoints</text:span><text:span text:style-name="a1582" text:class-names="">)<text:line-break/> <text:s text:c="3"/></text:span><text:span text:style-name="a1583" text:class-names="">spike_times</text:span><text:span text:style-name="a1584" text:class-names=""><text:s text:c="1"/>= []<text:line-break/><text:line-break/> <text:s text:c="3"/></text:span><text:span text:style-name="a1585" text:class-names="">current_voltage</text:span><text:span text:style-name="a1586" text:class-names=""><text:s text:c="1"/>=<text:s text:c="1"/></text:span><text:span text:style-name="a1587" text:class-names="">equilibrium_voltage</text:span><text:span text:style-name="a1588" text:class-names=""><text:line-break/> <text:s text:c="3"/></text:span><text:span text:style-name="a1589" text:class-names="">for<text:s text:c="1"/></text:span><text:span text:style-name="a1590" text:class-names="">timepoint<text:s text:c="1"/></text:span><text:span text:style-name="a1591" text:class-names="">in<text:s text:c="1"/></text:span><text:span text:style-name="a1592" text:class-names="">range</text:span><text:span text:style-name="a1593" text:class-names="">(</text:span><text:span text:style-name="a1594" text:class-names="">n_timepoints</text:span><text:span text:style-name="a1595" text:class-names="">):<text:line-break/><text:line-break/> <text:s text:c="7"/></text:span><text:span text:style-name="a1596" text:class-names=""># Check If Voltage Above Threshold<text:line-break/> <text:s text:c="7"/></text:span><text:span text:style-name="a1597" text:class-names="">if<text:s text:c="1"/></text:span><text:span text:style-name="a1598" text:class-names="">current_voltage</text:span><text:span text:style-name="a1599" text:class-names=""><text:s text:c="1"/>&gt;=<text:s text:c="1"/></text:span><text:span text:style-name="a1600" text:class-names="">threshold_voltage</text:span><text:span text:style-name="a1601" text:class-names="">:<text:line-break/> <text:s text:c="11"/></text:span><text:span text:style-name="a1602" text:class-names="">spike_times.append</text:span><text:span text:style-name="a1603" text:class-names="">(timepoint)<text:s text:c="1"/></text:span><text:span text:style-name="a1604" text:class-names=""># Record Spike<text:line-break/> <text:s text:c="11"/></text:span><text:span text:style-name="a1605" text:class-names="">current_voltage</text:span><text:span text:style-name="a1606" text:class-names=""><text:s text:c="1"/>=<text:s text:c="1"/></text:span><text:span text:style-name="a1607" text:class-names="">current_voltage</text:span><text:span text:style-name="a1608" text:class-names=""><text:s text:c="1"/>-</text:span><text:span text:style-name="a1609" text:class-names="">0.3 <text:s text:c="1"/></text:span><text:span text:style-name="a1610" text:class-names=""># Reset the neuron by subtracting the threshold voltage<text:line-break/><text:line-break/> <text:s text:c="7"/># Otherwise Compute the voltage using our dynamical system<text:line-break/> <text:s text:c="7"/></text:span><text:span text:style-name="a1611" text:class-names="">elif</text:span><text:span text:style-name="a1612" text:class-names=""><text:s text:c="1"/></text:span><text:span text:style-name="a1613" text:class-names="">current_voltage</text:span><text:span text:style-name="a1614" text:class-names=""><text:s text:c="1"/>&lt;<text:s text:c="1"/></text:span><text:span text:style-name="a1615" text:class-names="">threshold_voltage</text:span><text:span text:style-name="a1616" text:class-names="">:<text:line-break/><text:line-break/> <text:s text:c="11"/></text:span><text:span text:style-name="a1617" text:class-names=""># Get Input Current At This Timepoint<text:line-break/> <text:s text:c="11"/></text:span><text:span text:style-name="a1618" text:class-names="">timepoint_input_current</text:span><text:span text:style-name="a1619" text:class-names=""><text:s text:c="1"/>=<text:s text:c="1"/></text:span><text:span text:style-name="a1620" text:class-names="">input_currents</text:span><text:span text:style-name="a1621" text:class-names="">[timepoint]<text:line-break/><text:line-break/> <text:s text:c="11"/></text:span><text:span text:style-name="a1622" text:class-names=""># Get Derivative<text:line-break/> <text:s text:c="11"/></text:span><text:span text:style-name="a1623" text:class-names="">derivative</text:span><text:span text:style-name="a1624" text:class-names=""><text:s text:c="1"/>= model(</text:span><text:span text:style-name="a1625" text:class-names="">current_voltage</text:span><text:span text:style-name="a1626" text:class-names="">,<text:s text:c="1"/></text:span><text:span text:style-name="a1627" text:class-names="">timepoint_input_current</text:span><text:span text:style-name="a1628" text:class-names="">,<text:s text:c="1"/></text:span><text:span text:style-name="a1629" text:class-names="">equilibrium_voltage</text:span><text:span text:style-name="a1630" text:class-names="">=</text:span><text:span text:style-name="a1631" text:class-names="">equilibrium_voltage</text:span><text:span text:style-name="a1632" text:class-names="">,<text:s text:c="1"/></text:span><text:span text:style-name="a1633" text:class-names="">leak_conductance</text:span><text:span text:style-name="a1634" text:class-names="">=</text:span><text:span text:style-name="a1635" text:class-names="">leak_conductance</text:span><text:span text:style-name="a1636" text:class-names="">)<text:line-break/><text:line-break/> <text:s text:c="11"/></text:span><text:span text:style-name="a1637" text:class-names=""># Multiply By Timestep<text:line-break/> <text:s text:c="11"/></text:span><text:span text:style-name="a1638" text:class-names="">derivative = derivative * timestep<text:line-break/><text:line-break/> <text:s text:c="11"/></text:span><text:span text:style-name="a1639" text:class-names=""># Add To Current voltage To Get New Voltage<text:line-break/> <text:s text:c="11"/></text:span><text:span text:style-name="a1640" text:class-names="">new_voltage</text:span><text:span text:style-name="a1641" text:class-names=""><text:s text:c="1"/>=<text:s text:c="1"/></text:span><text:span text:style-name="a1642" text:class-names="">current_voltage</text:span><text:span text:style-name="a1643" text:class-names=""><text:s text:c="1"/>+ derivative<text:line-break/><text:line-break/> <text:s text:c="11"/></text:span><text:span text:style-name="a1644" text:class-names=""># Set Current Voltage To New Voltage<text:line-break/> <text:s text:c="11"/></text:span><text:span text:style-name="a1645" text:class-names="">current_voltage</text:span><text:span text:style-name="a1646" text:class-names=""><text:s text:c="1"/>=<text:s text:c="1"/></text:span><text:span text:style-name="a1647" text:class-names="">new_voltage</text:span><text:span text:style-name="a1648" text:class-names=""><text:line-break/><text:line-break/> <text:s text:c="7"/></text:span><text:span text:style-name="a1649" text:class-names=""># Add Current Voltage To Trajectory<text:line-break/> <text:s text:c="7"/></text:span><text:span text:style-name="a1650" text:class-names="">membrane_voltage</text:span><text:span text:style-name="a1651" text:class-names="">[timepoint] =<text:s text:c="1"/></text:span><text:span text:style-name="a1652" text:class-names="">current_voltage</text:span><text:span text:style-name="a1653" text:class-names=""><text:line-break/><text:line-break/><text:line-break/> <text:s text:c="3"/></text:span><text:span text:style-name="a1654" text:class-names="">return<text:s text:c="1"/></text:span><text:span text:style-name="a1655" text:class-names="">membrane_voltage</text:span><text:span text:style-name="a1656" text:class-names="">,<text:s text:c="1"/></text:span><text:span text:style-name="a1657" text:class-names="">spike_times</text:span><text:span text:style-name="a1658" text:class-names=""><text:line-break/></text:span><text:span text:style-name="a1659" text:class-names=""/></text:p>
          </draw:text-box>
          <svg:title/>
          <svg:desc/>
        </draw:frame>
      </draw:page>
      <draw:page draw:name="Slide48" draw:style-name="a1662" draw:master-page-name="Master1-Layout3-secHead-Section-Header" presentation:presentation-page-layout-name="Master1-PPL3" draw:id="Slide-303">
        <draw:frame draw:id="id385" presentation:style-name="a1665" draw:name="Title 1" svg:x="0.90972in" svg:y="1.86979in" svg:width="11.5in" svg:height="3.11979in" presentation:class="title" presentation:placeholder="false">
          <draw:text-box>
            <text:p text:style-name="a1664" text:class-names="" text:cond-style-name=""><text:span text:style-name="a1663" text:class-names="">Finding the fixed points of a dynamical system</text:span></text:p>
          </draw:text-box>
          <svg:title/>
          <svg:desc/>
        </draw:frame>
      </draw:page>
      <draw:page draw:name="Slide49" draw:style-name="a1666" draw:master-page-name="Master1-Layout7-blank-Blank" presentation:presentation-page-layout-name="Master1-PPL7" draw:id="Slide-304">
        <draw:frame draw:id="id386" draw:style-name="a1669" draw:name="Content Placeholder 2" svg:x="0.5672in" svg:y="1.0701in" svg:width="4.45502in" svg:height="0.48373in">
          <draw:text-box>
            <text:p text:style-name="a1668" text:class-names="" text:cond-style-name=""><text:span text:style-name="a1667" text:class-names="">Dynamical System</text:span></text:p>
          </draw:text-box>
          <svg:title/>
          <svg:desc/>
        </draw:frame>
        <draw:frame draw:id="id387" draw:style-name="a1673" draw:name="TextBox 27" svg:x="4.25738in" svg:y="0.81417in" svg:width="2.26075in" svg:height="0.9956in">
          <draw:text-box>
            <text:p text:style-name="a1672" text:class-names="" text:cond-style-name=""><draw:frame draw:style-name="a1670" text:anchor-type="as-char" svg:x="1173.29979in" svg:y="0in" svg:width="1.82403in" svg:height="0.88597in" style:rel-width="scale" style:rel-height="scale"><draw:object xlink:href="Object 19/" xlink:type="simple" xlink:show="embed" xlink:actuate="onLoad"/></draw:frame><text:span text:style-name="a1671" text:class-names=""/></text:p>
          </draw:text-box>
          <svg:title/>
          <svg:desc/>
        </draw:frame>
        <draw:frame draw:id="id388" draw:style-name="a1679" draw:name="Content Placeholder 2" svg:x="0.5672in" svg:y="3.44044in" svg:width="10.98835in" svg:height="0.48373in">
          <draw:text-box>
            <text:p text:style-name="a1678" text:class-names="" text:cond-style-name=""><text:span text:style-name="a1674" text:class-names="">Fixed</text:span><text:span text:style-name="a1675" text:class-names=""><text:s text:c="1"/></text:span><text:span text:style-name="a1676" text:class-names="">points are where this function = 0</text:span><text:span text:style-name="a1677" text:class-names=""/></text:p>
          </draw:text-box>
          <svg:title/>
          <svg:desc/>
        </draw:frame>
        <draw:frame draw:id="id389" draw:style-name="a1683" draw:name="Content Placeholder 2" svg:x="0.5672in" svg:y="5.81077in" svg:width="11.90185in" svg:height="0.48373in">
          <draw:text-box>
            <text:p text:style-name="a1682" text:class-names="" text:cond-style-name=""><text:span text:style-name="a1680" text:class-names="">Finding the points of a function where it = 0 is known as “root finding”</text:span><text:span text:style-name="a1681" text:class-names=""/></text:p>
          </draw:text-box>
          <svg:title/>
          <svg:desc/>
        </draw:frame>
      </draw:page>
      <draw:page draw:name="Slide50" draw:style-name="a1684" draw:master-page-name="Master1-Layout2-obj-Title-and-Content" presentation:presentation-page-layout-name="Master1-PPL2" draw:id="Slide-305">
        <draw:frame draw:id="id390" presentation:style-name="a1688" draw:name="Title 1" svg:x="0.91667in" svg:y="0.39931in" svg:width="11.5in" svg:height="1.44965in" presentation:class="title" presentation:placeholder="false">
          <draw:text-box>
            <text:p text:style-name="a1687" text:class-names="" text:cond-style-name=""><text:span text:style-name="a1685" text:class-names="">Newton–Raphson method</text:span><text:span text:style-name="a1686" text:class-names=""/></text:p>
          </draw:text-box>
          <svg:title/>
          <svg:desc/>
        </draw:frame>
        <draw:g draw:name="Group 10" draw:id="id391">
          <svg:title/>
          <svg:desc/>
          <draw:g draw:name="Group 9" draw:id="id421">
            <svg:title/>
            <svg:desc/>
            <draw:connector draw:type="line" svg:x1="6.66667in" svg:y1="2.58387in" svg:x2="6.66667in" svg:y2="6.52088in" draw:id="id423" draw:style-name="a1762" draw:name="Straight Connector 4">
              <svg:title/>
              <svg:desc/>
            </draw:connector>
            <draw:connector draw:type="line" svg:x1="8.63517in" svg:y1="4.55237in" svg:x2="8.63517in" svg:y2="8.48938in" draw:id="id424" draw:style-name="a1763" draw:transform="translate(-8.63517in -6.52088in) rotate(-1.5708) translate(8.63517in 6.52088in)" draw:name="Straight Connector 5">
              <svg:title/>
              <svg:desc/>
            </draw:connector>
          </draw:g>
          <draw:custom-shape svg:x="6.66667in" svg:y="2.58387in" svg:width="3.937in" svg:height="3.93701in" draw:id="id422" draw:style-name="a1761" draw:name="Free-form: Shape 8">
            <svg:title/>
            <svg:desc/>
            <text:p text:style-name="a1760" text:class-names="" text:cond-style-name=""><text:span text:style-name="a1759" text:class-names=""/></text:p>
            <draw:enhanced-geometry xmlns:dr3d="urn:oasis:names:tc:opendocument:xmlns:dr3d:1.0" draw:type="non-primitive" svg:viewBox="0 0 2148840 2148840" draw:enhanced-path="M 0 2148840 C 524933 2142066 953347 1952413 1234440 1747520 1515533 1542627 1747520 1271693 1899920 980440 2052320 689187 2125980 354753 2148840 0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8840"/>
              <draw:equation draw:name="f7" draw:formula="?f4 / 2148840"/>
              <draw:equation draw:name="f8" draw:formula="0 * ?f5 / 2148840"/>
              <draw:equation draw:name="f9" draw:formula="2148840 * ?f4 / 2148840"/>
              <draw:equation draw:name="f10" draw:formula="1234440 * ?f5 / 2148840"/>
              <draw:equation draw:name="f11" draw:formula="1747520 * ?f4 / 2148840"/>
              <draw:equation draw:name="f12" draw:formula="1899920 * ?f5 / 2148840"/>
              <draw:equation draw:name="f13" draw:formula="980440 * ?f4 / 2148840"/>
              <draw:equation draw:name="f14" draw:formula="2148840 * ?f5 / 2148840"/>
              <draw:equation draw:name="f15" draw:formula="0 * ?f4 / 2148840"/>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92" draw:style-name="a1692" draw:name="TextBox 11" svg:x="0.54839in" svg:y="2.34409in" svg:width="2.34408in" svg:height="0.40391in">
          <draw:text-box>
            <text:p text:style-name="a1691" text:class-names="" text:cond-style-name=""><text:span text:style-name="a1689" text:class-names="">Take an initial guess</text:span><text:span text:style-name="a1690" text:class-names=""/></text:p>
          </draw:text-box>
          <svg:title/>
          <svg:desc/>
        </draw:frame>
        <draw:frame draw:id="id393" draw:style-name="a1701" draw:name="TextBox 12" svg:x="0.54839in" svg:y="3.04117in" svg:width="2.34408in" svg:height="0.40391in">
          <draw:text-box>
            <text:p text:style-name="a1700" text:class-names="" text:cond-style-name=""><text:span text:style-name="a1693" text:class-names="">Get</text:span><text:span text:style-name="a1694" text:class-names=""><text:s text:c="1"/></text:span><text:span text:style-name="a1695" text:class-names="">the</text:span><text:span text:style-name="a1696" text:class-names=""><text:s text:c="1"/></text:span><text:span text:style-name="a1697" text:class-names="">tangen</text:span><text:span text:style-name="a1698" text:class-names="">t</text:span><text:span text:style-name="a1699" text:class-names=""/></text:p>
          </draw:text-box>
          <svg:title/>
          <svg:desc/>
        </draw:frame>
        <draw:frame draw:id="id394" draw:style-name="a1705" draw:name="TextBox 13" svg:x="0.54839in" svg:y="3.73825in" svg:width="4.78495in" svg:height="0.40391in">
          <draw:text-box>
            <text:p text:style-name="a1704" text:class-names="" text:cond-style-name=""><text:span text:style-name="a1702" text:class-names="">Find X-intercept of the tangent</text:span><text:span text:style-name="a1703" text:class-names=""/></text:p>
          </draw:text-box>
          <svg:title/>
          <svg:desc/>
        </draw:frame>
        <draw:frame draw:id="id395" draw:style-name="a1716" draw:name="TextBox 14" svg:x="0.54839in" svg:y="4.43533in" svg:width="4.78495in" svg:height="0.40391in">
          <draw:text-box>
            <text:p text:style-name="a1715" text:class-names="" text:cond-style-name=""><text:span text:style-name="a1706" text:class-names="">Use this as the next</text:span><text:span text:style-name="a1707" text:class-names=""><text:s text:c="1"/></text:span><text:span text:style-name="a1708" text:class-names="">guess,</text:span><text:span text:style-name="a1709" text:class-names=""><text:s text:c="1"/></text:span><text:span text:style-name="a1710" text:class-names="">and</text:span><text:span text:style-name="a1711" text:class-names=""><text:s text:c="1"/></text:span><text:span text:style-name="a1712" text:class-names="">repea</text:span><text:span text:style-name="a1713" text:class-names="">t</text:span><text:span text:style-name="a1714" text:class-names=""/></text:p>
          </draw:text-box>
          <svg:title/>
          <svg:desc/>
        </draw:frame>
        <draw:custom-shape svg:x="0.1415in" svg:y="3.24312in" svg:width="0.40689in" svg:height="1.39416in" draw:id="id396" draw:style-name="a1720" draw:name="Free-form: Shape 5">
          <svg:title/>
          <svg:desc/>
          <text:p text:style-name="a1718" text:class-names="" text:cond-style-name=""><text:span text:style-name="a1717" text:class-names=""/></text:p>
          <draw:enhanced-geometry xmlns:dr3d="urn:oasis:names:tc:opendocument:xmlns:dr3d:1.0" draw:type="non-primitive" svg:viewBox="0 0 372063 945658" draw:enhanced-path="M ?f3 ?f2 C ?f4 ?f5 ?f6 ?f7 ?f8 ?f9 ?f10 ?f11 ?f12 ?f13 ?f14 ?f15 ?f16 ?f17 ?f18 ?f19 ?f20 ?f21 ?f22 ?f23 ?f24 ?f25 ?f26 ?f27 ?f28 ?f29 ?f30 ?f31 ?f32 ?f33 ?f34 ?f35 ?f36 ?f37 ?f1 ?f0 N" draw:text-areas="?f70 ?f72 ?f71 ?f73" draw:glue-points="?f74 ?f75 ?f76 ?f77 ?f78 ?f79 ?f80 ?f81 ?f82 ?f83 ?f84 ?f85 ?f86 ?f87" draw:glue-point-leaving-directions="-90, -90, -90, -90, -90, -90, -90">
            <draw:equation draw:name="f0" draw:formula="0"/>
            <draw:equation draw:name="f1" draw:formula="372063"/>
            <draw:equation draw:name="f2" draw:formula="945658"/>
            <draw:equation draw:name="f3" draw:formula="354304"/>
            <draw:equation draw:name="f4" draw:formula="281381"/>
            <draw:equation draw:name="f5" draw:formula="917800"/>
            <draw:equation draw:name="f6" draw:formula="198503"/>
            <draw:equation draw:name="f7" draw:formula="870424"/>
            <draw:equation draw:name="f8" draw:formula="155446"/>
            <draw:equation draw:name="f9" draw:formula="824149"/>
            <draw:equation draw:name="f10" draw:formula="112389"/>
            <draw:equation draw:name="f11" draw:formula="777874"/>
            <draw:equation draw:name="f12" draw:formula="76143"/>
            <draw:equation draw:name="f13" draw:formula="733767"/>
            <draw:equation draw:name="f14" draw:formula="50241"/>
            <draw:equation draw:name="f15" draw:formula="678572"/>
            <draw:equation draw:name="f16" draw:formula="24339"/>
            <draw:equation draw:name="f17" draw:formula="623377"/>
            <draw:equation draw:name="f18" draw:formula="998"/>
            <draw:equation draw:name="f19" draw:formula="559156"/>
            <draw:equation draw:name="f20" draw:formula="35"/>
            <draw:equation draw:name="f21" draw:formula="492976"/>
            <draw:equation draw:name="f22" draw:formula="0 - 928"/>
            <draw:equation draw:name="f23" draw:formula="426796"/>
            <draw:equation draw:name="f24" draw:formula="18000"/>
            <draw:equation draw:name="f25" draw:formula="340389"/>
            <draw:equation draw:name="f26" draw:formula="44465"/>
            <draw:equation draw:name="f27" draw:formula="281492"/>
            <draw:equation draw:name="f28" draw:formula="74740"/>
            <draw:equation draw:name="f29" draw:formula="206746"/>
            <draw:equation draw:name="f30" draw:formula="125499"/>
            <draw:equation draw:name="f31" draw:formula="156701"/>
            <draw:equation draw:name="f32" draw:formula="183591"/>
            <draw:equation draw:name="f33" draw:formula="100698"/>
            <draw:equation draw:name="f34" draw:formula="253113"/>
            <draw:equation draw:name="f35" draw:formula="51739"/>
            <draw:equation draw:name="f36" draw:formula="299059"/>
            <draw:equation draw:name="f37" draw:formula="22408"/>
            <draw:equation draw:name="f38" draw:formula="?f2 - ?f0"/>
            <draw:equation draw:name="f39" draw:formula="?f1 - ?f0"/>
            <draw:equation draw:name="f40" draw:formula="?f39 / 372063"/>
            <draw:equation draw:name="f41" draw:formula="?f38 / 945658"/>
            <draw:equation draw:name="f42" draw:formula="354304 * ?f39"/>
            <draw:equation draw:name="f43" draw:formula="945658 * ?f38"/>
            <draw:equation draw:name="f44" draw:formula="155446 * ?f39"/>
            <draw:equation draw:name="f45" draw:formula="824149 * ?f38"/>
            <draw:equation draw:name="f46" draw:formula="50241 * ?f39"/>
            <draw:equation draw:name="f47" draw:formula="678572 * ?f38"/>
            <draw:equation draw:name="f48" draw:formula="35 * ?f39"/>
            <draw:equation draw:name="f49" draw:formula="492976 * ?f38"/>
            <draw:equation draw:name="f50" draw:formula="44465 * ?f39"/>
            <draw:equation draw:name="f51" draw:formula="281492 * ?f38"/>
            <draw:equation draw:name="f52" draw:formula="183591 * ?f39"/>
            <draw:equation draw:name="f53" draw:formula="100698 * ?f38"/>
            <draw:equation draw:name="f54" draw:formula="372063 * ?f39"/>
            <draw:equation draw:name="f55" draw:formula="0 * ?f38"/>
            <draw:equation draw:name="f56" draw:formula="?f42 / 372063"/>
            <draw:equation draw:name="f57" draw:formula="?f43 / 945658"/>
            <draw:equation draw:name="f58" draw:formula="?f44 / 372063"/>
            <draw:equation draw:name="f59" draw:formula="?f45 / 945658"/>
            <draw:equation draw:name="f60" draw:formula="?f46 / 372063"/>
            <draw:equation draw:name="f61" draw:formula="?f47 / 945658"/>
            <draw:equation draw:name="f62" draw:formula="?f48 / 372063"/>
            <draw:equation draw:name="f63" draw:formula="?f49 / 945658"/>
            <draw:equation draw:name="f64" draw:formula="?f50 / 372063"/>
            <draw:equation draw:name="f65" draw:formula="?f51 / 945658"/>
            <draw:equation draw:name="f66" draw:formula="?f52 / 372063"/>
            <draw:equation draw:name="f67" draw:formula="?f53 / 945658"/>
            <draw:equation draw:name="f68" draw:formula="?f54 / 372063"/>
            <draw:equation draw:name="f69" draw:formula="?f55 / 945658"/>
            <draw:equation draw:name="f70" draw:formula="?f0 / ?f40"/>
            <draw:equation draw:name="f71" draw:formula="?f1 / ?f40"/>
            <draw:equation draw:name="f72" draw:formula="?f0 / ?f41"/>
            <draw:equation draw:name="f73" draw:formula="?f2 / ?f41"/>
            <draw:equation draw:name="f74" draw:formula="?f56 / ?f40"/>
            <draw:equation draw:name="f75" draw:formula="?f57 / ?f41"/>
            <draw:equation draw:name="f76" draw:formula="?f58 / ?f40"/>
            <draw:equation draw:name="f77" draw:formula="?f59 / ?f41"/>
            <draw:equation draw:name="f78" draw:formula="?f60 / ?f40"/>
            <draw:equation draw:name="f79" draw:formula="?f61 / ?f41"/>
            <draw:equation draw:name="f80" draw:formula="?f62 / ?f40"/>
            <draw:equation draw:name="f81" draw:formula="?f63 / ?f41"/>
            <draw:equation draw:name="f82" draw:formula="?f64 / ?f40"/>
            <draw:equation draw:name="f83" draw:formula="?f65 / ?f41"/>
            <draw:equation draw:name="f84" draw:formula="?f66 / ?f40"/>
            <draw:equation draw:name="f85" draw:formula="?f67 / ?f41"/>
            <draw:equation draw:name="f86" draw:formula="?f68 / ?f40"/>
            <draw:equation draw:name="f87" draw:formula="?f69 / ?f41"/>
          </draw:enhanced-geometry>
        </draw:custom-shape>
        <draw:connector draw:type="line" svg:x1="10.71119in" svg:y1="2.28667in" svg:x2="9.90417in" svg:y2="6.78in" draw:id="id397" draw:style-name="a1721" draw:name="Straight Connector 18">
          <svg:title/>
          <svg:desc/>
        </draw:connector>
        <draw:custom-shape svg:x="9.87877in" svg:y="6.4488in" svg:width="0.15748in" svg:height="0.15748in" draw:id="id399" draw:style-name="a1724" draw:name="Oval 22">
          <svg:title/>
          <svg:desc/>
          <text:p text:style-name="a1723" text:class-names="" text:cond-style-name="" text:id="id398"><text:span text:style-name="a17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56" draw:id="id400">
          <svg:title/>
          <svg:desc/>
          <draw:connector draw:type="line" svg:x1="11.31962in" svg:y1="2.63333in" svg:x2="8.54833in" svg:y2="6.86176in" draw:id="id418" draw:style-name="a1753" draw:name="Straight Connector 26">
            <svg:title/>
            <svg:desc/>
          </draw:connector>
          <draw:custom-shape svg:x="8.70172in" svg:y="6.44214in" svg:width="0.15748in" svg:height="0.15748in" draw:id="id419" draw:style-name="a1756" draw:name="Oval 32">
            <svg:title/>
            <svg:desc/>
            <text:p text:style-name="a1755" text:class-names="" text:cond-style-name=""><text:span text:style-name="a17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8.78046in" svg:y1="6.55857in" svg:x2="8.78046in" svg:y2="5.88667in" draw:id="id420" draw:style-name="a1758" draw:name="Straight Connector 33">
            <svg:title/>
            <svg:desc/>
          </draw:connector>
        </draw:g>
        <draw:frame draw:id="id401" draw:style-name="a1728" draw:name="TextBox 40" svg:x="0.54839in" svg:y="5.15526in" svg:width="4.78495in" svg:height="0.40391in">
          <draw:text-box>
            <text:p text:style-name="a1727" text:class-names="" text:cond-style-name=""><text:span text:style-name="a1725" text:class-names="">Stop when I basically stop moving</text:span><text:span text:style-name="a1726" text:class-names=""/></text:p>
          </draw:text-box>
          <svg:title/>
          <svg:desc/>
        </draw:frame>
        <draw:custom-shape svg:x="10.45161in" svg:y="3.16129in" svg:width="0.15748in" svg:height="0.15748in" draw:id="id403" draw:style-name="a1731" draw:name="Oval 16">
          <svg:title/>
          <svg:desc/>
          <text:p text:style-name="a1730" text:class-names="" text:cond-style-name="" text:id="id402"><text:span text:style-name="a17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62" draw:id="id404">
          <svg:title/>
          <svg:desc/>
          <draw:connector draw:type="line" svg:x1="9.95084in" svg:y1="6.53006in" svg:x2="9.95084in" svg:y2="4.71904in" draw:id="id416" draw:style-name="a1749" draw:name="Straight Connector 24">
            <svg:title/>
            <svg:desc/>
          </draw:connector>
          <draw:custom-shape svg:x="9.8721in" svg:y="4.63728in" svg:width="0.15748in" svg:height="0.15748in" draw:id="id417" draw:style-name="a1752" draw:name="Oval 25">
            <svg:title/>
            <svg:desc/>
            <text:p text:style-name="a1751" text:class-names="" text:cond-style-name=""><text:span text:style-name="a17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66" draw:id="id405">
          <svg:title/>
          <svg:desc/>
          <draw:g draw:name="Group 63" draw:id="id411">
            <svg:title/>
            <svg:desc/>
            <draw:custom-shape svg:x="8.70172in" svg:y="5.81263in" svg:width="0.15748in" svg:height="0.15748in" draw:id="id413" draw:style-name="a1743" draw:name="Oval 36">
              <svg:title/>
              <svg:desc/>
              <text:p text:style-name="a1742" text:class-names="" text:cond-style-name=""><text:span text:style-name="a17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9.32263in" svg:y1="5.55916in" svg:x2="7.79039in" svg:y2="6.5076in" draw:id="id414" draw:style-name="a1744" draw:name="Straight Connector 35">
              <svg:title/>
              <svg:desc/>
            </draw:connector>
            <draw:custom-shape svg:x="7.71591in" svg:y="6.44214in" svg:width="0.15748in" svg:height="0.15748in" draw:id="id415" draw:style-name="a1747" draw:name="Oval 43">
              <svg:title/>
              <svg:desc/>
              <text:p text:style-name="a1746" text:class-names="" text:cond-style-name=""><text:span text:style-name="a17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onnector draw:type="line" svg:x1="7.79793in" svg:y1="6.56065in" svg:x2="7.79793in" svg:y2="6.32466in" draw:id="id412" draw:style-name="a1740" draw:name="Straight Connector 64">
            <svg:title/>
            <svg:desc/>
          </draw:connector>
        </draw:g>
        <draw:g draw:name="Group 67" draw:id="id406">
          <svg:title/>
          <svg:desc/>
          <draw:g draw:name="Group 59" draw:id="id407">
            <svg:title/>
            <svg:desc/>
            <draw:connector draw:type="line" svg:x1="8.56973in" svg:y1="6.125in" svg:x2="7.18196in" svg:y2="6.52015in" draw:id="id409" draw:style-name="a1735" draw:name="Straight Connector 46">
              <svg:title/>
              <svg:desc/>
            </draw:connector>
            <draw:custom-shape svg:x="7.10072in" svg:y="6.44141in" svg:width="0.15748in" svg:height="0.15748in" draw:id="id410" draw:style-name="a1738" draw:name="Oval 54">
              <svg:title/>
              <svg:desc/>
              <text:p text:style-name="a1737" text:class-names="" text:cond-style-name=""><text:span text:style-name="a17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7.7196in" svg:y="6.25322in" svg:width="0.15748in" svg:height="0.15748in" draw:id="id408" draw:style-name="a1734" draw:name="Oval 45">
            <svg:title/>
            <svg:desc/>
            <text:p text:style-name="a1733" text:class-names="" text:cond-style-name=""><text:span text:style-name="a17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403"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9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9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0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0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0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06" smil:attributeName="visibility" smil:to="visible" smil:begin="0.0s" smil:dur="0.001s" smil:fill="hold"/>
                </anim:par>
              </anim:par>
            </anim:par>
          </anim:seq>
        </anim:par>
      </draw:page>
      <draw:page draw:name="Slide52" draw:style-name="a1764" draw:master-page-name="Master1-Layout2-obj-Title-and-Content" presentation:presentation-page-layout-name="Master1-PPL2" draw:id="Slide-307">
        <draw:frame draw:id="id425" draw:style-name="a1765" draw:name="Picture 10" svg:x="2.1in" svg:y="4.47754in" svg:width="8.78889in" svg:height="2.67209in" style:rel-width="scale" style:rel-height="scale">
          <draw:image xlink:href="media/image27.png" xlink:type="simple" xlink:show="embed" xlink:actuate="onLoad"/>
          <svg:title/>
          <svg:desc/>
        </draw:frame>
        <draw:frame draw:id="id426" draw:style-name="a1766" draw:name="Picture 12" svg:x="2.37778in" svg:y="0.34127in" svg:width="7.92885in" svg:height="3.93078in" style:rel-width="scale" style:rel-height="scale">
          <draw:image xlink:href="media/image28.png" xlink:type="simple" xlink:show="embed" xlink:actuate="onLoad"/>
          <svg:title/>
          <svg:desc/>
        </draw:frame>
        <draw:g draw:name="Group 40" draw:id="id427">
          <svg:title/>
          <svg:desc/>
          <draw:custom-shape svg:x="9.25578in" svg:y="2.00435in" svg:width="0.15748in" svg:height="0.15748in" draw:id="id456" draw:style-name="a1825" draw:name="Oval 14">
            <svg:title/>
            <svg:desc/>
            <text:p text:style-name="a1824" text:class-names="" text:cond-style-name=""><text:span text:style-name="a18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9.90212in" svg:y1="1.47795in" svg:x2="7.8027in" svg:y2="3.74826in" draw:id="id457" draw:style-name="a1826" draw:name="Straight Connector 15">
            <svg:title/>
            <svg:desc/>
          </draw:connector>
          <draw:custom-shape svg:x="7.81285in" svg:y="3.57589in" svg:width="0.15748in" svg:height="0.15748in" draw:id="id458" draw:style-name="a1829" draw:name="Oval 24">
            <svg:title/>
            <svg:desc/>
            <text:p text:style-name="a1828" text:class-names="" text:cond-style-name=""><text:span text:style-name="a18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81285in" svg:y="3.19339in" svg:width="0.15748in" svg:height="0.15748in" draw:id="id459" draw:style-name="a1832" draw:name="Oval 25">
            <svg:title/>
            <svg:desc/>
            <text:p text:style-name="a1831" text:class-names="" text:cond-style-name=""><text:span text:style-name="a18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8.21934in" svg:y1="3.10238in" svg:x2="7.09913in" svg:y2="3.70402in" draw:id="id460" draw:style-name="a1833" draw:name="Straight Connector 26">
            <svg:title/>
            <svg:desc/>
          </draw:connector>
          <draw:custom-shape svg:x="7.09913in" svg:y="3.59078in" svg:width="0.15748in" svg:height="0.15748in" draw:id="id461" draw:style-name="a1836" draw:name="Oval 29">
            <svg:title/>
            <svg:desc/>
            <text:p text:style-name="a1835" text:class-names="" text:cond-style-name=""><text:span text:style-name="a18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7.17988in" svg:y1="3.70402in" svg:x2="7.17988in" svg:y2="3.55833in" draw:id="id462" draw:style-name="a1838" draw:name="Straight Connector 30">
            <svg:title/>
            <svg:desc/>
          </draw:connector>
          <draw:custom-shape svg:x="7.09913in" svg:y="3.47854in" svg:width="0.15748in" svg:height="0.15748in" draw:id="id463" draw:style-name="a1841" draw:name="Oval 33">
            <svg:title/>
            <svg:desc/>
            <text:p text:style-name="a1840" text:class-names="" text:cond-style-name=""><text:span text:style-name="a18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onnector draw:type="line" svg:x1="7.56695in" svg:y1="3.47205in" svg:x2="6.4196in" svg:y2="3.76321in" draw:id="id428" draw:style-name="a1767" draw:name="Straight Connector 34">
          <svg:title/>
          <svg:desc/>
        </draw:connector>
        <draw:g draw:name="Group 41" draw:id="id429">
          <svg:title/>
          <svg:desc/>
          <draw:custom-shape svg:x="3.59328in" svg:y="2.00263in" svg:width="0.15748in" svg:height="0.15748in" draw:id="id448" draw:style-name="a1806" draw:name="Oval 42">
            <svg:title/>
            <svg:desc/>
            <text:p text:style-name="a1805" text:class-names="" text:cond-style-name=""><text:span text:style-name="a180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10442in" svg:y1="1.47623in" svg:x2="5.20384in" svg:y2="3.74654in" draw:id="id449" draw:style-name="a1807" draw:name="Straight Connector 43">
            <svg:title/>
            <svg:desc/>
          </draw:connector>
          <draw:custom-shape svg:x="5.03621in" svg:y="3.57417in" svg:width="0.15748in" svg:height="0.15748in" draw:id="id450" draw:style-name="a1810" draw:name="Oval 45">
            <svg:title/>
            <svg:desc/>
            <text:p text:style-name="a1809" text:class-names="" text:cond-style-name=""><text:span text:style-name="a18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3621in" svg:y="3.19168in" svg:width="0.15748in" svg:height="0.15748in" draw:id="id451" draw:style-name="a1813" draw:name="Oval 46">
            <svg:title/>
            <svg:desc/>
            <text:p text:style-name="a1812" text:class-names="" text:cond-style-name=""><text:span text:style-name="a18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7872in" svg:y1="3.10066in" svg:x2="5.9074in" svg:y2="3.70231in" draw:id="id452" draw:style-name="a1814" draw:name="Straight Connector 47">
            <svg:title/>
            <svg:desc/>
          </draw:connector>
          <draw:custom-shape svg:x="5.74992in" svg:y="3.58906in" svg:width="0.15748in" svg:height="0.15748in" draw:id="id453" draw:style-name="a1817" draw:name="Oval 48">
            <svg:title/>
            <svg:desc/>
            <text:p text:style-name="a1816" text:class-names="" text:cond-style-name=""><text:span text:style-name="a18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5.82666in" svg:y1="3.70231in" svg:x2="5.82666in" svg:y2="3.55662in" draw:id="id454" draw:style-name="a1819" draw:name="Straight Connector 49">
            <svg:title/>
            <svg:desc/>
          </draw:connector>
          <draw:custom-shape svg:x="5.74992in" svg:y="3.47682in" svg:width="0.15748in" svg:height="0.15748in" draw:id="id455" draw:style-name="a1822" draw:name="Oval 50">
            <svg:title/>
            <svg:desc/>
            <text:p text:style-name="a1821" text:class-names="" text:cond-style-name=""><text:span text:style-name="a18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67" draw:id="id430">
          <svg:title/>
          <svg:desc/>
          <draw:custom-shape svg:x="9.97879in" svg:y="6.24819in" svg:width="0.15748in" svg:height="0.15748in" draw:id="id440" draw:style-name="a1788" draw:name="Oval 52">
            <svg:title/>
            <svg:desc/>
            <text:p text:style-name="a1787" text:class-names="" text:cond-style-name=""><text:span text:style-name="a17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0.78049in" svg:y1="6.96554in" svg:x2="8.31577in" svg:y2="4.72758in" draw:id="id441" draw:style-name="a1789" draw:name="Straight Connector 53">
            <svg:title/>
            <svg:desc/>
          </draw:connector>
          <draw:custom-shape svg:x="8.27844in" svg:y="4.66176in" svg:width="0.15748in" svg:height="0.15748in" draw:id="id442" draw:style-name="a1792" draw:name="Oval 55">
            <svg:title/>
            <svg:desc/>
            <text:p text:style-name="a1791" text:class-names="" text:cond-style-name=""><text:span text:style-name="a17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1577in" svg:y="5.11501in" svg:width="0.15748in" svg:height="0.15748in" draw:id="id443" draw:style-name="a1795" draw:name="Oval 56">
            <svg:title/>
            <svg:desc/>
            <text:p text:style-name="a1794" text:class-names="" text:cond-style-name=""><text:span text:style-name="a17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8.86737in" svg:y1="5.41702in" svg:x2="7.47723in" svg:y2="4.7318in" draw:id="id444" draw:style-name="a1796" draw:name="Straight Connector 57">
            <svg:title/>
            <svg:desc/>
          </draw:connector>
          <draw:connector draw:type="line" svg:x1="7.8256in" svg:y1="4.94379in" svg:x2="7.01458in" svg:y2="4.73798in" draw:id="id445" draw:style-name="a1797" draw:name="Straight Connector 64">
            <svg:title/>
            <svg:desc/>
          </draw:connector>
          <draw:custom-shape svg:x="7.41785in" svg:y="4.65592in" svg:width="0.15748in" svg:height="0.15748in" draw:id="id446" draw:style-name="a1800" draw:name="Oval 58">
            <svg:title/>
            <svg:desc/>
            <text:p text:style-name="a1799" text:class-names="" text:cond-style-name=""><text:span text:style-name="a17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1785in" svg:y="4.78895in" svg:width="0.15748in" svg:height="0.15748in" draw:id="id447" draw:style-name="a1803" draw:name="Oval 60">
            <svg:title/>
            <svg:desc/>
            <text:p text:style-name="a1802" text:class-names="" text:cond-style-name=""><text:span text:style-name="a18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69" draw:id="id431">
          <svg:title/>
          <svg:desc/>
          <draw:connector draw:type="line" svg:x1="2.15358in" svg:y1="6.97033in" svg:x2="4.61829in" svg:y2="4.73237in" draw:id="id432" draw:style-name="a1768" draw:name="Straight Connector 71">
            <svg:title/>
            <svg:desc/>
          </draw:connector>
          <draw:custom-shape svg:x="4.49815in" svg:y="4.66655in" svg:width="0.15748in" svg:height="0.15748in" draw:id="id433" draw:style-name="a1771" draw:name="Oval 73">
            <svg:title/>
            <svg:desc/>
            <text:p text:style-name="a1770" text:class-names="" text:cond-style-name=""><text:span text:style-name="a17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46081in" svg:y="5.11979in" svg:width="0.15748in" svg:height="0.15748in" draw:id="id434" draw:style-name="a1774" draw:name="Oval 74">
            <svg:title/>
            <svg:desc/>
            <text:p text:style-name="a1773" text:class-names="" text:cond-style-name=""><text:span text:style-name="a17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0667in" svg:y1="5.4218in" svg:x2="5.45684in" svg:y2="4.73658in" draw:id="id435" draw:style-name="a1775" draw:name="Straight Connector 75">
            <svg:title/>
            <svg:desc/>
          </draw:connector>
          <draw:connector draw:type="line" svg:x1="5.10847in" svg:y1="4.94858in" svg:x2="5.91948in" svg:y2="4.74276in" draw:id="id436" draw:style-name="a1776" draw:name="Straight Connector 76">
            <svg:title/>
            <svg:desc/>
          </draw:connector>
          <draw:custom-shape svg:x="5.35874in" svg:y="4.66071in" svg:width="0.15748in" svg:height="0.15748in" draw:id="id437" draw:style-name="a1779" draw:name="Oval 77">
            <svg:title/>
            <svg:desc/>
            <text:p text:style-name="a1778" text:class-names="" text:cond-style-name=""><text:span text:style-name="a17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5874in" svg:y="4.79373in" svg:width="0.15748in" svg:height="0.15748in" draw:id="id438" draw:style-name="a1782" draw:name="Oval 78">
            <svg:title/>
            <svg:desc/>
            <text:p text:style-name="a1781" text:class-names="" text:cond-style-name=""><text:span text:style-name="a17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978in" svg:y="6.25298in" svg:width="0.15748in" svg:height="0.15748in" draw:id="id439" draw:style-name="a1785" draw:name="Oval 70">
            <svg:title/>
            <svg:desc/>
            <text:p text:style-name="a1784" text:class-names="" text:cond-style-name=""><text:span text:style-name="a178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page>
      <draw:page draw:name="Slide51" draw:style-name="a1842" draw:master-page-name="Master1-Layout7-blank-Blank" presentation:presentation-page-layout-name="Master1-PPL7" draw:id="Slide-306">
        <draw:frame draw:id="id464" draw:style-name="a1843" draw:name="Function_1video" svg:x="1.9in" svg:y="0in" svg:width="10in" svg:height="7.5in" style:rel-width="scale" style:rel-height="scale">
          <draw:plugin draw:mime-type="video/mp4" xlink:href="media/media1.mp4" xlink:type="simple" xlink:show="embed" xlink:actuate="onLoad"/>
          <draw:image xlink:href="media/image29.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464"/>
                </anim:par>
              </anim:par>
            </anim:par>
          </anim:seq>
          <anim:seq presentation:node-type="interactive-sequence" smil:begin="id464.click">
            <anim:par smil:begin="0.0s" smil:fill="hold">
              <anim:par smil:begin="0.0s" smil:fill="hold">
                <anim:par presentation:node-type="on-click" presentation:preset-id="2" presentation:preset-sub-type="0" presentation:preset-class="media-call" smil:begin="0.0s" smil:fill="hold">
                  <anim:command anim:command="toggle-pause" smil:targetElement="id464"/>
                </anim:par>
              </anim:par>
            </anim:par>
          </anim:seq>
        </anim:par>
      </draw:page>
      <draw:page draw:name="Slide57" draw:style-name="a1844" draw:master-page-name="Master1-Layout7-blank-Blank" presentation:presentation-page-layout-name="Master1-PPL7" draw:id="Slide-312">
        <draw:frame draw:id="id465" draw:style-name="a1917" draw:name="TextBox 3" svg:x="0.23077in" svg:y="-0.14056in" svg:width="9.91368in" svg:height="7.64056in">
          <draw:text-box>
            <text:p text:style-name="a1916" text:class-names="" text:cond-style-name=""><text:span text:style-name="a1845" text:class-names=""><text:line-break/></text:span><text:span text:style-name="a1846" text:class-names="">def<text:s text:c="1"/></text:span><text:span text:style-name="a1847" text:class-names="">newton_raphson_method</text:span><text:span text:style-name="a1848" text:class-names="">(function</text:span><text:span text:style-name="a1849" text:class-names="">,<text:s text:c="1"/></text:span><text:span text:style-name="a1850" text:class-names="">initial_guess</text:span><text:span text:style-name="a1851" text:class-names="">,<text:s text:c="1"/></text:span><text:span text:style-name="a1852" text:class-names="">tolerance=</text:span><text:span text:style-name="a1853" text:class-names="">0.01</text:span><text:span text:style-name="a1854" text:class-names="">,<text:s text:c="1"/></text:span><text:span text:style-name="a1855" text:class-names="">max_iterations</text:span><text:span text:style-name="a1856" text:class-names="">=</text:span><text:span text:style-name="a1857" text:class-names="">5000</text:span><text:span text:style-name="a1858" text:class-names="">):<text:line-break/><text:line-break/> <text:s text:c="3"/>x =<text:s text:c="1"/></text:span><text:span text:style-name="a1859" text:class-names="">initial_guess</text:span><text:span text:style-name="a1860" text:class-names=""><text:line-break/> <text:s text:c="3"/></text:span><text:span text:style-name="a1861" text:class-names="">guess_list</text:span><text:span text:style-name="a1862" text:class-names=""><text:s text:c="1"/>= []<text:line-break/> <text:s text:c="3"/></text:span><text:span text:style-name="a1863" text:class-names="">for<text:s text:c="1"/></text:span><text:span text:style-name="a1864" text:class-names="">iteration<text:s text:c="1"/></text:span><text:span text:style-name="a1865" text:class-names="">in<text:s text:c="1"/></text:span><text:span text:style-name="a1866" text:class-names="">tqdm</text:span><text:span text:style-name="a1867" text:class-names="">(</text:span><text:span text:style-name="a1868" text:class-names="">range</text:span><text:span text:style-name="a1869" text:class-names="">(</text:span><text:span text:style-name="a1870" text:class-names="">max_iterations</text:span><text:span text:style-name="a1871" text:class-names="">)):<text:line-break/><text:line-break/> <text:s text:c="7"/></text:span><text:span text:style-name="a1872" text:class-names=""># Add Current Guess To List<text:line-break/> <text:s text:c="7"/></text:span><text:span text:style-name="a1873" text:class-names="">guess_list.append</text:span><text:span text:style-name="a1874" text:class-names="">(x)<text:line-break/><text:line-break/> <text:s text:c="7"/></text:span><text:span text:style-name="a1875" text:class-names=""># Evaluate Function At Initial Guess<text:line-break/> <text:s text:c="7"/></text:span><text:span text:style-name="a1876" text:class-names="">y = function(x)<text:line-break/><text:line-break/> <text:s text:c="7"/></text:span><text:span text:style-name="a1877" text:class-names=""># Get Derivative At Initial Guess<text:line-break/> <text:s text:c="7"/></text:span><text:span text:style-name="a1878" text:class-names="">derivative =<text:s text:c="1"/></text:span><text:span text:style-name="a1879" text:class-names="">numerical_integration_derivative</text:span><text:span text:style-name="a1880" text:class-names="">(x</text:span><text:span text:style-name="a1881" text:class-names="">,<text:s text:c="1"/></text:span><text:span text:style-name="a1882" text:class-names="">function)<text:line-break/><text:line-break/> <text:s text:c="7"/></text:span><text:span text:style-name="a1883" text:class-names=""># Get Y Intercept:</text:span><text:span text:style-name="a1884" text:class-names=""><text:line-break/> <text:s text:c="7"/></text:span><text:span text:style-name="a1885" text:class-names="">c = y - (derivative * x)<text:line-break/><text:line-break/> <text:s text:c="7"/></text:span><text:span text:style-name="a1886" text:class-names=""># Get X Intercept</text:span><text:span text:style-name="a1887" text:class-names=""><text:line-break/> <text:s text:c="7"/></text:span><text:span text:style-name="a1888" text:class-names="">x_intercept</text:span><text:span text:style-name="a1889" text:class-names=""><text:s text:c="1"/>= (</text:span><text:span text:style-name="a1890" text:class-names="">0<text:s text:c="1"/></text:span><text:span text:style-name="a1891" text:class-names="">- c) / derivative<text:line-break/><text:line-break/> <text:s text:c="7"/></text:span><text:span text:style-name="a1892" text:class-names="">if<text:s text:c="1"/></text:span><text:span text:style-name="a1893" text:class-names="">np.abs</text:span><text:span text:style-name="a1894" text:class-names="">(x -<text:s text:c="1"/></text:span><text:span text:style-name="a1895" text:class-names="">x_intercept</text:span><text:span text:style-name="a1896" text:class-names="">) &lt; tolerance:<text:line-break/> <text:s text:c="11"/></text:span><text:span text:style-name="a1897" text:class-names="">guess_list.append</text:span><text:span text:style-name="a1898" text:class-names="">(</text:span><text:span text:style-name="a1899" text:class-names="">x_intercept</text:span><text:span text:style-name="a1900" text:class-names="">)<text:line-break/> <text:s text:c="11"/></text:span><text:span text:style-name="a1901" text:class-names="">return<text:s text:c="1"/></text:span><text:span text:style-name="a1902" text:class-names="">x_intercept</text:span><text:span text:style-name="a1903" text:class-names="">,<text:s text:c="1"/></text:span><text:span text:style-name="a1904" text:class-names="">guess_list</text:span><text:span text:style-name="a1905" text:class-names=""><text:line-break/><text:line-break/> <text:s text:c="7"/></text:span><text:span text:style-name="a1906" text:class-names="">else</text:span><text:span text:style-name="a1907" text:class-names="">:<text:line-break/> <text:s text:c="11"/>x =<text:s text:c="1"/></text:span><text:span text:style-name="a1908" text:class-names="">x_intercept</text:span><text:span text:style-name="a1909" text:class-names=""><text:line-break/><text:line-break/> <text:s text:c="3"/></text:span><text:span text:style-name="a1910" text:class-names="">print</text:span><text:span text:style-name="a1911" text:class-names="">(</text:span><text:span text:style-name="a1912" text:class-names="">"Error! Did not converge!"</text:span><text:span text:style-name="a1913" text:class-names="">)<text:line-break/> <text:s text:c="3"/></text:span><text:span text:style-name="a1914" text:class-names="">return None</text:span><text:span text:style-name="a1915" text:class-names=""/></text:p>
          </draw:text-box>
          <svg:title/>
          <svg:desc/>
        </draw:frame>
      </draw:page>
      <draw:page draw:name="Slide53" draw:style-name="a1918" draw:master-page-name="Master1-Layout7-blank-Blank" presentation:presentation-page-layout-name="Master1-PPL7" draw:id="Slide-308">
        <draw:frame draw:id="id466" draw:style-name="a1919" draw:name="Function_2video" svg:x="3.36667in" svg:y="0in" svg:width="9.96667in" svg:height="7.475in" style:rel-width="scale" style:rel-height="scale">
          <draw:plugin draw:mime-type="video/mp4" xlink:href="media/media2.mp4" xlink:type="simple" xlink:show="embed" xlink:actuate="onLoad"/>
          <draw:image xlink:href="media/image30.png" xlink:type="simple" xlink:show="embed" xlink:actuate="onLoad"/>
          <svg:title/>
          <svg:desc/>
        </draw:frame>
        <draw:frame draw:id="id467" draw:style-name="a1929" draw:name="TextBox 2" svg:x="0.26667in" svg:y="1.55in" svg:width="3.1in" svg:height="1.91855in">
          <draw:text-box>
            <text:p text:style-name="a1921" text:class-names="" text:cond-style-name=""><text:span text:style-name="a1920" text:class-names="">Numerical methods typically only find local minima!</text:span></text:p>
            <text:p text:style-name="a1923" text:class-names="" text:cond-style-name=""><text:span text:style-name="a1922" text:class-names=""/></text:p>
            <text:p text:style-name="a1928" text:class-names="" text:cond-style-name=""><text:span text:style-name="a1924" text:class-names="">Make sure you try<text:s text:c="1"/></text:span><text:span text:style-name="a1925" text:class-names="">a number of</text:span><text:span text:style-name="a1926" text:class-names=""><text:s text:c="1"/>initial positions</text:span><text:span text:style-name="a1927"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466"/>
                </anim:par>
              </anim:par>
            </anim:par>
          </anim:seq>
          <anim:seq presentation:node-type="interactive-sequence" smil:begin="id466.click">
            <anim:par smil:begin="0.0s" smil:fill="hold">
              <anim:par smil:begin="0.0s" smil:fill="hold">
                <anim:par presentation:node-type="on-click" presentation:preset-id="2" presentation:preset-sub-type="0" presentation:preset-class="media-call" smil:begin="0.0s" smil:fill="hold">
                  <anim:command anim:command="toggle-pause" smil:targetElement="id466"/>
                </anim:par>
              </anim:par>
            </anim:par>
          </anim:seq>
        </anim:par>
      </draw:page>
      <draw:page draw:name="Slide58" draw:style-name="a1930" draw:master-page-name="Master1-Layout2-obj-Title-and-Content" presentation:presentation-page-layout-name="Master1-PPL2" draw:id="Slide-313">
        <draw:frame draw:id="id468" presentation:style-name="a1976" draw:name="Content Placeholder 2" svg:x="0.79444in" svg:y="1.84896in" svg:width="9.57796in" svg:height="4.75868in" presentation:class="outline" presentation:placeholder="false">
          <draw:text-box>
            <text:list text:style-name="a1934">
              <text:list-item>
                <text:p text:style-name="a1933" text:class-names="" text:cond-style-name=""><text:span text:style-name="a1931" text:class-names="">●<text:s text:c="1"/></text:span><text:span text:style-name="a1932" text:class-names="">Readings:<text:s text:c="1"/></text:span></text:p>
              </text:list-item>
            </text:list>
            <text:list text:style-name="a1940">
              <text:list-item>
                <text:p text:style-name="a1939" text:class-names="" text:cond-style-name=""><text:span text:style-name="a1935" text:class-names="">Strogatz</text:span><text:span text:style-name="a1936" text:class-names=""><text:s text:c="1"/>Ch.<text:s text:c="1"/></text:span><text:span text:style-name="a1937" text:class-names="">2</text:span><text:span text:style-name="a1938" text:class-names=""/></text:p>
              </text:list-item>
            </text:list>
            <text:list text:style-name="a1943">
              <text:list-item>
                <text:p text:style-name="a1942" text:class-names="" text:cond-style-name=""><text:span text:style-name="a1941" text:class-names=""/></text:p>
              </text:list-item>
            </text:list>
            <text:list text:style-name="a1948">
              <text:list-item>
                <text:p text:style-name="a1947" text:class-names="" text:cond-style-name=""><text:span text:style-name="a1944" text:class-names="">●<text:s text:c="1"/></text:span><text:span text:style-name="a1945" text:class-names="">Topics:<text:s text:c="1"/></text:span><text:span text:style-name="a1946" text:class-names=""/></text:p>
              </text:list-item>
            </text:list>
            <text:list text:style-name="a1951">
              <text:list-item>
                <text:p text:style-name="a1950" text:class-names="" text:cond-style-name=""><text:span text:style-name="a1949" text:class-names="">Recap</text:span></text:p>
              </text:list-item>
            </text:list>
            <text:list text:style-name="a1955">
              <text:list-item>
                <text:p text:style-name="a1954" text:class-names="" text:cond-style-name=""><text:span text:style-name="a1952" text:class-names="">Simulating</text:span><text:span text:style-name="a1953" text:class-names=""><text:s text:c="1"/>dynamical systems</text:span></text:p>
              </text:list-item>
            </text:list>
            <text:list text:style-name="a1958">
              <text:list-item>
                <text:p text:style-name="a1957" text:class-names="" text:cond-style-name=""><text:span text:style-name="a1956" text:class-names="">Linear Stability analysis</text:span></text:p>
              </text:list-item>
            </text:list>
            <text:list text:style-name="a1965">
              <text:list-item>
                <text:p text:style-name="a1964" text:class-names="" text:cond-style-name=""><text:span text:style-name="a1959" text:class-names="">The<text:s text:c="1"/></text:span><text:span text:style-name="a1960" text:class-names="">Leaky<text:s text:c="1"/></text:span><text:span text:style-name="a1961" text:class-names="">Integrate-and-fire<text:s text:c="1"/></text:span><text:span text:style-name="a1962" text:class-names="">model</text:span><text:span text:style-name="a1963" text:class-names=""/></text:p>
              </text:list-item>
            </text:list>
            <text:list text:style-name="a1968">
              <text:list-item>
                <text:p text:style-name="a1967" text:class-names="" text:cond-style-name=""><text:span text:style-name="a1966" text:class-names=""/></text:p>
              </text:list-item>
            </text:list>
            <text:list text:style-name="a1972">
              <text:list-item>
                <text:p text:style-name="a1971" text:class-names="" text:cond-style-name=""><text:span text:style-name="a1969" text:class-names="">●<text:s text:c="1"/></text:span><text:span text:style-name="a1970" text:class-names="">Computational exercise:<text:s text:c="1"/></text:span></text:p>
              </text:list-item>
            </text:list>
            <text:list text:style-name="a1975">
              <text:list-item>
                <text:p text:style-name="a1974" text:class-names="" text:cond-style-name=""><text:span text:style-name="a1973" text:class-names="">Writing a function to find fixed points of a 1D system numerically.</text:span></text:p>
              </text:list-item>
            </text:list>
          </draw:text-box>
          <svg:title/>
          <svg:desc/>
        </draw:frame>
        <draw:frame draw:id="id469" presentation:style-name="a1981" draw:name="Title 1" svg:x="0.91667in" svg:y="0.39931in" svg:width="11.5in" svg:height="1.44965in" presentation:class="title" presentation:placeholder="false">
          <draw:text-box>
            <text:p text:style-name="a1980" text:class-names="" text:cond-style-name=""><text:span text:style-name="a1977" text:class-names="">Dynamical</text:span><text:span text:style-name="a1978" text:class-names="">!</text:span><text:span text:style-name="a1979" text:class-names=""/></text:p>
          </draw:text-box>
          <svg:title/>
          <svg:desc/>
        </draw:frame>
        <draw:frame draw:id="id470" draw:style-name="a1987" draw:name="TextBox 3" svg:x="4.3871in" svg:y="1.77369in" svg:width="8.74193in" svg:height="0.77415in">
          <draw:text-box>
            <text:p text:style-name="a1983" text:class-names="" text:cond-style-name=""><text:span text:style-name="a1982" text:class-names="">Code available:</text:span></text:p>
            <text:p text:style-name="a1986" text:class-names="" text:cond-style-name=""><text:span text:style-name="a1984" text:class-names="">https://github.com/matt-j-harvey/Dynamical_Systems_Reading_Group</text:span><text:span text:style-name="a1985" text:class-names=""/></text:p>
          </draw:text-box>
          <svg:title/>
          <svg:desc/>
        </draw:frame>
        <draw:frame draw:id="id471" draw:style-name="a1988" draw:name="Picture 5" svg:x="9.52628in" svg:y="2.8263in" svg:width="2.28555in" svg:height="2.25269in" style:rel-width="scale" style:rel-height="scale">
          <draw:image xlink:href="media/image2.png" xlink:type="simple" xlink:show="embed" xlink:actuate="onLoad"/>
          <svg:title/>
          <svg:desc/>
        </draw:frame>
        <draw:frame draw:id="id472" draw:style-name="a1989" draw:name="Picture 4" svg:x="4.08166in" svg:y="0.48272in" svg:width="1.13494in" svg:height="0.81146in" style:rel-width="scale" style:rel-height="scale">
          <draw:image xlink:href="media/image1.png" xlink:type="simple" xlink:show="embed" xlink:actuate="onLoad"/>
          <svg:title/>
          <svg:desc>A black and white image of a mouse

AI-generated content may be incorrect.</svg:desc>
        </draw:frame>
        <draw:frame draw:id="id473" draw:style-name="a1990" draw:name="Graphic 9" svg:x="8.09368in" svg:y="0.08702in" svg:width="1.99896in" svg:height="1.99896in" style:rel-width="scale" style:rel-height="scale">
          <draw:image xlink:href="media/image31.svg" xlink:type="simple" xlink:show="embed" xlink:actuate="onLoad"/>
          <svg:title/>
          <svg:desc/>
        </draw:frame>
        <presentation:notes draw:style-name="a2022">
          <draw:page-thumbnail draw:page-number="43" svg:x="0.75in" svg:y="1.25in" svg:width="6in" svg:height="3.375in" presentation:class="page" draw:id="id474" presentation:style-name="a1991" draw:name="Slide Image Placeholder 1">
            <svg:title/>
            <svg:desc/>
          </draw:page-thumbnail>
          <draw:frame draw:id="id475" presentation:style-name="a2018" draw:name="Notes Placeholder 2" svg:x="0.75in" svg:y="4.8125in" svg:width="6in" svg:height="3.9375in" presentation:class="notes" presentation:placeholder="false">
            <draw:text-box>
              <text:p text:style-name="a1993" text:class-names="" text:cond-style-name=""><text:span text:style-name="a1992" text:class-names=""/></text:p>
              <text:p text:style-name="a1997" text:class-names="" text:cond-style-name=""><text:span text:style-name="a1994" text:class-names="">Dynamical system:<text:s text:c="1"/></text:span><draw:frame draw:style-name="a1995" text:anchor-type="as-char" svg:x="1173.56257in" svg:y="0in" svg:width="1.26028in" svg:height="0.56958in" style:rel-width="scale" style:rel-height="scale"><draw:object xlink:href="Object 20/" xlink:type="simple" xlink:show="embed" xlink:actuate="onLoad"/></draw:frame><text:span text:style-name="a1996" text:class-names=""/></text:p>
              <text:p text:style-name="a1999" text:class-names="" text:cond-style-name=""><text:span text:style-name="a1998" text:class-names="">State [x]</text:span></text:p>
              <text:p text:style-name="a2001" text:class-names="" text:cond-style-name=""><text:span text:style-name="a2000" text:class-names="">Describe how state evolves over time</text:span></text:p>
              <text:p text:style-name="a2003" text:class-names="" text:cond-style-name=""><text:span text:style-name="a2002" text:class-names="">The collection of all the possible states are the state space / phase space.</text:span></text:p>
              <text:p text:style-name="a2005" text:class-names="" text:cond-style-name=""><text:span text:style-name="a2004" text:class-names="">At every state we can calculate the derivative to produce a “vector field / phase portrait” <text:s text:c="1"/>– this can help us understand the behaviour of the system.</text:span></text:p>
              <text:p text:style-name="a2009" text:class-names="" text:cond-style-name=""><text:span text:style-name="a2006" text:class-names="">At certain<text:s text:c="1"/></text:span><text:span text:style-name="a2007" text:class-names="">points</text:span><text:span text:style-name="a2008" text:class-names=""><text:s text:c="1"/>the derivative might be 0 – these are “fixed points”</text:span></text:p>
              <text:p text:style-name="a2011" text:class-names="" text:cond-style-name=""><text:span text:style-name="a2010" text:class-names="">Fixed points can be either “stable” – if nearby states converge to them</text:span></text:p>
              <text:p text:style-name="a2013" text:class-names="" text:cond-style-name=""><text:span text:style-name="a2012" text:class-names="">“unstable” nearby points are repelled from them.<text:s text:c="1"/></text:span></text:p>
              <text:p text:style-name="a2015" text:class-names="" text:cond-style-name=""><text:span text:style-name="a2014" text:class-names=""/></text:p>
              <text:p text:style-name="a2017" text:class-names="" text:cond-style-name=""><text:span text:style-name="a2016" text:class-names=""/></text:p>
            </draw:text-box>
            <svg:title/>
            <svg:desc/>
          </draw:frame>
          <draw:frame draw:id="id476" draw:style-name="a2021" draw:name="Slide Number Placeholder 3" svg:x="4.24826in" svg:y="9.49826in" svg:width="3.25in" svg:height="0.50174in">
            <draw:text-box>
              <text:p text:style-name="a2020" text:class-names="" text:cond-style-name=""><text:span text:style-name="a201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1175" svg:viewBox="0 0 20 30" svg:d="m10 0-10 30h20z"/>
    <draw:marker draw:name="a1207" svg:viewBox="0 0 20 30" svg:d="m10 0-10 30h20z"/>
    <draw:marker draw:name="a1314" svg:viewBox="0 0 20 30" svg:d="m10 0-10 30h20z"/>
    <draw:marker draw:name="a1177" svg:viewBox="0 0 20 30" svg:d="m10 0-10 30h20z"/>
    <draw:marker draw:name="a1316" svg:viewBox="0 0 20 30" svg:d="m10 0-10 30h20z"/>
    <draw:marker draw:name="a1179" svg:viewBox="0 0 20 30" svg:d="m10 0-10 30h20z"/>
    <draw:marker draw:name="a971" svg:viewBox="0 0 20 30" svg:d="m10 0-10 30h20z"/>
    <draw:marker draw:name="a935" svg:viewBox="0 0 20 30" svg:d="m10 0-10 30h20z"/>
    <draw:marker draw:name="a1318" svg:viewBox="0 0 20 30" svg:d="m10 0-10 30h20z"/>
    <draw:marker draw:name="a1000" svg:viewBox="0 0 20 30" svg:d="m10 0-10 30h20z"/>
    <draw:marker draw:name="a1270" svg:viewBox="0 0 20 30" svg:d="m10 0-10 30h20z"/>
    <draw:marker draw:name="a1465" svg:viewBox="0 0 20 30" svg:d="m10 0-10 30h20z"/>
    <draw:marker draw:name="a1272" svg:viewBox="0 0 20 30" svg:d="m10 0-10 30h20z"/>
    <draw:marker draw:name="a1467" svg:viewBox="0 0 20 30" svg:d="m10 0-10 30h20z"/>
    <draw:marker draw:name="a1274" svg:viewBox="0 0 20 30" svg:d="m10 0-10 30h20z"/>
    <draw:marker draw:name="a1469" svg:viewBox="0 0 20 30" svg:d="m10 0-10 30h20z"/>
    <draw:marker draw:name="a1450" svg:viewBox="0 0 20 30" svg:d="m10 0-10 30h20z"/>
    <draw:marker draw:name="a1276" svg:viewBox="0 0 20 30" svg:d="m10 0-10 30h20z"/>
    <draw:marker draw:name="a1452" svg:viewBox="0 0 20 30" svg:d="m10 0-10 30h20z"/>
    <draw:marker draw:name="a1278" svg:viewBox="0 0 20 30" svg:d="m10 0-10 30h20z"/>
    <draw:marker draw:name="a1191" svg:viewBox="0 0 20 30" svg:d="m10 0-10 30h20z"/>
    <draw:marker draw:name="a1719" svg:viewBox="0 0 20 30" svg:d="m10 0-10 30h20z"/>
    <draw:marker draw:name="a1193" svg:viewBox="0 0 20 30" svg:d="m10 0-10 30h20z"/>
    <draw:marker draw:name="a1195" svg:viewBox="0 0 20 30" svg:d="m10 0-10 30h20z"/>
    <draw:marker draw:name="a1197" svg:viewBox="0 0 20 30" svg:d="m10 0-10 30h20z"/>
    <draw:marker draw:name="a1442" svg:viewBox="0 0 20 30" svg:d="m10 0-10 30h20z"/>
    <draw:marker draw:name="a1199" svg:viewBox="0 0 20 30" svg:d="m10 0-10 30h20z"/>
    <draw:marker draw:name="a1444" svg:viewBox="0 0 20 30" svg:d="m10 0-10 30h20z"/>
    <draw:marker draw:name="a1181" svg:viewBox="0 0 20 30" svg:d="m10 0-10 30h20z"/>
    <draw:marker draw:name="a1446" svg:viewBox="0 0 20 30" svg:d="m10 0-10 30h20z"/>
    <draw:marker draw:name="a901" svg:viewBox="0 0 20 30" svg:d="m10 0-10 30h20z"/>
    <draw:marker draw:name="a1183" svg:viewBox="0 0 20 30" svg:d="m10 0-10 30h20z"/>
    <draw:marker draw:name="a1448" svg:viewBox="0 0 20 30" svg:d="m10 0-10 30h20z"/>
    <draw:marker draw:name="a1185" svg:viewBox="0 0 20 30" svg:d="m10 0-10 30h20z"/>
    <draw:marker draw:name="a1187" svg:viewBox="0 0 20 30" svg:d="m10 0-10 30h20z"/>
    <draw:marker draw:name="a943" svg:viewBox="0 0 20 30" svg:d="m10 0-10 30h20z"/>
    <draw:marker draw:name="a1189" svg:viewBox="0 0 20 30" svg:d="m10 0-10 30h20z"/>
    <draw:marker draw:name="a1201" svg:viewBox="0 0 20 30" svg:d="m10 0-10 30h20z"/>
    <draw:marker draw:name="a908" svg:viewBox="0 0 20 30" svg:d="m10 0-10 30h20z"/>
    <draw:marker draw:name="a1471" svg:viewBox="0 0 20 30" svg:d="m10 0-10 30h20z"/>
    <draw:marker draw:name="a1203" svg:viewBox="0 0 20 30" svg:d="m10 0-10 30h20z"/>
    <draw:marker draw:name="a1135" svg:viewBox="0 0 20 30" svg:d="m10 0-10 30h20z"/>
    <draw:marker draw:name="a1173" svg:viewBox="0 0 20 30" svg:d="m10 0-10 30h20z"/>
    <draw:marker draw:name="a1205" svg:viewBox="0 0 20 30" svg:d="m10 0-10 30h20z"/>
    <draw:marker draw:name="a1011" svg:viewBox="0 0 20 30" svg:d="m10 0-10 30h20z"/>
    <draw:marker draw:name="a1312" svg:viewBox="0 0 20 30" svg:d="m10 0-10 30h20z"/>
    <draw:marker draw:name="a1280" svg:viewBox="0 0 20 30" svg:d="m10 0-10 30h20z"/>
    <draw:marker draw:name="a1137" svg:viewBox="0 0 20 30" svg:d="m10 0-10 30h20z"/>
    <draw:stroke-dash draw:name="a1010" draw:style="rect" draw:dots1="1" draw:dots1-length="0.0625in" draw:distance="0.0625in"/>
    <draw:stroke-dash draw:name="a1837" draw:display-name="Dash" draw:style="rect" draw:dots1="1" draw:dots1-length="0.0625in" draw:dots2="0" draw:dots2-length="0in" draw:distance="0.0625in"/>
    <draw:stroke-dash draw:name="a1748" draw:display-name="Dash" draw:style="rect" draw:dots1="1" draw:dots1-length="0.0625in" draw:dots2="0" draw:dots2-length="0in" draw:distance="0.0625in"/>
    <draw:stroke-dash draw:name="a999" draw:style="rect" draw:dots1="1" draw:dots1-length="0.0625in" draw:distance="0.0625in"/>
    <draw:stroke-dash draw:name="a1304" draw:style="rect" draw:dots1="1" draw:dots1-length="0.02083in" draw:distance="0.02083in"/>
    <draw:stroke-dash draw:name="a1739" draw:display-name="Dash" draw:style="rect" draw:dots1="1" draw:dots1-length="0.0625in" draw:dots2="0" draw:dots2-length="0in" draw:distance="0.0625in"/>
    <draw:stroke-dash draw:name="a1818" draw:display-name="Dash" draw:style="rect" draw:dots1="1" draw:dots1-length="0.0625in" draw:dots2="0" draw:dots2-length="0in" draw:distance="0.0625in"/>
    <draw:stroke-dash draw:name="a1757" draw:display-name="Dash" draw:style="rect" draw:dots1="1" draw:dots1-length="0.0625in" draw:dots2="0" draw:dots2-length="0in" draw:distance="0.0625in"/>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atthew Harvey</meta:initial-creator>
    <dc:creator>Matthew Harvey</dc:creator>
    <meta:creation-date>2025-07-14T18:20:17Z</meta:creation-date>
    <dc:date>2025-07-15T13:51:16Z</dc:date>
    <meta:editing-cycles>13</meta:editing-cycles>
    <meta:editing-duration>PT0S</meta:editing-duration>
    <meta:document-statistic meta:paragraph-count="177" meta:word-count="1678"/>
  </office:meta>
</office:document-meta>
</file>

<file path=Object 1/content.xml><?xml version="1.0" encoding="utf-8"?>
<mml:math xmlns:mml="http://www.w3.org/1998/Math/MathML" display="block">
  <mml:mfrac>
    <mml:mrow>
      <mml:mi>d</mml:mi>
      <mml:mi>x</mml:mi>
    </mml:mrow>
    <mml:mrow>
      <mml:mi>d</mml:mi>
      <mml:mi>t</mml:mi>
    </mml:mrow>
  </mml:mfrac>
  <mml:mo>=</mml:mo>
  <mml:mi>f</mml:mi>
  <mml:mo fence="false">(</mml:mo>
  <mml:msub>
    <mml:mi>x</mml:mi>
    <mml:mi>t</mml:mi>
  </mml:msub>
  <mml:mo fence="false">)</mml:mo>
</mml:math>
</file>

<file path=Object 10/content.xml><?xml version="1.0" encoding="utf-8"?>
<mml:math xmlns:mml="http://www.w3.org/1998/Math/MathML" display="block">
  <mml:mfrac>
    <mml:mrow>
      <mml:mi>d</mml:mi>
      <mml:mi>x</mml:mi>
    </mml:mrow>
    <mml:mrow>
      <mml:mi>d</mml:mi>
      <mml:mi>t</mml:mi>
    </mml:mrow>
  </mml:mfrac>
  <mml:mo>=</mml:mo>
  <mml:mi>a</mml:mi>
  <mml:mo> </mml:mo>
  <mml:mi>b</mml:mi>
  <mml:mi>l</mml:mi>
  <mml:mi>o</mml:mi>
  <mml:mi>o</mml:mi>
  <mml:mi>d</mml:mi>
  <mml:mi>y</mml:mi>
  <mml:mo> </mml:mo>
  <mml:mi>g</mml:mi>
  <mml:mi>r</mml:mi>
  <mml:mi>e</mml:mi>
  <mml:mi>a</mml:mi>
  <mml:mi>t</mml:mi>
  <mml:mo> </mml:mo>
  <mml:mi>R</mml:mi>
  <mml:mi>N</mml:mi>
  <mml:mi>N</mml:mi>
  <mml:mo> </mml:mo>
  <mml:mo fence="false">(</mml:mo>
  <mml:mi>x</mml:mi>
  <mml:mo fence="false">)</mml:mo>
</mml:math>
</file>

<file path=Object 11/content.xml><?xml version="1.0" encoding="utf-8"?>
<mml:math xmlns:mml="http://www.w3.org/1998/Math/MathML" display="block">
  <mml:mfrac>
    <mml:mrow>
      <mml:mi>d</mml:mi>
      <mml:mi>V</mml:mi>
    </mml:mrow>
    <mml:mrow>
      <mml:mi>d</mml:mi>
      <mml:mi>t</mml:mi>
    </mml:mrow>
  </mml:mfrac>
  <mml:mo>=</mml:mo>
  <mml:mi>V</mml:mi>
</mml:math>
</file>

<file path=Object 12/content.xml><?xml version="1.0" encoding="utf-8"?>
<mml:math xmlns:mml="http://www.w3.org/1998/Math/MathML" display="block">
  <mml:mfrac>
    <mml:mrow>
      <mml:mi>d</mml:mi>
      <mml:mi>V</mml:mi>
    </mml:mrow>
    <mml:mrow>
      <mml:mi>d</mml:mi>
      <mml:mi>t</mml:mi>
    </mml:mrow>
  </mml:mfrac>
  <mml:mo>=</mml:mo>
  <mml:mo>−</mml:mo>
  <mml:mi>V</mml:mi>
</mml:math>
</file>

<file path=Object 13/content.xml><?xml version="1.0" encoding="utf-8"?>
<mml:math xmlns:mml="http://www.w3.org/1998/Math/MathML" display="block">
  <mml:mfrac>
    <mml:mrow>
      <mml:mi>d</mml:mi>
      <mml:mi>V</mml:mi>
    </mml:mrow>
    <mml:mrow>
      <mml:mi>d</mml:mi>
      <mml:mi>t</mml:mi>
    </mml:mrow>
  </mml:mfrac>
  <mml:mo>=</mml:mo>
  <mml:mo>−</mml:mo>
  <mml:mo fence="false">(</mml:mo>
  <mml:mi>V</mml:mi>
  <mml:mo>−</mml:mo>
  <mml:msub>
    <mml:mi>E</mml:mi>
    <mml:mi>l</mml:mi>
  </mml:msub>
  <mml:mo fence="false">)</mml:mo>
</mml:math>
</file>

<file path=Object 14/content.xml><?xml version="1.0" encoding="utf-8"?>
<mml:math xmlns:mml="http://www.w3.org/1998/Math/MathML" display="block">
  <mml:msub>
    <mml:mi>E</mml:mi>
    <mml:mi>l</mml:mi>
  </mml:msub>
  <mml:mo>=</mml:mo>
  <mml:mn>2</mml:mn>
</mml:math>
</file>

<file path=Object 15/content.xml><?xml version="1.0" encoding="utf-8"?>
<mml:math xmlns:mml="http://www.w3.org/1998/Math/MathML" display="block">
  <mml:mfrac>
    <mml:mrow>
      <mml:mi>d</mml:mi>
      <mml:mi>V</mml:mi>
    </mml:mrow>
    <mml:mrow>
      <mml:mi>d</mml:mi>
      <mml:mi>t</mml:mi>
    </mml:mrow>
  </mml:mfrac>
  <mml:mo>=</mml:mo>
  <mml:mo>−</mml:mo>
  <mml:msub>
    <mml:mi>g</mml:mi>
    <mml:mi>l</mml:mi>
  </mml:msub>
  <mml:mo fence="false">(</mml:mo>
  <mml:mi>V</mml:mi>
  <mml:mo>−</mml:mo>
  <mml:msub>
    <mml:mi>E</mml:mi>
    <mml:mi>l</mml:mi>
  </mml:msub>
  <mml:mo fence="false">)</mml:mo>
</mml:math>
</file>

<file path=Object 16/content.xml><?xml version="1.0" encoding="utf-8"?>
<mml:math xmlns:mml="http://www.w3.org/1998/Math/MathML" display="block">
  <mml:msub>
    <mml:mi>g</mml:mi>
    <mml:mi>l</mml:mi>
  </mml:msub>
</mml:math>
</file>

<file path=Object 17/content.xml><?xml version="1.0" encoding="utf-8"?>
<mml:math xmlns:mml="http://www.w3.org/1998/Math/MathML" display="block">
  <mml:msub>
    <mml:mi>g</mml:mi>
    <mml:mi>l</mml:mi>
  </mml:msub>
</mml:math>
</file>

<file path=Object 18/content.xml><?xml version="1.0" encoding="utf-8"?>
<mml:math xmlns:mml="http://www.w3.org/1998/Math/MathML" display="block">
  <mml:mfrac>
    <mml:mrow>
      <mml:mi>d</mml:mi>
      <mml:mi>V</mml:mi>
    </mml:mrow>
    <mml:mrow>
      <mml:mi>d</mml:mi>
      <mml:mi>t</mml:mi>
    </mml:mrow>
  </mml:mfrac>
  <mml:mo>=</mml:mo>
  <mml:mo>−</mml:mo>
  <mml:msub>
    <mml:mi>g</mml:mi>
    <mml:mi>l</mml:mi>
  </mml:msub>
  <mml:mfenced>
    <mml:mrow>
      <mml:mi>V</mml:mi>
      <mml:mo>−</mml:mo>
      <mml:msub>
        <mml:mi>E</mml:mi>
        <mml:mi>l</mml:mi>
      </mml:msub>
    </mml:mrow>
  </mml:mfenced>
  <mml:mo>+</mml:mo>
  <mml:mi>I</mml:mi>
</mml:math>
</file>

<file path=Object 19/content.xml><?xml version="1.0" encoding="utf-8"?>
<mml:math xmlns:mml="http://www.w3.org/1998/Math/MathML" display="block">
  <mml:mfrac>
    <mml:mrow>
      <mml:mi>d</mml:mi>
      <mml:mi>x</mml:mi>
    </mml:mrow>
    <mml:mrow>
      <mml:mi>d</mml:mi>
      <mml:mi>t</mml:mi>
    </mml:mrow>
  </mml:mfrac>
  <mml:mo>=</mml:mo>
  <mml:mi>f</mml:mi>
  <mml:mo fence="false">(</mml:mo>
  <mml:mi>x</mml:mi>
  <mml:mo fence="false">)</mml:mo>
</mml:math>
</file>

<file path=Object 2/content.xml><?xml version="1.0" encoding="utf-8"?>
<mml:math xmlns:mml="http://www.w3.org/1998/Math/MathML" display="block">
  <mml:mfrac>
    <mml:mrow>
      <mml:mi>d</mml:mi>
      <mml:mi>x</mml:mi>
    </mml:mrow>
    <mml:mrow>
      <mml:mi>d</mml:mi>
      <mml:mi>t</mml:mi>
    </mml:mrow>
  </mml:mfrac>
  <mml:mo>=</mml:mo>
  <mml:mi>x</mml:mi>
</mml:math>
</file>

<file path=Object 20/content.xml><?xml version="1.0" encoding="utf-8"?>
<mml:math xmlns:mml="http://www.w3.org/1998/Math/MathML" display="block">
  <mml:mfrac>
    <mml:mrow>
      <mml:mi>d</mml:mi>
      <mml:mi>x</mml:mi>
    </mml:mrow>
    <mml:mrow>
      <mml:mi>d</mml:mi>
      <mml:mi>t</mml:mi>
    </mml:mrow>
  </mml:mfrac>
  <mml:mo>=</mml:mo>
  <mml:mi>f</mml:mi>
  <mml:mo fence="false">(</mml:mo>
  <mml:msub>
    <mml:mi>x</mml:mi>
    <mml:mi>t</mml:mi>
  </mml:msub>
  <mml:mo fence="false">)</mml:mo>
</mml:math>
</file>

<file path=Object 3/content.xml><?xml version="1.0" encoding="utf-8"?>
<mml:math xmlns:mml="http://www.w3.org/1998/Math/MathML" display="block">
  <mml:mfrac>
    <mml:mrow>
      <mml:mi>d</mml:mi>
      <mml:mi>x</mml:mi>
    </mml:mrow>
    <mml:mrow>
      <mml:mi>d</mml:mi>
      <mml:mi>t</mml:mi>
    </mml:mrow>
  </mml:mfrac>
  <mml:mo>=</mml:mo>
  <mml:mi>f</mml:mi>
  <mml:mo fence="false">(</mml:mo>
  <mml:mi>x</mml:mi>
  <mml:mo fence="false">)</mml:mo>
</mml:math>
</file>

<file path=Object 4/content.xml><?xml version="1.0" encoding="utf-8"?>
<mml:math xmlns:mml="http://www.w3.org/1998/Math/MathML" display="block">
  <mml:mfrac>
    <mml:mrow>
      <mml:mi>d</mml:mi>
      <mml:mi>x</mml:mi>
    </mml:mrow>
    <mml:mrow>
      <mml:mi>d</mml:mi>
      <mml:mi>t</mml:mi>
    </mml:mrow>
  </mml:mfrac>
  <mml:mo>=</mml:mo>
  <mml:mi>x</mml:mi>
</mml:math>
</file>

<file path=Object 5/content.xml><?xml version="1.0" encoding="utf-8"?>
<mml:math xmlns:mml="http://www.w3.org/1998/Math/MathML" display="block">
  <mml:mfrac>
    <mml:mrow>
      <mml:mi>d</mml:mi>
      <mml:mi>x</mml:mi>
    </mml:mrow>
    <mml:mrow>
      <mml:mi>d</mml:mi>
      <mml:mi>t</mml:mi>
    </mml:mrow>
  </mml:mfrac>
  <mml:mo>=</mml:mo>
  <mml:mi>f</mml:mi>
  <mml:mo fence="false">(</mml:mo>
  <mml:mi>x</mml:mi>
  <mml:mo fence="false">)</mml:mo>
</mml:math>
</file>

<file path=Object 6/content.xml><?xml version="1.0" encoding="utf-8"?>
<mml:math xmlns:mml="http://www.w3.org/1998/Math/MathML" display="block">
  <mml:mfrac>
    <mml:mrow>
      <mml:mi>d</mml:mi>
      <mml:mi>x</mml:mi>
    </mml:mrow>
    <mml:mrow>
      <mml:mi>d</mml:mi>
      <mml:mi>t</mml:mi>
    </mml:mrow>
  </mml:mfrac>
  <mml:mo>=</mml:mo>
  <mml:mi>x</mml:mi>
</mml:math>
</file>

<file path=Object 7/content.xml><?xml version="1.0" encoding="utf-8"?>
<mml:math xmlns:mml="http://www.w3.org/1998/Math/MathML" display="block">
  <mml:mfrac>
    <mml:mrow>
      <mml:mi>d</mml:mi>
      <mml:mi>x</mml:mi>
    </mml:mrow>
    <mml:mrow>
      <mml:mi>d</mml:mi>
      <mml:mi>t</mml:mi>
    </mml:mrow>
  </mml:mfrac>
  <mml:mo>=</mml:mo>
  <mml:mi>x</mml:mi>
</mml:math>
</file>

<file path=Object 8/content.xml><?xml version="1.0" encoding="utf-8"?>
<mml:math xmlns:mml="http://www.w3.org/1998/Math/MathML" display="block">
  <mml:mfrac>
    <mml:mrow>
      <mml:mi>d</mml:mi>
      <mml:mi>x</mml:mi>
    </mml:mrow>
    <mml:mrow>
      <mml:mi>d</mml:mi>
      <mml:mi>t</mml:mi>
    </mml:mrow>
  </mml:mfrac>
  <mml:mo>=</mml:mo>
  <mml:mi>S</mml:mi>
  <mml:mi>i</mml:mi>
  <mml:mi>n</mml:mi>
  <mml:mo fence="false">(</mml:mo>
  <mml:mi>x</mml:mi>
  <mml:mo fence="false">)</mml:mo>
</mml:math>
</file>

<file path=Object 9/content.xml><?xml version="1.0" encoding="utf-8"?>
<mml:math xmlns:mml="http://www.w3.org/1998/Math/MathML" display="block">
  <mml:msup>
    <mml:mi>f</mml:mi>
    <mml:mo>′</mml:mo>
  </mml:msup>
  <mml:mfenced>
    <mml:mi>x</mml:mi>
  </mml:mfenced>
  <mml:mo>=</mml:mo>
  <mml:mfrac>
    <mml:mrow>
      <mml:mi>f</mml:mi>
      <mml:mfenced>
        <mml:mrow>
          <mml:mi>x</mml:mi>
          <mml:mo>+</mml:mo>
          <mml:mi>l</mml:mi>
          <mml:mi>i</mml:mi>
          <mml:mi>t</mml:mi>
          <mml:mi>t</mml:mi>
          <mml:mi>l</mml:mi>
          <mml:mi>e</mml:mi>
          <mml:mo> </mml:mo>
          <mml:mi>s</mml:mi>
          <mml:mi>t</mml:mi>
          <mml:mi>e</mml:mi>
          <mml:mi>p</mml:mi>
        </mml:mrow>
      </mml:mfenced>
      <mml:mo>−</mml:mo>
      <mml:mi>f</mml:mi>
      <mml:mfenced>
        <mml:mi>x</mml:mi>
      </mml:mfenced>
    </mml:mrow>
    <mml:mrow>
      <mml:mi>l</mml:mi>
      <mml:mi>i</mml:mi>
      <mml:mi>t</mml:mi>
      <mml:mi>t</mml:mi>
      <mml:mi>l</mml:mi>
      <mml:mi>e</mml:mi>
      <mml:mo> </mml:mo>
      <mml:mi>s</mml:mi>
      <mml:mi>t</mml:mi>
      <mml:mi>e</mml:mi>
      <mml:mi>p</mml:mi>
    </mml:mrow>
  </mml:mfrac>
</mml:math>
</file>